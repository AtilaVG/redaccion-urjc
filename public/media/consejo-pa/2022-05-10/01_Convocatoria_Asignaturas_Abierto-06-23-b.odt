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2A6B8904EB4F436051.png" manifest:media-type="image/png"/>
  <manifest:file-entry manifest:full-path="Pictures/1000000100001B1F000007F6ED638236CD3C792B.png" manifest:media-type="image/png"/>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33in" style:rel-column-width="13054*"/>
    </style:style>
    <style:style style:name="Table1.B" style:family="table-column">
      <style:table-column-properties style:column-width="1.3438in" style:rel-column-width="13160*"/>
    </style:style>
    <style:style style:name="Table1.C" style:family="table-column">
      <style:table-column-properties style:column-width="1.334in" style:rel-column-width="13061*"/>
    </style:style>
    <style:style style:name="Table1.D" style:family="table-column">
      <style:table-column-properties style:column-width="1.3431in" style:rel-column-width="13153*"/>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53in" style:rel-column-width="10922*"/>
    </style:style>
    <style:style style:name="Table2.D" style:family="table-column">
      <style:table-column-properties style:column-width="1.116in" style:rel-column-width="10926*"/>
    </style:style>
    <style:style style:name="Table2.E" style:family="table-column">
      <style:table-column-properties style:column-width="1.1167in" style:rel-column-width="10937*"/>
    </style:style>
    <style:style style:name="Table2.F" style:family="table-column">
      <style:table-column-properties style:column-width="1.1132in" style:rel-column-width="1090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53in" style:rel-column-width="10922*"/>
    </style:style>
    <style:style style:name="Table3.D" style:family="table-column">
      <style:table-column-properties style:column-width="1.116in" style:rel-column-width="10926*"/>
    </style:style>
    <style:style style:name="Table3.E" style:family="table-column">
      <style:table-column-properties style:column-width="1.1167in" style:rel-column-width="10937*"/>
    </style:style>
    <style:style style:name="Table3.F" style:family="table-column">
      <style:table-column-properties style:column-width="1.1132in" style:rel-column-width="10903*"/>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53in" style:rel-column-width="10922*"/>
    </style:style>
    <style:style style:name="Table4.D" style:family="table-column">
      <style:table-column-properties style:column-width="1.116in" style:rel-column-width="10926*"/>
    </style:style>
    <style:style style:name="Table4.E" style:family="table-column">
      <style:table-column-properties style:column-width="1.1167in" style:rel-column-width="10937*"/>
    </style:style>
    <style:style style:name="Table4.F" style:family="table-column">
      <style:table-column-properties style:column-width="1.1132in" style:rel-column-width="10903*"/>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53in" style:rel-column-width="10922*"/>
    </style:style>
    <style:style style:name="Table5.D" style:family="table-column">
      <style:table-column-properties style:column-width="1.116in" style:rel-column-width="10926*"/>
    </style:style>
    <style:style style:name="Table5.E" style:family="table-column">
      <style:table-column-properties style:column-width="1.1167in" style:rel-column-width="10937*"/>
    </style:style>
    <style:style style:name="Table5.F" style:family="table-column">
      <style:table-column-properties style:column-width="1.1132in" style:rel-column-width="10903*"/>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style>
    <style:style style:name="P2" style:family="paragraph" style:parent-style-name="Heading_20_1" style:list-style-name="WWNum3">
      <style:paragraph-properties fo:text-align="justify" style:justify-single-word="false"/>
    </style:style>
    <style:style style:name="P3" style:family="paragraph" style:parent-style-name="Heading_20_1" style:list-style-name="WWNum3"/>
    <style:style style:name="P4" style:family="paragraph" style:parent-style-name="Heading_20_1" style:list-style-name="WWNum3">
      <style:paragraph-properties fo:break-before="page"/>
    </style:style>
    <style:style style:name="P5" style:family="paragraph" style:parent-style-name="Heading_20_2" style:list-style-name="WWNum1"/>
    <style:style style:name="P6"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7" style:family="paragraph" style:parent-style-name="Standard">
      <style:paragraph-properties fo:text-align="justify" style:justify-single-word="false"/>
    </style:style>
    <style:style style:name="P8" style:family="paragraph" style:parent-style-name="Table">
      <style:paragraph-properties fo:margin-top="0.0835in" fo:margin-bottom="0.0835in" style:contextual-spacing="false" fo:text-align="justify" style:justify-single-word="false"/>
    </style:style>
    <style:style style:name="P9" style:family="paragraph" style:parent-style-name="Table_20_Contents">
      <style:paragraph-properties fo:orphans="0" fo:widows="0" fo:keep-with-next="always"/>
    </style:style>
    <style:style style:name="P10" style:family="paragraph" style:parent-style-name="Table_20_Contents">
      <style:paragraph-properties fo:orphans="0" fo:widows="0"/>
    </style:style>
    <style:style style:name="P11" style:family="paragraph" style:parent-style-name="Text_20_body">
      <style:paragraph-properties fo:margin-left="0.4925in" fo:margin-right="0in" fo:text-indent="-0.4925in" style:auto-text-indent="false"/>
    </style:style>
    <style:style style:name="P12" style:family="paragraph" style:parent-style-name="Text_20_body">
      <style:paragraph-properties fo:margin-left="0.4925in" fo:margin-right="0in" fo:text-align="center" style:justify-single-word="false" fo:text-indent="-0.4925in" style:auto-text-indent="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color="#000000" loext:opacity="100%"/>
    </style:style>
    <style:style style:name="P15" style:family="paragraph" style:parent-style-name="Text_20_body">
      <style:text-properties fo:color="#000000" loext:opacity="100%"/>
    </style:style>
    <style:style style:name="P16" style:family="paragraph" style:parent-style-name="Text_20_body" style:list-style-name="WWNum5"/>
    <style:style style:name="P17" style:family="paragraph" style:parent-style-name="Text_20_body" style:list-style-name="WWNum4"/>
    <style:style style:name="P18" style:family="paragraph" style:parent-style-name="Text_20_body" style:list-style-name="WWNum11"/>
    <style:style style:name="P19" style:family="paragraph" style:parent-style-name="Text_20_body" style:list-style-name="WWNum8"/>
    <style:style style:name="P20" style:family="paragraph" style:parent-style-name="Text_20_body" style:list-style-name="WWNum10"/>
    <style:style style:name="P21" style:family="paragraph" style:parent-style-name="Text_20_body">
      <style:paragraph-properties fo:margin-left="0.5in" fo:margin-right="0in" fo:text-indent="0in" style:auto-text-indent="false"/>
    </style:style>
    <style:style style:name="P22" style:family="paragraph" style:parent-style-name="Text_20_body" style:list-style-name="WWNum9"/>
    <style:style style:name="P23" style:family="paragraph" style:parent-style-name="Text_20_body" style:list-style-name="WWNum7"/>
    <style:style style:name="P24" style:family="paragraph" style:parent-style-name="Text_20_body" style:list-style-name="WWNum2"/>
    <style:style style:name="P25" style:family="paragraph" style:parent-style-name="Text_20_body" style:list-style-name="WWNum6"/>
    <style:style style:name="P26" style:family="paragraph" style:parent-style-name="Text_20_body">
      <style:paragraph-properties fo:margin-left="0.75in" fo:margin-right="0in" fo:text-indent="0in" style:auto-text-indent="false"/>
    </style:style>
    <style:style style:name="P27" style:family="paragraph" style:parent-style-name="Text_20_body">
      <style:text-properties fo:font-size="9pt" style:font-size-asian="9pt" style:font-size-complex="9pt"/>
    </style:style>
    <style:style style:name="P28" style:family="paragraph" style:parent-style-name="Title">
      <style:paragraph-properties fo:text-align="justify" style:justify-single-word="false"/>
      <style:text-properties fo:font-size="20pt" style:font-size-asian="20pt" style:font-size-complex="20pt"/>
    </style:style>
    <style:style style:name="P29" style:family="paragraph" style:parent-style-name="Title">
      <style:paragraph-properties fo:text-align="justify" style:justify-single-word="false"/>
    </style:style>
    <style:style style:name="T1" style:family="text">
      <style:text-properties fo:font-size="9pt" style:font-size-asian="9pt"/>
    </style:style>
    <style:style style:name="T2" style:family="text">
      <style:text-properties fo:font-size="20pt" style:font-size-asian="20pt" style:font-size-complex="20pt"/>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fo:color="#000000" loext:opacity="100%" fo:font-weight="bold" style:font-weight-asian="bold" style:font-weight-complex="bold"/>
    </style:style>
    <style:style style:name="T6" style:family="text">
      <style:text-properties fo:color="#000000" loext:opacity="100%" fo:font-size="8pt" style:font-size-asian="8pt" style:font-size-complex="8pt"/>
    </style:style>
    <style:style style:name="T7" style:family="text">
      <style:text-properties fo:color="#000000" loext:opacity="100%" fo:font-size="8pt" fo:language="es" fo:country="ES" style:letter-kerning="true" style:font-name-asian="AR PL KaitiM GB" style:font-size-asian="8pt" style:language-asian="zh" style:country-asian="CN" style:font-name-complex="FreeSans" style:font-size-complex="8pt" style:language-complex="hi" style:country-complex="IN"/>
    </style:style>
    <style:style style:name="T8" style:family="text">
      <style:text-properties fo:color="#ff0000" loext:opacity="100%"/>
    </style:style>
    <style:style style:name="T9" style:family="text">
      <style:text-properties style:language-asian="es" style:country-asian="ES"/>
    </style:style>
    <style:style style:name="T10" style:family="text">
      <style:text-properties fo:font-weight="normal" style:font-weight-asian="normal" style:font-weight-complex="normal"/>
    </style:style>
    <style:style style:name="T11" style:family="text">
      <style:text-properties fo:language="en" fo:country="US"/>
    </style:style>
    <style:style style:name="T12" style:family="text">
      <style:text-properties style:use-window-font-color="true" loext:opacity="0%" fo:font-size="11pt" fo:language="es" fo:country="ES" style:letter-kerning="true" style:font-name-asian="AR PL KaitiM GB" style:font-size-asian="11pt" style:language-asian="zh" style:country-asian="CN" style:font-name-complex="FreeSans" style:font-size-complex="12pt" style:language-complex="hi" style:country-complex="IN"/>
    </style:style>
    <style:style style:name="T13" style:family="text">
      <style:text-properties fo:font-weight="bold" style:font-weight-asian="bold" style:font-weight-complex="bold"/>
    </style:style>
    <style:style style:name="T14" style:family="text">
      <style:text-properties fo:font-size="11pt" style:font-size-asian="11pt" style:font-size-complex="11pt"/>
    </style:style>
    <style:style style:name="T15" style:family="text">
      <style:text-properties officeooo:rsid="001984ee"/>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draw:frame draw:style-name="fr1" draw:name="Image1" text:anchor-type="char" svg:x="0.7717in" svg:y="0.339in" svg:width="2.1925in" svg:height="0.848in" draw:z-index="0"><draw:image xlink:href="Pictures/10000000000005D4000002413C0F70541D32920D.jpg" xlink:type="simple" xlink:show="embed" xlink:actuate="onLoad" draw:mime-type="image/jpeg"/></draw:frame></text:p>
      <text:p text:style-name="Title"><draw:frame draw:style-name="fr1" draw:name="Image2" text:anchor-type="char" svg:x="3.6929in" svg:y="1.0972in" svg:width="1.4835in" svg:height="0.8346in" draw:z-index="1"><draw:image xlink:href="Pictures/10000001000007800000043842EC265FC88E7C86.png" xlink:type="simple" xlink:show="embed" xlink:actuate="onLoad" draw:mime-type="image/png"/></draw:frame><draw:frame draw:style-name="fr2" draw:name="Image3" text:anchor-type="char" svg:x="0.5917in" svg:y="1.1008in" svg:width="2.8425in" svg:height="0.8346in" draw:z-index="2"><draw:image xlink:href="Pictures/1000000100001B1F000007F6ED638236CD3C792B.png" xlink:type="simple" xlink:show="embed" xlink:actuate="onLoad" draw:mime-type="image/png"/></draw:frame>​<draw:frame draw:style-name="fr1" draw:name="Image4" text:anchor-type="char" svg:x="3.1484in" svg:y="0.0374in" svg:width="2.8945in" svg:height="0.8417in" draw:z-index="3"><draw:image xlink:href="Pictures/10000001000004000000012A6B8904EB4F436051.png" xlink:type="simple" xlink:show="embed" xlink:actuate="onLoad" draw:mime-type="image/png"/></draw:frame>​</text:p>
      <text:p text:style-name="Text_20_body"/>
      <text:p text:style-name="P28"/>
      <text:p text:style-name="P28"/>
      <text:p text:style-name="P29"><text:span text:style-name="T2">Convocatoria para el reconocimiento de publicación de asignaturas en acceso abierto 2022-2023</text:span></text:p>
      <text:p text:style-name="Standard"/>
      <text:p text:style-name="Text_20_body"><text:bookmark-start text:name="_Hlk106145821"/><text:span text:style-name="T3">Resolución del Rector de la Universidad Rey Juan Carlos por la que se aprueba convocatoria pública para la </text:span><text:bookmark-start text:name="_Hlk106190730"/><text:span text:style-name="T3">concesión de un incentivo económico al personal docente e investigador de dicha Universidad, junto al reconocimiento de otros efectos favorables, por la publicación de asignaturas en acceso abierto para el curso 2022-2023.</text:span><text:bookmark-end text:name="_Hlk106145821"/><text:bookmark-end text:name="_Hlk106190730"/></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4">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4">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4">por parte del alumnado de la</text:span>s asignaturas que los utiliza, y por cualquier otra persona interesada en los temas que cubren. De esta forma, ayudan <text:span text:style-name="T4">a quien</text:span><text:span text:style-name="T8"> </text:span>los quiera utilizar para mejorar su conocimiento personal, sin importar el momen<text:span text:style-name="T4">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4"> considerada una forma idónea de </text:span><text:soft-page-break/><text:span text:style-name="T4">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9">Recursos educativos digitales: calidad y compartición en abierto)</text:span>, con un presupuesto en esta ocasión de 80.000 euros, financiado en el marco del Plan UniDigital del Ministerio de Universidades con los siguientes datos específicos: Componente 21 “Modernización y digitalización del sistema educativo, incluida la 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text:bookmark-start text:name="_Hlk106214000"/>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bookmark-end text:name="_Hlk106214000"/>.</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p text:style-name="Text_20_body"><text:span text:style-name="T4">En su virtud, este Rector, atendiendo a la existencia de crédito adecuado y suficiente al fin previsto, en uso de las competencias que le atribuye el artículo 20 de la Ley Orgánica 6/2001, de 21 de diciembre, de Universidades, el artículo 81.1.q) de los Estatutos de la Universidad Rey Juan Carlos, las Normas de Ejecución Presupuestaria aplicables a esta misma Universidad para el ejercicio 2022 y demás disposiciones vigentes, concordantes y de aplicación, </text:span></text:p>
      <text:p text:style-name="P13"><text:span text:style-name="T5">RESUELVE</text:span></text:p>
      <text:p text:style-name="Text_20_body"><text:span text:style-name="T5">PRIMERO. -</text:span><text:span text:style-name="T4"> Aprobar convocatoria pública para la concesión de un incentivo económico al personal docente <text:s/>de dicha Universidad, junto al reconocimiento de otros efectos favorables, por la publicación de asignaturas en acceso abierto para el curso 2022-2023, de conformidad con las Bases Reguladoras que se insertan en Anexo I a la presente resolución.</text:span></text:p>
      <text:p text:style-name="Text_20_body"><text:span text:style-name="T5">SEGUNDO. –</text:span><text:span text:style-name="T4"> El presupuesto inicial a distribuir al amparo de la presente convocatoria y sus Bases es de 96.000 €, con cargo a la aplicación presupuestaria 30NTUD06.422C 226.08 del presupuesto de gasto de la Universidad Rey Juan Carlos para 2022. </text:span></text:p>
      <text:p text:style-name="Text_20_body"><text:span text:style-name="T4">Dicha cantidad podrá incrementarse, una vez efectuada la </text:span>valoración de instancias por la <text:span text:style-name="T4">Comisión de Asignaturas en Abierto de la Universidad Rey Juan Carlos, si el número de asignaturas en abierto puestas o publicadas en Aula Virtual por cuatrimestre es mayor a 80, siempre que exista crédito adecuado y suficiente, y siempre que el crédito definitivo se publique en el mismo lugar que la presente convocatoria, con carácter previo a la resolución de concesión, sin que tal publicación implique la apertura de plazo para la presentación de nuevas solicitudes ni el inicio de nuevo cómputo de plazo para resolver.</text:span></text:p>
      <text:p text:style-name="Text_20_body"><text:span text:style-name="T4">El incremento del presupuesto inicial se llevará a cabo mediante resolución del Vicerrector de Transformación Digital e Innovación Docente de la Universidad Rey Juan Carlos a propuesta de la Comisión </text:span><text:soft-page-break/><text:span text:style-name="T4">de Asignaturas en Abierto. Frente a dicha resolución podrá interponerse recurso de alzada ante el Rector de esta Universidad en el plazo de un mes a partir de la publicación de dicha resolución. </text:span></text:p>
      <text:p text:style-name="Text_20_body"><text:span text:style-name="T5">TERCERO.-</text:span><text:span text:style-name="T4"> Contra la presente resolución, que pone fin a la vía administrativa de conformidad con el artículo 6.4 de la Ley Orgánica 6/2001, de 21 de diciembre, de Universidades, podrá interponerse recurso potestativo de reposición en el plazo de un mes a contar desde el día siguiente a aquel en que tenga lugar la publicación de las presente resolución y sus Bases, o ser impugnada directamente ante la Jurisdicción Contencioso-Administrativa en el plazo de dos meses, contado desde el día siguiente a aquel en que tenga lugar la publicación de la presente resolución y sus Bases, de conformidad con los artículos 123 y 124 de la Ley 39/2015, de 1 de octubre, del Procedimiento Administrativo Común de las Administraciones Públicas y 46.1 de la Ley 29/1998, de 13 de julio reguladora de la Jurisdicción Contencioso-Administrativa.</text:span></text:p>
      <text:p text:style-name="P14"/>
      <text:p text:style-name="P13"><text:span text:style-name="T4">EL RECTOR, </text:span></text:p>
      <text:p text:style-name="P15"/>
      <text:p text:style-name="P15"/>
      <text:p text:style-name="P13"><text:span text:style-name="T4">Javier Ramos López</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479966512" text:style-name="WWNum3">
        <text:list-item>
          <text:h text:style-name="P2" text:outline-level="1"><text:soft-page-break/><text:span text:style-name="T10">ANEXO I</text:span>: Bases reguladoras de la convocatoria para la concesión de un incentivo económico al personal docente e investigador de dicha Universidad, junto al reconocimiento de otros efectos favorables, por la publicación de asignaturas en acceso abierto para el curso 2022-2023</text:h>
        </text:list-item>
      </text:list>
      <text:p text:style-name="P13"/>
      <text:list xml:id="list221853296138435" text:continue-numbering="true" text:style-name="WWNum3">
        <text:list-item>
          <text:h text:style-name="P3" text:outline-level="1">1. Objeto de la convocatoria y normativa aplicable</text:h>
        </text:list-item>
      </text:list>
      <text:p text:style-name="Text_20_body">Esta convocatoria pretende promover el trabajo del personal docente <text:span text:style-name="T4">d</text:span>e la URJC para que publiquen sus materiales en asignaturas en acceso abierto, evaluándose dicho trabajo y asignando, en su caso, un incentivo económico por el que se reconoce el esfuerzo realizado en la elaboración de materiales publicados durante el curso 2022-23. Esta convocatoria está dirigida a todo el Personal Docente de la Universidad, cualquiera que sea su categoría y dedicación, siempre que se encuentre en situación de servicio activo y ocupando plaza o puesto en la Universidad Rey Juan Carlos a la fecha de formulación de la correspondiente solicitud, debiendo mantener la vinculación con la Universidad hasta la fecha en que se apruebe y publique la resolución definitiva correspondiente a la presente convocatoria, y que cumpla las condiciones especificadas más adelante en esta convocatoria, donde se indica qué asignaturas se pueden considerar, qué condiciones formales deben cumplir sus materiales, cómo deben ser publicados y utilizad<text:span text:style-name="T4">os en esas asignatura</text:span>s, y cómo se realizará el reconocimiento a sus autores. Dichas condic<text:span text:style-name="T4">iones deben cumplirse en el </text:span>momento de finalización del plazo de presentación de la solicitud a esta convocatoria. </text:p>
      <text:p text:style-name="Text_20_body">Las presentes Bases y su convocatoria se regirán por las Normas de Ejecución del Presupuesto de gasto de la URJC para 2022; <text:s/>por las Leyes 39 y 40/2015, de 1 octubre; por el Real Decreto 36/2020, de 30 de diciembre, por el que se aprueban medidas urgentes para la modernización de la Administración Pública y para la ejecución del Plan de Recuperación, Transformación y Resiliencia; por el Real Decreto 641/2021, de 27 de julio, por el que se regula la concesión directa de subvenciones a universidades públicas españolas para la modernización y digitalización del sistema universitario español en el marco del Plan de Recuperación, Transformación y Resiliencia y demás normativa general y autonómica concordante.</text:p>
      <text:p text:style-name="Text_20_body">La presentación en tiempo y forma de la solicitud por parte del interesado supone:</text:p>
      <text:p text:style-name="Text_20_body">a) Que acepta las presentes Bases y su convocatoria.</text:p>
      <text:p text:style-name="Text_20_body">b) Que todos los datos incorporados a la solicitud son ciertos.</text:p>
      <text:p text:style-name="Text_20_body">c) Que es conocedor de que cualquier inexactitud en los hechos declarados puede dar lugar a la exclusión definitiva del presente procedimiento.</text:p>
      <text:p text:style-name="Text_20_body">La presentación de la correspondiente solicitud por el interesado/a y posterior aceptación del incentivo concedido, conlleva la aceptación de las normas fijadas en las presentes Bases y su convocatoria así como el cumplimiento de los requisitos establecidos en ellas.</text:p>
      <text:list xml:id="list221853557559123" text:continue-numbering="true" text:style-name="WWNum3">
        <text:list-item>
          <text:h text:style-name="P3" text:outline-level="1"><text:soft-page-break/>2. Asignaturas</text:h>
        </text:list-item>
      </text:list>
      <text:p text:style-name="Text_20_body"><text:span text:style-name="T4">Las asignaturas presentadas en las solicitudes a esta convocatoria deben tener sus materiales visibles en Aula Virtual mediante enlaces a las versiones depositadas en los repositorios de acceso abierto de la Universidad, y cumplir las siguientes características:</text:span> </text:p>
      <text:list xml:id="list4171878862" text:style-name="WWNum5">
        <text:list-item>
          <text:p text:style-name="P16">La asignatura debe ser de docencia oficial en un grado o máster universitario de la Universidad Rey Juan Carlos correspondiente al curso 2022-2023. </text:p>
        </text:list-item>
        <text:list-item>
          <text:p text:style-name="P16">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text:p>
      <text:list xml:id="list221853415788159" text:continue-numbering="true" text:style-name="WWNum5">
        <text:list-item>
          <text:list>
            <text:list-item>
              <text:p text:style-name="P16">Guía de la asignatura, en formato libre</text:p>
            </text:list-item>
            <text:list-item>
              <text:p text:style-name="P16">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16">Presentaciones o transparencias de los temas de la asignatura</text:p>
            </text:list-item>
            <text:list-item>
              <text:p text:style-name="P16">Colecciones de ejercicios, problemas, trabajos o proyectos con o sin solución</text:p>
            </text:list-item>
            <text:list-item>
              <text:p text:style-name="P16">Colecciones de pruebas de evaluación con o sin solución</text:p>
            </text:list-item>
            <text:list-item>
              <text:p text:style-name="P16">Videos cortos (video-píldoras) y audios (podcasts), para facilitar el seguimiento de los temas de la asignatura</text:p>
            </text:list-item>
            <text:list-item>
              <text:p text:style-name="P16">Otros materiales que puedan ser relevantes, dadas las características específicas de la asignatura, como por ejemplo colecciones de programas de ordenador o colecciones de ilustraciones que se utilicen para complementar las explicaciones de una asignatura</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1561030025" text:style-name="WWNum4">
        <text:list-item>
          <text:p text:style-name="P17">Ha de estar actualizado para el curso académico al que se refiere esta convocatoria, y ser utilizado durante su impartición.</text:p>
        </text:list-item>
        <text:list-item>
          <text:p text:style-name="P17">Ha de estar licenciado con una<text:span text:style-name="T4"> de las licencias de publicación en acceso abierto </text:span>aprobadas por el Consejo de Publicación Abierta, con el consentimiento de todos sus autores (licencias Atribución<text:note text:id="ftn11"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11"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17"><text:soft-page-break/>Es necesario que el material tenga en cuenta las buenas prácticas que aseguren los derechos sobre los materiales que se publican en abierto.</text:p>
        </text:list-item>
        <text:list-item>
          <text:p text:style-name="P17">En el caso de materiales bibliográficos (apuntes, presentaciones o transparencias, colecciones de problemas, colecciones de exámenes), deben estar depositados en el Archivo Abierto Institucional de la URJC (BURJC Digital<text:note text:id="ftn11"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 por categoría<text:span text:style-name="T1">, </text:span>en formato PDF y en el formato fuente que se haya utilizado para su realización (como archivo anexo al documento). Para su realización, opcionalmente, se pueden utilizar las Plantillas para Materiales de Publicación Abierta de la URJC<text:note text:id="ftn11"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17">En el caso de v<text:span text:style-name="T12">í</text:span>deos y audios, deben estar todos depositados en la misma serie correspondiente a la asignatura en TV URJC<text:note text:id="ftn11" text:note-class="footnote"><text:note-citation>6</text:note-citation><text:note-body><text:p text:style-name="Footnote"><text:span text:style-name="T11">TV URJC: </text:span><text:a xlink:type="simple" xlink:href="https://tv.urjc.es/" text:style-name="Internet_20_link" text:visited-style-name="Visited_20_Internet_20_Link"><text:span text:style-name="Internet_20_link"><text:span text:style-name="T11">https://tv.urjc.es/</text:span></text:span></text:a></text:p></text:note-body></text:note> y publicados en la asignatura correspondiente según las instrucciones detalladas en el procedimiento de subida de materiales a TV URJC<text:note text:id="ftn11"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17">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Puede encontrarse información detallada sobre las condiciones y procedimientos relacionados con esta convocatoria, y con ayuda sobre cómo cumplirlos, en la Guía sobre reconocimiento de publicación de asignaturas en acceso abierto<text:note text:id="ftn11"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221852754330600" text:continue-list="list221853557559123" text:style-name="WWNum3">
        <text:list-item>
          <text:h text:style-name="P3" text:outline-level="1">3. Incentivos y efectos </text:h>
        </text:list-item>
      </text:list>
      <text:p text:style-name="Text_20_body">Como resultado del examen de la solicitud y de la documentación y los materiales aportados respecto a las asignaturas presentadas a esta convocatoria, éstas serán clasificadas, según proceda conforme baremo y requisitos descritos en esta convocatoria, en: </text:p>
      <text:list xml:id="list2229067587" text:style-name="WWNum11">
        <text:list-item>
          <text:p text:style-name="P18">“Asignaturas sin materiales significativos en acceso abierto”: aquellas que reciban una baremación inferior a 15. Estas asignaturas no causarán derecho a incentivo económico y recibirán indicaciones sobre cómo mejorar la publicación en acceso abierto de sus materiales.</text:p>
        </text:list-item>
        <text:list-item>
          <text:p text:style-name="P18">“Asignaturas en Acceso Abierto”: aquellas que reciban una baremación mínima de 15. Estas asignaturas causarán derecho a incentivo económico conforme cálculo de cuantía descrito en la presente Base. <text:s/></text:p>
        </text:list-item>
      </text:list>
      <text:list xml:id="list4024170670" text:style-name="WWNum8">
        <text:list-item>
          <text:p text:style-name="P19">“Asignaturas Destacadamente en Acceso Abierto”: aquellas que reciban la mejor baremación dentro de la categoría “Asignaturas en acceso abierto” a partir del umbral mínimo que se establezca por la Comisión de Asignaturas en abierto. </text:p>
        </text:list-item>
      </text:list>
      <text:p text:style-name="Text_20_body"><text:s/></text:p>
      <text:p text:style-name="Text_20_body"><text:soft-page-break/>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que acredite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clasificación como “Asignatura en Acceso Abierto” o “Asignatura Destacadamente en Acceso Abierto” de las asignaturas dará derecho a un incentivo económico a los docentes autores de sus materiales en acceso abierto y que participen en su impartición. Este incentivo se calculará del siguiente modo: </text:p>
      <text:list xml:id="list1702032551" text:style-name="WWNum10">
        <text:list-item>
          <text:p text:style-name="P20">Cada docente con derecho a incentivo económico generará un número de créditos por asignatura, el cual se obtendrá a partir del resultado de dividir a partes iguales entre los beneficiarios de la asignatura el número de créditos ECTS que corresponden a la misma. </text:p>
        </text:list-item>
      </text:list>
      <text:p text:style-name="P21">Se entiende por “beneficiario de la asignatura” quien participe en su impartición (según el Plan de Ordenación Docente correspondiente) y resulte autor de alguno de los materiales presentados que cumplan las condiciones especificadas en la presente convocatoria para obtener beneficio económico. </text:p>
      <text:list xml:id="list221852214239780" text:continue-numbering="true" text:style-name="WWNum10">
        <text:list-item>
          <text:p text:style-name="P20">La cuantía económica del incentivo generado se obtendrá multiplicando el número de créditos que corresponden por asignatura al docente (conforme cálculo expuesto en apartado a. anterior) por las siguientes variables: </text:p>
        </text:list-item>
      </text:list>
      <text:list xml:id="list3860712241" text:style-name="WWNum9">
        <text:list-item>
          <text:p text:style-name="P22">Por la baremación obtenida por la asignatura conforme rúbrica contenida en el Anexo II</text:p>
        </text:list-item>
        <text:list-item>
          <text:p text:style-name="P22">Por la puntuación que corresponda por crédito y por punto de baremación, la cual se obtendrá a partir del cálculo que efectúe la Comisión de Asignaturas en Abierto como resultado de dividir el crédito inicial a repartir (48.000 euros por cuatrimestre) entre el total de puntos y créditos obtenidos por aquellas solicitudes con baremación mínima de 15 puntos. <text:s/></text:p>
        </text:list-item>
      </text:list>
      <text:p text:style-name="Text_20_body">La cuantía máxima a percibir por docente será de 1.500 euros, con independencia del número de asignaturas que presenten y sean valoradas. <text:s text:c="2"/></text:p>
      <text:p text:style-name="Text_20_body">La dotación global de los fondos para el curso 2022/23 ascenderá a 96.000 euros (48.000 euros por cuatrimestre) que será satisfecha con cargo al presupuesto 30NTUD06.422C 226.08 de la partida Unidigital. La dotación de fondos podrá ser ampliada a propuesta de la Comisión de Asignaturas en Abierto si el número de asignaturas clasificadas en las categorías “Asignatura en Acceso Abierto” y “Asignatura Destacadamente en Acceso Abierto” por cuatrimestre es mayor a 80, según resulte de la valoración que lleve a cabo dicha Comisión. </text:p>
      <text:p text:style-name="Text_20_body">El procedimiento de ejecución del crédito asignado a la presente convocatoria se ajustará a la misma y a lo dispuesto en las Normas de Ejecución del Presupuesto de la Universidad Rey Juan Carlos para el año 2022. La cuantía económica correspondiente a este incentivo no será consolidable, y se recibirá en un único pago abonado mediante transferencia, previa realización de la correspondiente retención del IRPF.</text:p>
      <text:p text:style-name="Text_20_body">Las asignaturas que sean clasificadas como “Destacadamente en Acceso Abierto” también darán derecho a los docentes autores de materiales en acceso abierto de esas asignaturas, y que participen en su impartición, a <text:soft-page-break/>impartirlas durante los tres cursos académicos siguientes, siempre que 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221852121974594" text:continue-list="list221852754330600" text:style-name="WWNum3">
        <text:list-item>
          <text:h text:style-name="P3" text:outline-level="1">4. Clasificación de las propuestas</text:h>
        </text:list-item>
      </text:list>
      <text:p text:style-name="Text_20_body">El estudio inicial de las propuestas presentadas y su preparación a efectos de clasificación se llevará a cabo por el Vicerrectorado de Extensión Universitaria asistido por el personal adscrito al mismo junto a los Coordinadores o Coordinadoras de la Oficina de Conocimiento y Cultura Libres, de Software Libre y de Cultura Libre de la Universidad y personal del Centro de Innovación Docente y Educación Digital de la Universidad, atendiendo a los criterios establecidos en la rúbrica del Anexo III.</text:p>
      <text:p text:style-name="Text_20_body">Los resultados de esta valoración inicial serán elevados a la Comisión de Asignaturas en Abierto de la Universidad Rey Juan Carlos, la cual decidirá la clasificación de las solicitudes en las tres categorías mencionadas anteriormente, y su financiación si procede. Esta Comisión está integrada por:</text:p>
      <text:list xml:id="list3730127634" text:style-name="WWNum7">
        <text:list-item>
          <text:p text:style-name="P23">El Vicerrector o la Vicerrectora, o persona en quien delegue, con competencias en materia de Publicación en Acceso Abierto, que la presidirá.</text:p>
        </text:list-item>
        <text:list-item>
          <text:p text:style-name="P23">El Vicerrector o la Vicerrectora, o persona en quien delegue, con competencias en materia de Ordenación Académica.</text:p>
        </text:list-item>
        <text:list-item>
          <text:p text:style-name="P23">El Vicerrector o la Vicerrectora, o persona en quien delegue, con competencias en materia de Transformación Digital.</text:p>
        </text:list-item>
        <text:list-item>
          <text:p text:style-name="P23">El Director Académico o la Directora Académica del Centro de Innovación Docente y Educación Digital (CIED), o persona en quien delegue.</text:p>
        </text:list-item>
        <text:list-item>
          <text:p text:style-name="P23">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de la Comisión de Asignaturas en Abierto, se estará a la Ley 39/2015, de 1 de octubre, de Procedimiento Administrativo Común de las Administraciones Públicas y a la Ley 40/2015, de 1 de octubre, de Régimen Jurídico del Sector Público.</text:p>
      <text:list xml:id="list221852231124340" text:continue-list="list221852121974594" text:style-name="WWNum3">
        <text:list-item>
          <text:h text:style-name="P3"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Text_20_body"><text:span text:style-name="T13">5.1. Consideraciones previas y presentación de solicitudes</text:span></text:p>
      <text:p text:style-name="Text_20_body">Previamente al envío de la solicitud, deben asegurarse que las asignaturas presentadas constan de todos los materiales necesarios para su impartición (independientemente del semestre en el que se den), y que los <text:soft-page-break/>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text:span text:style-name="T15">grupo</text:span> <text:s/>actas correspondiente para el curso 2022/2023. Para ello rellenará por cada asignatura a solicitar un formulario que incluirá al menos los datos descritos en el Anexo II de esta convocatoria. El procedimiento de entrega, incluido el enlace a dicho formulario estarán disponibles en la Guía sobre reconocimiento de publicación de asignaturas en acceso abierto<text:note text:id="ftn11"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text:p>
      <text:p text:style-name="Text_20_body">En la solicitud deberá indicar todos aquellos docentes que figuren como autores de los materiales publicados en abierto en la asignatura, indicando aquellos que pertenecen a la URJC y los que no, en el caso que los hubiera. Al enviar el formulario, el responsable de <text:span text:style-name="T15">grupo de</text:span> actas asegurará, mediante declaración responsable que la información que incluye en él es cierta, que efectivamente los autores indicados tienen los derechos correspondientes para la publicación de los materiales en abierto de la asignatura que indica, y que todos los docentes que imparten en la asignatura están informados y de acuerdo con que realice la solicitud en esos términos. Asimismo, deberá asegurar de que ha informado a dichos docentes de la política de tratamiento de datos personales de la presente convocatoria.</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el cual dejará constancia del momento de entrega), y hacer así efectiva la solicitud para una asignatura, es el día 30 de septiembre de 2022 a las 23:59 para asignaturas que se impartan durante el primer cuatrimestre, y el 20 de enero de 2023 a la misma hora para asignaturas que se impartan durante el segundo cuatrimestre.</text:p>
      <text:p text:style-name="Text_20_body"><text:span text:style-name="T13">5.2 Publicación de listas provisionales de solicitudes admitidas y excluidas</text:span></text:p>
      <text:p text:style-name="Text_20_body">Finalizado el plazo para la presentación de solicitudes, la Vicerrectora de Extensión Universitaria, u órgano que asuma sus competencias, examinará las solicitudes, y hará público en el tablón de anuncios electrónico de la URJC la resolución por la que se proceda a la publicación de las solicitudes admitidas a trámite y las excluidas provisionalmente, junto con las causas de exclusión, concediendo un plazo de 10 días hábiles para la subsanación.</text:p>
      <text:p text:style-name="Text_20_body"><text:span text:style-name="T13">5.3 Subsanación de errores y publicación de listas definitivas</text:span></text:p>
      <text:p text:style-name="Text_20_body">Tras la revisión de la documentación aportada dentro del plazo de subsanación señalado en el punto anterior, se publicará, mediante Resolución de la Vicerrectora de Extensión Universitaria, u órgano que asuma sus competencias, el listado definitivo con las solicitudes admitidas y excluidas, por los mismos medios antes indicados.</text:p>
      <text:p text:style-name="Text_20_body"><text:span text:style-name="T13">5.4 Presentación de recursos a las listas definitivas</text:span></text:p>
      <text:p text:style-name="Text_20_body">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text:soft-page-break/>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Text_20_body"><text:span text:style-name="T13">5.5 Valoración de propuestas y publicación de resolución provisional</text:span></text:p>
      <text:p text:style-name="Text_20_body">Las propuestas serán clasificadas, según se ha especificado, y los resultados de la valor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publicará la resolución provisional de las asignaturas concedidas en abierto y la financiación correspondiente del profesorado, en el tablón de anuncios electrónico de la URJC.</text:p>
      <text:p text:style-name="Text_20_body"><text:span text:style-name="T13">5.6 Presentación de reclamaciones a la resolución provisional y publicación de resolución definitiva</text:span></text:p>
      <text:p text:style-name="Text_20_body">Seguidamente, se abrirá un proceso de reclamación concediendo un plazo de 10 días hábiles. 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Text_20_body"><text:span text:style-name="T13">5.7 Presentación de reclamaciones a la resolución definitiva</text:span></text:p>
      <text:p text:style-name="Text_20_body">Contra la resolución definitiva, el solicitante podrá presentar recurso de alzada ante el Rector en los términos indicados en el punto 5.4.</text:p>
      <text:list xml:id="list221853284732147" text:continue-numbering="true" text:style-name="WWNum3">
        <text:list-item>
          <text:h text:style-name="P3" text:outline-level="1">6. Tratamiento de datos de carácter personal</text:h>
        </text:list-item>
      </text:list>
      <text:p text:style-name="P6"/>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Text_20_body"><text:span text:style-name="T13">6.1 Responsable del tratamiento</text:span></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Text_20_body"><text:span text:style-name="T13">6.2. Finalidad y legitimación del tratamiento</text:span></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4174596270" text:style-name="WWNum2">
        <text:list-item>
          <text:p text:style-name="P24">Recogida de datos mediante solicitud.</text:p>
        </text:list-item>
        <text:list-item>
          <text:p text:style-name="P24">Las publicaciones realizadas con efectos de notificación de acuerdo con las normas del procedimiento administrativo común. </text:p>
        </text:list-item>
        <text:list-item>
          <text:p text:style-name="P24"><text:soft-page-break/>Las publicaciones realizadas, en su caso, en el portal de transparencia exigibles por la normativa de transparencia.</text:p>
        </text:list-item>
      </text:list>
      <text:p text:style-name="Text_20_body"><text:span text:style-name="T13">6.3. Comprobación de la veracidad de los datos</text:span></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Text_20_body"><text:span text:style-name="T13">6.4. Comunicación de datos</text:span></text:p>
      <text:p text:style-name="Text_20_body">Los datos personales no serán cedidos a terceros salvo en aquellos casos que exista una obligación legal.</text:p>
      <text:p text:style-name="Text_20_body"><text:span text:style-name="T13">6.5. Conservación de los datos</text:span></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Text_20_body"><text:span text:style-name="T13">6.6. Ejercicio de derechos por los interesados</text:span></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1"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Text_20_body"><text:span text:style-name="T13">6.7. Información por el solicitante al resto de interesados</text:span></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p>
      <text:list xml:id="list4052908032" text:style-name="WWNum1">
        <text:list-item>
          <text:list>
            <text:list-item>
              <text:h text:style-name="P5" text:outline-level="2">7. Disposición adicional</text:h>
            </text:list-item>
          </text:list>
        </text:list-item>
      </text:list>
      <text:p text:style-name="P7"><text:span text:style-name="T14">Las presentes Bases producirán efectos a partir de su publicación en el tablón electrónico oficial de la URJC.</text:span></text:p>
      <text:p text:style-name="Text_20_body"/>
      <text:list xml:id="list221853309877519" text:continue-list="list221853284732147" text:style-name="WWNum3">
        <text:list-item>
          <text:h text:style-name="P3" text:outline-level="1">8. Recursos</text:h>
        </text:list-item>
      </text:list>
      <text:p text:style-name="Text_20_body">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p>
      <text:list xml:id="list221853803792564" text:continue-numbering="true" text:style-name="WWNum3">
        <text:list-item>
          <text:h text:style-name="P4" text:outline-level="1">ANEXO II: Formulario de solicitud</text:h>
        </text:list-item>
      </text:list>
      <text:p text:style-name="Text_20_body">Constará de los siguientes campos:</text:p>
      <text:list xml:id="list3208040860" text:style-name="WWNum6">
        <text:list-item>
          <text:p text:style-name="P25">Nombre del docente</text:p>
        </text:list-item>
        <text:list-item>
          <text:p text:style-name="P25">Dirección de correo electrónico corporativa de la URJC</text:p>
        </text:list-item>
        <text:list-item>
          <text:p text:style-name="P25">Para cada asignatura que se aporte:</text:p>
          <text:list>
            <text:list-item>
              <text:p text:style-name="P25">Nombre de la asignatura</text:p>
            </text:list-item>
            <text:list-item>
              <text:p text:style-name="P25">Titulación </text:p>
            </text:list-item>
            <text:list-item>
              <text:p text:style-name="P25">Titulaciones y asignaturas que podrían utilizar de forma directa los mismos materiales </text:p>
            </text:list-item>
            <text:list-item>
              <text:p text:style-name="P25">Identificador de la asignatura en el Aula Virtual de la URJC (URL directa de la asignatura)</text:p>
            </text:list-item>
            <text:list-item>
              <text:p text:style-name="P25">Listado de docentes que han participado en la elaboración de los materiales (direcciones de correo electrónico corporativo de la URJC)</text:p>
            </text:list-item>
            <text:list-item>
              <text:p text:style-name="P25">Listado de docentes que imparten la asignatura en el curso 2022/2023 (direcciones de correo electrónico corporativo de la URJC)</text:p>
            </text:list-item>
            <text:list-item>
              <text:p text:style-name="P25">Créditos ECTS de la asignatura</text:p>
            </text:list-item>
            <text:list-item>
              <text:p text:style-name="P25">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25">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text:p>
            </text:list-item>
          </text:list>
        </text:list-item>
      </text:list>
      <text:p text:style-name="Text_20_body">Así mismo, incluirá la siguiente información relativa al tratamiento de datos personales:</text:p>
      <text:p text:style-name="Text_20_body"><text:span text:style-name="T3">“En cumplimiento de la normativa sobre protección de datos se le informa de lo siguiente:</text:span></text:p>
      <text:p text:style-name="Text_20_body"><text:span text:style-name="T3">RESPONSABLE DEL TRATAMIENTO: Universidad Rey Juan Carlos</text:span></text:p>
      <text:p text:style-name="Text_20_body"><text:span text:style-name="T3">FINALIDAD: Gestión de la convocatoria de reconocimiento de publicación de asignaturas en abierto.</text:span></text:p>
      <text:p text:style-name="Text_20_body"><text:span text:style-name="T3">EJERCICIO DE DERECHOS: Puede ejercer sus derechos de acceso, rectificación, supresión, limitación del tratamiento, portabilidad, oposición y demás reconocidos por el Reglamento General de Protección de Datos, mediante solicitud dirigida a la Universidad Rey Juan Carlos, C/ Tulipán s/n, 28933 Móstoles, por registro o en su sede electrónica o contactando con: protecciondedatos@urjc.es</text:span></text:p>
      <text:p text:style-name="Text_20_body"><text:span text:style-name="T3">MÁS INFORMACIÓN EN LA CONVOCATORIA”</text:span></text:p>
      <text:p text:style-name="P26"/>
      <text:p text:style-name="Standard"/>
      <text:list xml:id="list221852187612913" text:continue-list="list221853803792564" text:style-name="WWNum3">
        <text:list-item>
          <text:h text:style-name="P4" text:outline-level="1">ANEXO III: Rúbrica de evaluación</text:h>
        </text:list-item>
      </text:list>
      <text:p text:style-name="Text_20_body">Cada categoría de material será evaluada con la rúbrica correspondiente, según se indica a continuación para cada una de las categorías del listado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Para valorar una asignatura se valorarán por separado los materiales presentados a cada una de las categorías. La valoración total de la asignatura será la suma aritmética de las cuatro categorías con valoración individual más alta.</text:p>
      <text:p text:style-name="Text_20_body">Rúbrica para la categoría “guía de la asignatur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text:span text:style-name="T6">0</text:span></text:p>
          </table:table-cell>
          <table:table-cell table:style-name="Table1.A1" office:value-type="string">
            <text:p text:style-name="P10"><text:span text:style-name="T6">1</text:span></text:p>
          </table:table-cell>
          <table:table-cell table:style-name="Table1.A1" office:value-type="string">
            <text:p text:style-name="P10"><text:span text:style-name="T6">2</text:span></text:p>
          </table:table-cell>
          <table:table-cell table:style-name="Table1.A1" office:value-type="string">
            <text:p text:style-name="P10"><text:span text:style-name="T6">3</text:span></text:p>
          </table:table-cell>
          <table:table-cell table:style-name="Table1.E1" office:value-type="string">
            <text:p text:style-name="P10"><text:span text:style-name="T6">4</text:span></text:p>
          </table:table-cell>
        </table:table-row>
        <table:table-row table:style-name="Table1.1">
          <table:table-cell table:style-name="Table1.A2" office:value-type="string">
            <text:p text:style-name="P9"><text:span text:style-name="T6">No presenta, no cumple los criterios de la convocatoria, o no llega al mínimo para ser puntuado</text:span></text:p>
          </table:table-cell>
          <table:table-cell table:style-name="Table1.A2" office:value-type="string">
            <text:p text:style-name="P10"><text:span text:style-name="T6">Incluye un calendario con el plan docente detallado para todas las sesiones del curso académico, indicando al menos los temas cubiertos cada sesión</text:span></text:p>
          </table:table-cell>
          <table:table-cell table:style-name="Table1.A2" office:value-type="string">
            <text:p text:style-name="P10"><text:span text:style-name="T6">Detalla también, para cada sesión, el listado detallado de materiales utilizados, y una breve descripción del tema cubierto y los objetivos de aprendizaje asociados</text:span></text:p>
          </table:table-cell>
          <table:table-cell table:style-name="Table1.A2" office:value-type="string">
            <text:p text:style-name="P10"><text:span text:style-name="T6">Detalla además, para cada sesión, el trabajo personal y otras actividades planificadas para los estudiantes</text:span></text:p>
          </table:table-cell>
          <table:table-cell table:style-name="Table1.E2" office:value-type="string">
            <text:p text:style-name="P10"><text:span text:style-name="T6">Incluye además otros elementos y detalles que ayuden al seguimiento de la asignatura.</text:span></text:p>
          </table:table-cell>
        </table:table-row>
      </table:table>
      <text:p text:style-name="Table"><text:span text:style-name="Caption_20_characters"/></text:p>
      <text:p text:style-name="Text_20_body">Rúbrica para las categorías “apuntes” y “presentaciones o transparencias”:</text:p>
      <table:table table:name="Table2" table:style-name="Table2">
        <table:table-column table:style-name="Table2.A" table:number-columns-repeated="3"/>
        <table:table-column table:style-name="Table2.D"/>
        <table:table-column table:style-name="Table2.E"/>
        <table:table-column table:style-name="Table2.F"/>
        <table:table-row table:style-name="Table2.1">
          <table:table-cell table:style-name="Table2.A1" office:value-type="string">
            <text:p text:style-name="P9"><text:span text:style-name="T6">0</text:span></text:p>
          </table:table-cell>
          <table:table-cell table:style-name="Table2.A1" office:value-type="string">
            <text:p text:style-name="P10"><text:span text:style-name="T6">1</text:span></text:p>
          </table:table-cell>
          <table:table-cell table:style-name="Table2.A1" office:value-type="string">
            <text:p text:style-name="P10"><text:span text:style-name="T6">3</text:span></text:p>
          </table:table-cell>
          <table:table-cell table:style-name="Table2.A1" office:value-type="string">
            <text:p text:style-name="P10"><text:span text:style-name="T6">5</text:span></text:p>
          </table:table-cell>
          <table:table-cell table:style-name="Table2.A1" office:value-type="string">
            <text:p text:style-name="P10"><text:span text:style-name="T6">8</text:span></text:p>
          </table:table-cell>
          <table:table-cell table:style-name="Table2.F1" office:value-type="string">
            <text:p text:style-name="P10"><text:span text:style-name="T6">14</text:span></text:p>
          </table:table-cell>
        </table:table-row>
        <table:table-row table:style-name="Table2.1">
          <table:table-cell table:style-name="Table2.A2" office:value-type="string">
            <text:p text:style-name="P9"><text:span text:style-name="T6">No presenta, no cumple los criterios de la convocatoria, o no llega al mínimo para ser puntuado</text:span></text:p>
          </table:table-cell>
          <table:table-cell table:style-name="Table2.A2" office:value-type="string">
            <text:p text:style-name="P10"><text:span text:style-name="T6">Cubre al menos un 30% del temario de la asignatura</text:span></text:p>
          </table:table-cell>
          <table:table-cell table:style-name="Table2.A2" office:value-type="string">
            <text:p text:style-name="P10"><text:span text:style-name="T6">Cubre al menos un 60% del temario de la asignatura, o al menos un 30% con un nivel de detalle alto</text:span></text:p>
          </table:table-cell>
          <table:table-cell table:style-name="Table2.A2" office:value-type="string">
            <text:p text:style-name="P10"><text:span text:style-name="T6">Cubre al menos un 90% del temario de la asignatura, o al menos un 60% con un nivel de detalle alto</text:span></text:p>
          </table:table-cell>
          <table:table-cell table:style-name="Table2.A2" office:value-type="string">
            <text:p text:style-name="P10"><text:span text:style-name="T6">Cubre al menos un 90% del temario de la asignatura, con un nivel de detalle alto</text:span></text:p>
          </table:table-cell>
          <table:table-cell table:style-name="Table2.F2" office:value-type="string">
            <text:p text:style-name="P10"><text:span text:style-name="T6">Cubre la asignatura de foram pr</text:span><text:span text:style-name="T7">ácticamente</text:span><text:span text:style-name="T6"> completa y destaca en el nivel de detalle</text:span></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number-columns-repeated="3"/>
        <table:table-column table:style-name="Table3.D"/>
        <table:table-column table:style-name="Table3.E"/>
        <table:table-column table:style-name="Table3.F"/>
        <table:table-row table:style-name="Table3.1">
          <table:table-cell table:style-name="Table3.A1" office:value-type="string">
            <text:p text:style-name="P9"><text:span text:style-name="T6">0</text:span></text:p>
          </table:table-cell>
          <table:table-cell table:style-name="Table3.A1" office:value-type="string">
            <text:p text:style-name="P10"><text:span text:style-name="T6">1</text:span></text:p>
          </table:table-cell>
          <table:table-cell table:style-name="Table3.A1" office:value-type="string">
            <text:p text:style-name="P10"><text:span text:style-name="T6">3</text:span></text:p>
          </table:table-cell>
          <table:table-cell table:style-name="Table3.A1" office:value-type="string">
            <text:p text:style-name="P10"><text:span text:style-name="T6">5</text:span></text:p>
          </table:table-cell>
          <table:table-cell table:style-name="Table3.A1" office:value-type="string">
            <text:p text:style-name="P10"><text:span text:style-name="T6">8</text:span></text:p>
          </table:table-cell>
          <table:table-cell table:style-name="Table3.F1" office:value-type="string">
            <text:p text:style-name="P10"><text:span text:style-name="T6">14</text:span></text:p>
          </table:table-cell>
        </table:table-row>
        <table:table-row table:style-name="Table3.1">
          <table:table-cell table:style-name="Table3.A2" office:value-type="string">
            <text:p text:style-name="P9"><text:span text:style-name="T6">No presenta, no cumple los criterios de la convocatoria, o no llega al mínimo para ser puntuado</text:span></text:p>
          </table:table-cell>
          <table:table-cell table:style-name="Table3.A2" office:value-type="string">
            <text:p text:style-name="P10"><text:span text:style-name="T6">Cubre al menos un 30% del temario de la asignatura</text:span></text:p>
          </table:table-cell>
          <table:table-cell table:style-name="Table3.A2" office:value-type="string">
            <text:p text:style-name="P10"><text:span text:style-name="T6">Cubre al menos un 60% del temario de la asignatura, o al menos un 30% con soluciones</text:span></text:p>
          </table:table-cell>
          <table:table-cell table:style-name="Table3.A2" office:value-type="string">
            <text:p text:style-name="P10"><text:span text:style-name="T6">Cubre al menos un 90% del temario de la asignatura, o al menos un 60% con soluciones</text:span></text:p>
          </table:table-cell>
          <table:table-cell table:style-name="Table3.A2" office:value-type="string">
            <text:p text:style-name="P10"><text:span text:style-name="T6">Cubre al menos un 90% del temario de la asignatura, con soluciones</text:span></text:p>
          </table:table-cell>
          <table:table-cell table:style-name="Table3.F2" office:value-type="string">
            <text:p text:style-name="P10"><text:span text:style-name="T6">Cubre la asignatura de foram pr</text:span><text:span text:style-name="T7">ácticamente <text:s/></text:span><text:span text:style-name="T6">completa y destaca en el nivel de detalle</text:span></text:p>
          </table:table-cell>
        </table:table-row>
      </table:table>
      <text:p text:style-name="Text_20_body"/>
      <text:p text:style-name="Text_20_body">Rúbrica para la categoría “videos cortos (video-píldoras) y audios (podcasts)”. Se considerarán como videos cortos los que son de menos de 10 minutos, como audios los de cualquier duración, y en cualquier caso, los que están concebidos para explicar un tema concreto relevante para la asignatura:</text:p>
      <table:table table:name="Table4" table:style-name="Table4">
        <table:table-column table:style-name="Table4.A" table:number-columns-repeated="3"/>
        <table:table-column table:style-name="Table4.D"/>
        <table:table-column table:style-name="Table4.E"/>
        <table:table-column table:style-name="Table4.F"/>
        <text:soft-page-break/>
        <table:table-row table:style-name="Table4.1">
          <table:table-cell table:style-name="Table4.A1" office:value-type="string">
            <text:p text:style-name="P9"><text:span text:style-name="T6">0</text:span></text:p>
          </table:table-cell>
          <table:table-cell table:style-name="Table4.A1" office:value-type="string">
            <text:p text:style-name="P10"><text:span text:style-name="T6">1</text:span></text:p>
          </table:table-cell>
          <table:table-cell table:style-name="Table4.A1" office:value-type="string">
            <text:p text:style-name="P10"><text:span text:style-name="T6">3</text:span></text:p>
          </table:table-cell>
          <table:table-cell table:style-name="Table4.A1" office:value-type="string">
            <text:p text:style-name="P10"><text:span text:style-name="T6">5</text:span></text:p>
          </table:table-cell>
          <table:table-cell table:style-name="Table4.A1" office:value-type="string">
            <text:p text:style-name="P10"><text:span text:style-name="T6">8</text:span></text:p>
          </table:table-cell>
          <table:table-cell table:style-name="Table4.F1" office:value-type="string">
            <text:p text:style-name="P10"><text:span text:style-name="T6">14</text:span></text:p>
          </table:table-cell>
        </table:table-row>
        <table:table-row table:style-name="Table4.1">
          <table:table-cell table:style-name="Table4.A2" office:value-type="string">
            <text:p text:style-name="P9"><text:span text:style-name="T6">No presenta, no cumple los criterios de la convocatoria, o no llega al mínimo para ser puntuado</text:span></text:p>
          </table:table-cell>
          <table:table-cell table:style-name="Table4.A2" office:value-type="string">
            <text:p text:style-name="P10"><text:span text:style-name="T6">Incluye al menos un video corto de presentación de la asignatura</text:span></text:p>
          </table:table-cell>
          <table:table-cell table:style-name="Table4.A2" office:value-type="string">
            <text:p text:style-name="P10"><text:span text:style-name="T6">Incluye al menos 5 videos cortos o audios de temas diferentes de la asignatura, o videos de otros tamaños que cubran al menos el 50% del temario de la asignatura</text:span></text:p>
          </table:table-cell>
          <table:table-cell table:style-name="Table4.A2" office:value-type="string">
            <text:p text:style-name="P10"><text:span text:style-name="T6">Incluye al menos 12 videos cortos o audios, cubriendo temas de al menos el 50% del temario de la asignatura, o videos de otros tamaños que cubran al menos el 90% del temario de la asignatura</text:span></text:p>
          </table:table-cell>
          <table:table-cell table:style-name="Table4.A2" office:value-type="string">
            <text:p text:style-name="P10"><text:span text:style-name="T6">Incluye al menos 20 videos cortos o audios, cubriendo temas de al menos el 90% del temario de la asignatura</text:span></text:p>
          </table:table-cell>
          <table:table-cell table:style-name="Table4.F2" office:value-type="string">
            <text:p text:style-name="P10"><text:span text:style-name="T6">Cubre la asignatura de foram pr</text:span><text:span text:style-name="T7">ácticamente</text:span><text:span text:style-name="T6"> completa y destaca en el nivel de detalle</text:span></text:p>
          </table:table-cell>
        </table:table-row>
      </table:table>
      <text:p text:style-name="P27"/>
      <text:p text:style-name="Text_20_body">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number-columns-repeated="3"/>
        <table:table-column table:style-name="Table5.D"/>
        <table:table-column table:style-name="Table5.E"/>
        <table:table-column table:style-name="Table5.F"/>
        <table:table-row table:style-name="Table5.1">
          <table:table-cell table:style-name="Table5.A1" office:value-type="string">
            <text:p text:style-name="P9"><text:span text:style-name="T6">0</text:span></text:p>
          </table:table-cell>
          <table:table-cell table:style-name="Table5.A1" office:value-type="string">
            <text:p text:style-name="P10"><text:span text:style-name="T6">1</text:span></text:p>
          </table:table-cell>
          <table:table-cell table:style-name="Table5.A1" office:value-type="string">
            <text:p text:style-name="P10"><text:span text:style-name="T6">3</text:span></text:p>
          </table:table-cell>
          <table:table-cell table:style-name="Table5.A1" office:value-type="string">
            <text:p text:style-name="P10"><text:span text:style-name="T6">5</text:span></text:p>
          </table:table-cell>
          <table:table-cell table:style-name="Table5.A1" office:value-type="string">
            <text:p text:style-name="P10"><text:span text:style-name="T6">8</text:span></text:p>
          </table:table-cell>
          <table:table-cell table:style-name="Table5.F1" office:value-type="string">
            <text:p text:style-name="P10"><text:span text:style-name="T6">14</text:span></text:p>
          </table:table-cell>
        </table:table-row>
        <table:table-row table:style-name="Table5.1">
          <table:table-cell table:style-name="Table5.A2" office:value-type="string">
            <text:p text:style-name="P9"><text:span text:style-name="T6">No presenta, no cumple los criterios de la convocatoria, o no llega al mínimo para ser puntuado</text:span></text:p>
          </table:table-cell>
          <table:table-cell table:style-name="Table5.A2" office:value-type="string">
            <text:p text:style-name="P10"><text:span text:style-name="T6">Cubre al menos un 30% del temario de la asignatura</text:span></text:p>
          </table:table-cell>
          <table:table-cell table:style-name="Table5.A2" office:value-type="string">
            <text:p text:style-name="P10"><text:span text:style-name="T6">Cubre al menos un 60% del temario de la asignatura, o al menos un 30% con un nivel de detalle alto</text:span></text:p>
          </table:table-cell>
          <table:table-cell table:style-name="Table5.A2" office:value-type="string">
            <text:p text:style-name="P10"><text:span text:style-name="T6">Cubre al menos un 90% del temario de la asignatura, o al menos un 60% con un nivel de detalle alto</text:span></text:p>
          </table:table-cell>
          <table:table-cell table:style-name="Table5.A2" office:value-type="string">
            <text:p text:style-name="P10"><text:span text:style-name="T6">Cubre al menos un 90% del temario de la asignatura, con un nivel de detalle alto</text:span></text:p>
          </table:table-cell>
          <table:table-cell table:style-name="Table5.F2" office:value-type="string">
            <text:p text:style-name="P10"><text:span text:style-name="T6">Cubre la asignatura de foram pr</text:span><text:span text:style-name="T7">ácticamente </text:span><text:span text:style-name="T6">completa y destaca en el nivel de detalle</text:span></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9pt" fo:language="es" fo:country="ES" style:letter-kerning="true" style:font-name-asian="AR PL KaitiM GB" style:font-family-asian="'AR PL KaitiM GB'" style:font-family-generic-asian="system" style:font-pitch-asian="variable" style:font-size-asian="9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3" style:list-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true" style:font-name-asian="AR PL KaitiM GB" style:font-family-asian="'AR PL KaitiM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Liberation Serif1"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
        <style:list-level-properties text:list-level-position-and-space-mode="label-alignment">
          <style:list-level-label-alignment text:label-followed-by="nothing"/>
        </style:list-level-properties>
      </text:list-level-style-number>
      <text:list-level-style-number text:level="2" text:style-name="ListLabel_20_101" style:num-format="">
        <style:list-level-properties text:list-level-position-and-space-mode="label-alignment">
          <style:list-level-label-alignment text:label-followed-by="nothing"/>
        </style:list-level-properties>
      </text:list-level-style-number>
      <text:list-level-style-number text:level="3" text:style-name="ListLabel_20_102" style:num-format="">
        <style:list-level-properties text:list-level-position-and-space-mode="label-alignment">
          <style:list-level-label-alignment text:label-followed-by="nothing"/>
        </style:list-level-properties>
      </text:list-level-style-number>
      <text:list-level-style-number text:level="4" text:style-name="ListLabel_20_103" style:num-format="">
        <style:list-level-properties text:list-level-position-and-space-mode="label-alignment">
          <style:list-level-label-alignment text:label-followed-by="nothing"/>
        </style:list-level-properties>
      </text:list-level-style-number>
      <text:list-level-style-number text:level="5" text:style-name="ListLabel_20_104" style:num-format="">
        <style:list-level-properties text:list-level-position-and-space-mode="label-alignment">
          <style:list-level-label-alignment text:label-followed-by="nothing"/>
        </style:list-level-properties>
      </text:list-level-style-number>
      <text:list-level-style-number text:level="6" text:style-name="ListLabel_20_105" style:num-format="">
        <style:list-level-properties text:list-level-position-and-space-mode="label-alignment">
          <style:list-level-label-alignment text:label-followed-by="nothing"/>
        </style:list-level-properties>
      </text:list-level-style-number>
      <text:list-level-style-number text:level="7" text:style-name="ListLabel_20_106" style:num-format="">
        <style:list-level-properties text:list-level-position-and-space-mode="label-alignment">
          <style:list-level-label-alignment text:label-followed-by="nothing"/>
        </style:list-level-properties>
      </text:list-level-style-number>
      <text:list-level-style-number text:level="8" text:style-name="ListLabel_20_107" style:num-format="">
        <style:list-level-properties text:list-level-position-and-space-mode="label-alignment">
          <style:list-level-label-alignment text:label-followed-by="nothing"/>
        </style:list-level-properties>
      </text:list-level-style-number>
      <text:list-level-style-number text:level="9" text:style-name="ListLabel_20_10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8.2681in" fo:page-height="11.6929in" style:num-format="1" style:print-orientation="portrait" fo:margin-top="1.1756in" fo:margin-bottom="0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11in" fo:margin-left="0in" fo:margin-right="0in" fo:margin-bottom="0.3425in" style:dynamic-spacing="true"/>
      </style:header-style>
      <style:footer-style>
        <style:header-footer-properties fo:min-height="0.628in" fo:margin-left="0in" fo:margin-right="0in" fo:margin-top="0.5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RJC. Convocatoria para el reconocimiento de publicación de asignaturas en acceso abierto 2022-2023<text:tab/><text:page-number text:select-page="current">14</text:page-number>/<text:page-count>14</text:page-count></text:p>
      </style:header>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7:00</meta:creation-date>
    <meta:initial-creator>Jesus Gonzalez-Barahona</meta:initial-creator>
    <dc:language>es-ES</dc:language>
    <dc:creator>Jesus Gonzalez-Barahona</dc:creator>
    <dc:date>2022-06-23T22:16:59.558034999</dc:date>
    <meta:editing-cycles>16</meta:editing-cycles>
    <meta:editing-duration>PT20M4S</meta:editing-duration>
    <meta:generator>LibreOffice/7.3.4.2$Linux_X86_64 LibreOffice_project/30$Build-2</meta:generator>
    <meta:document-statistic meta:table-count="5" meta:image-count="4" meta:object-count="0" meta:page-count="14" meta:paragraph-count="219" meta:word-count="6187" meta:character-count="40082" meta:non-whitespace-character-count="34098"/>
    <meta:user-defined meta:name="AppVersion">15.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