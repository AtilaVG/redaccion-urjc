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75in" style:rel-column-width="13093*"/>
    </style:style>
    <style:style style:name="Table1.B" style:family="table-column">
      <style:table-column-properties style:column-width="1.3403in" style:rel-column-width="13121*"/>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53in" style:rel-column-width="10922*"/>
    </style:style>
    <style:style style:name="Table2.B" style:family="table-column">
      <style:table-column-properties style:column-width="1.116in" style:rel-column-width="10927*"/>
    </style:style>
    <style:style style:name="Table2.C" style:family="table-column">
      <style:table-column-properties style:column-width="1.1153in" style:rel-column-width="10918*"/>
    </style:style>
    <style:style style:name="Table2.D" style:family="table-column">
      <style:table-column-properties style:column-width="1.1153in" style:rel-column-width="10921*"/>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53in" style:rel-column-width="10922*"/>
    </style:style>
    <style:style style:name="Table3.B" style:family="table-column">
      <style:table-column-properties style:column-width="1.116in" style:rel-column-width="10927*"/>
    </style:style>
    <style:style style:name="Table3.C" style:family="table-column">
      <style:table-column-properties style:column-width="1.1153in" style:rel-column-width="10918*"/>
    </style:style>
    <style:style style:name="Table3.D" style:family="table-column">
      <style:table-column-properties style:column-width="1.1153in" style:rel-column-width="10921*"/>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53in" style:rel-column-width="10922*"/>
    </style:style>
    <style:style style:name="Table4.B" style:family="table-column">
      <style:table-column-properties style:column-width="1.116in" style:rel-column-width="10927*"/>
    </style:style>
    <style:style style:name="Table4.C" style:family="table-column">
      <style:table-column-properties style:column-width="1.1153in" style:rel-column-width="10918*"/>
    </style:style>
    <style:style style:name="Table4.D" style:family="table-column">
      <style:table-column-properties style:column-width="1.1153in" style:rel-column-width="10921*"/>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53in" style:rel-column-width="10922*"/>
    </style:style>
    <style:style style:name="Table5.B" style:family="table-column">
      <style:table-column-properties style:column-width="1.116in" style:rel-column-width="10927*"/>
    </style:style>
    <style:style style:name="Table5.C" style:family="table-column">
      <style:table-column-properties style:column-width="1.1153in" style:rel-column-width="10918*"/>
    </style:style>
    <style:style style:name="Table5.D" style:family="table-column">
      <style:table-column-properties style:column-width="1.1153in" style:rel-column-width="10921*"/>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Heading_20_1" style:list-style-name="WWNum4"/>
    <style:style style:name="P2" style:family="paragraph" style:parent-style-name="Standard">
      <style:paragraph-properties fo:text-align="justify" style:justify-single-word="false"/>
    </style:style>
    <style:style style:name="P3"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4"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5" style:family="paragraph" style:parent-style-name="Table">
      <style:paragraph-properties fo:text-align="justify" style:justify-single-word="false"/>
      <style:text-properties style:font-name="Calibri" style:font-name-asian="Calibri1" style:font-name-complex="Calibri1"/>
    </style:style>
    <style:style style:name="P6" style:family="paragraph" style:parent-style-name="Table_20_Contents">
      <style:paragraph-properties fo:orphans="0" fo:widows="0" fo:keep-with-next="always"/>
    </style:style>
    <style:style style:name="P7" style:family="paragraph" style:parent-style-name="Table_20_Contents">
      <style:paragraph-properties fo:orphans="0" fo:widows="0"/>
    </style:style>
    <style:style style:name="P8" style:family="paragraph" style:parent-style-name="Text_20_body">
      <style:paragraph-properties fo:margin-left="0.4925in" fo:margin-right="0in" fo:text-indent="-0.4925in" style:auto-text-indent="false"/>
    </style:style>
    <style:style style:name="P9" style:family="paragraph" style:parent-style-name="Text_20_body" style:list-style-name="WWNum6"/>
    <style:style style:name="P10" style:family="paragraph" style:parent-style-name="Text_20_body" style:list-style-name="WWNum5"/>
    <style:style style:name="P11" style:family="paragraph" style:parent-style-name="Text_20_body" style:list-style-name="WWNum8"/>
    <style:style style:name="P12" style:family="paragraph" style:parent-style-name="Text_20_body" style:list-style-name="WWNum3"/>
    <style:style style:name="P13" style:family="paragraph" style:parent-style-name="Text_20_body">
      <style:paragraph-properties fo:break-before="page"/>
    </style:style>
    <style:style style:name="P14" style:family="paragraph" style:parent-style-name="Text_20_body" style:list-style-name="WWNum7"/>
    <style:style style:name="P15" style:family="paragraph" style:parent-style-name="Text_20_body">
      <style:paragraph-properties fo:margin-left="0.75in" fo:margin-right="0in" fo:text-indent="0in" style:auto-text-indent="false"/>
    </style:style>
    <style:style style:name="P16" style:family="paragraph" style:parent-style-name="Text_20_body">
      <style:text-properties fo:font-size="9pt" style:font-size-asian="9pt" style:font-size-complex="9pt"/>
    </style:style>
    <style:style style:name="P17" style:family="paragraph" style:parent-style-name="Title">
      <style:paragraph-properties fo:text-align="start" style:justify-single-word="false"/>
      <style:text-properties fo:font-size="20pt" style:font-size-asian="20pt" style:font-size-complex="20pt"/>
    </style:style>
    <style:style style:name="P18" style:family="paragraph" style:parent-style-name="Title">
      <style:paragraph-properties fo:text-align="start" style:justify-single-word="false"/>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size="8pt" style:font-size-asian="8pt" style:font-size-complex="8pt"/>
    </style:style>
    <style:style style:name="T5" style:family="text">
      <style:text-properties fo:color="#ff0000" loext:opacity="100%"/>
    </style:style>
    <style:style style:name="T6" style:family="text">
      <style:text-properties style:language-asian="es" style:country-asian="ES"/>
    </style:style>
    <style:style style:name="T7" style:family="text">
      <style:text-properties fo:language="en" fo:country="US"/>
    </style:style>
    <style:style style:name="T8" style:family="text">
      <style:text-properties fo:font-size="9pt" style:font-size-asian="9pt"/>
    </style:style>
    <style:style style:name="T9" style:family="text">
      <style:text-properties fo:font-weight="bold" style:font-weight-asian="bold" style:font-weight-complex="bold"/>
    </style:style>
    <style:style style:name="T10"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letter-kerning="true" style:font-name-asian="AR PL KaitiM GB" style:font-size-asian="8pt" style:language-asian="zh" style:country-asian="CN" style:font-style-asian="italic" style:font-weight-asian="normal" style:font-name-complex="FreeSans" style:font-size-complex="12pt" style:language-complex="hi" style:country-complex="IN" style:font-style-complex="normal" style:font-weight-complex="normal" style:text-emphasize="none" style:text-scale="100%" style:font-relief="none"/>
    </style:style>
    <style:style style:name="T12" style:family="text">
      <style:text-properties fo:font-size="10pt" fo:language="es" fo:country="ES" style:letter-kerning="false" style:font-name-asian="DejaVu Sans" style:font-size-asian="10pt" style:language-asian="zh" style:country-asian="CN" style:font-name-complex="DejaVu Sans" style:language-complex="hi" style:country-complex="IN"/>
    </style:style>
    <style:style style:name="T13" style:family="text">
      <style:text-properties fo:font-size="10pt" fo:language="en" fo:country="US" style:letter-kerning="false" style:font-name-asian="DejaVu Sans" style:font-size-asian="10pt" style:language-asian="en" style:country-asian="US" style:font-name-complex="Mangal" style:font-size-complex="9pt" style:language-complex="en" style:country-complex="US"/>
    </style:style>
    <style:style style:name="T14" style:family="text">
      <style:text-properties fo:font-size="12pt" fo:language="en" fo:country="US" style:letter-kerning="false" style:font-name-asian="DejaVu Sans" style:font-size-asian="12pt" style:language-asian="en" style:country-asian="US" style:font-name-complex="DejaVu Sans" style:language-complex="en" style:country-complex="US"/>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ón: 1.6, 10 de junio.</text:p>
      <text:p text:style-name="P8"/>
      <text:p text:style-name="P8"><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17"/>
      <text:p text:style-name="P17"/>
      <text:p text:style-name="P18"><text:span text:style-name="T1">Convocatoria: Reconocimiento de publicación de asignaturas en acceso abierto 2022-2023</text:span></text:p>
      <text:p text:style-name="Standard"/>
      <text:p text:style-name="Text_20_body"><text:span text:style-name="T2">Resolución del Rector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span></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3">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3">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3">por parte del alumnado de la</text:span>s asignaturas que los utiliza, y por cualquier otra persona interesada en los temas que cubren. De esta forma, ayudan <text:span text:style-name="T3">a quien</text:span><text:span text:style-name="T5"> </text:span>los quiera utilizar para mejorar su conocimiento personal, sin importar el momen<text:span text:style-name="T3">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3">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6">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text:soft-page-break/>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list xml:id="list4132893972" text:style-name="WWNum4">
        <text:list-item>
          <text:h text:style-name="P1" text:outline-level="1">1. Objeto de la convocatoria</text:h>
        </text:list-item>
      </text:list>
      <text:p text:style-name="Text_20_body">Esta convocatoria pretende promover el trabajo del personal docente <text:span text:style-name="T3">d</text:span>e la URJC para que publiquen sus materiales en asignaturas en acceso abierto, evaluándose dicho trabajo y asignando, en su caso, un incentivo económico por el que se reconoce el esfuerzo realizado en la elaboración de materiales publicados durante el curso 2022-23<office:annotation loext:resolved="false"><dc:creator>Jesus Gonzalez-Barahona</dc:creator><dc:date>2022-05-24T09:24:00</dc:date><text:p><text:span text:style-name="T10">Se añade “en la elaboración de materiales publicados durante el curso...”, dado que el esfuerzo puede ser anterior al curso, pero siempre será por materiales publicados durante el curso.</text:span></text:p></office:annotation>. Esta convocatoria está dirigida a todo el Personal Docente de la Universidad, siempre que cumpla las condiciones especificadas más adelante en esta convocatoria, donde se indica<office:annotation loext:resolved="false"><dc:creator>Jesus Gonzalez-Barahona</dc:creator><dc:date>2022-05-24T09:38:00</dc:date><text:p><text:span text:style-name="T10">Añadido para dejar claro que se pueden presentar todo el Personal Docente.</text:span></text:p></office:annotation> qué asignaturas se pueden considerar, qué condiciones formales deben cumplir sus materiales, cómo deben ser publicados y utilizad<text:span text:style-name="T3">os en esas asignatura</text:span>s, y cómo se realizará el reconocimiento a sus autores. Todas las condic<text:span text:style-name="T3">iones deben cumplirse en el </text:span>momento de finalización del plazo de presentación de la solicitud a esta convocatoria. </text:p>
      <text:list xml:id="list133945207859879" text:continue-numbering="true" text:style-name="WWNum4">
        <text:list-item>
          <text:h text:style-name="P1" text:outline-level="1">2. Asignaturas</text:h>
        </text:list-item>
      </text:list>
      <text:p text:style-name="P2"/>
      <text:p text:style-name="Text_20_body"><text:span text:style-name="T3">Las asignaturas presentadas en las solicitudes a esta convocatoria deben tener sus materiales visibles en Aula Virtual mediante enlaces a las versiones depositadas en los</text:span><office:annotation loext:resolved="false"><dc:creator>Jesus Gonzalez-Barahona</dc:creator><dc:date>2022-05-24T09:41:00</dc:date><text:p><text:span text:style-name="T10">Redacción un poco diferente de la propuesta, para dejar claro que los materiales se depositan en los repositorios en abierto, y se enlazan desde el aula virtual.</text:span></text:p></office:annotation><text:span text:style-name="T3"> repositorios de acceso abierto de la Universidad, y cumplir las siguientes características:</text:span> </text:p>
      <text:list xml:id="list3419465285" text:style-name="WWNum6">
        <text:list-item>
          <text:p text:style-name="P9">La asignatura debe ser de docencia oficial en un grado o máster universitario de la Universidad Rey Juan Carlos durante el curso 2022-2023. </text:p>
        </text:list-item>
        <text:list-item>
          <text:p text:style-name="P9">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office:annotation loext:resolved="true"><dc:creator>Jesus Gonzalez-Barahona</dc:creator><dc:date>2022-05-25T21:17:00</dc:date><text:p><text:span text:style-name="T10">Se trata de clarificar lo que se valora en la convocatoria, y cómo acceder a los criterios detallados de evaluación</text:span></text:p></office:annotation>:</text:p>
      <text:list xml:id="list133946892239176" text:continue-numbering="true" text:style-name="WWNum6">
        <text:list-item>
          <text:list>
            <text:list-item>
              <text:p text:style-name="P9">Guía de la asignatura, en formato libre.</text:p>
            </text:list-item>
            <text:list-item>
              <text:p text:style-name="P9">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9"><text:soft-page-break/>Presentaciones o transparencias de los temas de la asignatura</text:p>
            </text:list-item>
            <text:list-item>
              <text:p text:style-name="P9">Colecciones de ejercicios, problemas, trabajos o proyectos con o sin solución</text:p>
            </text:list-item>
            <text:list-item>
              <text:p text:style-name="P9">Colecciones de pruebas de evaluación con o sin solución</text:p>
            </text:list-item>
            <text:list-item>
              <text:p text:style-name="P9">Videos cortos (video-píldoras), para facilitar el seguimiento de los temas de la asignatura</text:p>
            </text:list-item>
            <text:list-item>
              <text:p text:style-name="P9">Otros materiales que puedan ser relevantes, dadas las características específicas de la asignatura, como por ejemplo colecciones de programas de ordenador o colecciones de ilustraciones que se utilicen para complementar las explicaciones de una asignatura.<office:annotation loext:resolved="false"><dc:creator>Jesus Gonzalez-Barahona</dc:creator><dc:date>2022-05-24T09:46:00</dc:date><text:p><text:span text:style-name="T10">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1611401405" text:style-name="WWNum5">
        <text:list-item>
          <text:p text:style-name="P10">Ha de estar actualizado para el curso académico al que se refiere esta convocatoria, y ser utilizado durante su impartición.</text:p>
        </text:list-item>
        <text:list-item>
          <text:p text:style-name="P10">Ha de estar licenciado con una<text:span text:style-name="T3"> de las licencias de publicación en acceso abierto </text:span>aprobadas por el Consejo de Publicación Abierta, con el consentimiento de todos sus autores (licencias Atribución<text:note text:id="ftn11"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11"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10">Es necesario que el material tenga en cuenta las buenas prácticas que aseguren los derechos sobre los materiales que se publican en abierto.</text:p>
        </text:list-item>
        <text:list-item>
          <text:p text:style-name="P10">En el caso de materiales bibliográficos (apuntes, presentaciones o transparencias, colecciones de problemas, colecciones de exámenes), deben estar depositados en el Archivo Abierto Institucional de la URJC (BURJC Digital<text:note text:id="ftn11"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office:annotation loext:resolved="false"><dc:creator>Jesus Gonzalez-Barahona</dc:creator><dc:date>2022-05-24T09:51:00</dc:date><text:p><text:span text:style-name="T10">Añadido para clarificar cómo se han de depositar los documentos.</text:span></text:p></office:annotation> por categor<text:span text:style-name="T8">ía, </text:span>en formato PDF y en el formato fuente que se haya utilizado para su realización (como archivo anexo al documento). Para su realización, opcionalmente, se pueden utilizar las Plantillas para Materiales de Publicación Abierta de la URJC<text:note text:id="ftn11"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10">En el caso de videos, deben estar todos depositados en la misma serie correspondiente a la asignatura en TV URJC<text:note text:id="ftn11" text:note-class="footnote"><text:note-citation>6</text:note-citation><text:note-body><text:p text:style-name="Footnote"><text:span text:style-name="T7">TV URJC: </text:span><text:a xlink:type="simple" xlink:href="https://tv.urjc.es/" text:style-name="Internet_20_link" text:visited-style-name="Visited_20_Internet_20_Link"><text:span text:style-name="Internet_20_link"><text:span text:style-name="T7">https://tv.urjc.es/</text:span></text:span></text:a></text:p></text:note-body></text:note> y publicados en la asignatura correspondiente según las instrucciones detalladas en el procedimiento de subida de materiales a TV URJC<text:note text:id="ftn11"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10">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text:soft-page-break/>Puede encontrarse información detallada sobre las condiciones y procedimientos relacionados con esta convocatoria, y con ayuda sobre cómo cumplirlos, en la Guía sobre reconocimiento de publicación de asignaturas en acceso abierto<text:note text:id="ftn11"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133945459897858" text:continue-list="list133945207859879" text:style-name="WWNum4">
        <text:list-item>
          <text:h text:style-name="P1" text:outline-level="1">3. Incentivos y efectos </text:h>
        </text:list-item>
      </text:list>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office:annotation loext:resolved="false"><dc:creator>Jesus Gonzalez-Barahona</dc:creator><dc:date>2022-06-08T10:48:00</dc:date><text:p><text:span text:style-name="T10">Se indica ahora cómo se clasifica cada asignatura en las tres categorías que tenemos. Más adelante, se indican también baremos más concretos para la clasificación. Ambos cambios, según consejo de la asesoría jurídica</text:span></text:p></office:annotation></text:p>
      <text:p text:style-name="Text_20_body">Se clasificarán como asignaturas “sin materiales significativos en acceso abierto” aquellas que reciban una baremación total menor de 6. Estas asignaturas recibirán indicaciones sobre cómo mejorar la publicación en acceso abierto de sus materiales.</text:p>
      <text:p text:style-name="Text_20_body"><office:annotation office:name="__Annotation__237_2829001358" loext:resolved="false"><dc:creator>Alberto Sánchez Campos</dc:creator><dc:date>2022-06-09T16:44:00</dc:date><meta:creator-initials>ASC</meta:creator-initials><text:p><text:span text:style-name="T13">A mí lo de poner un número no me convence. En los proyectos de investigación estatales, europeos, no ocurre</text:span></text:p></office:annotation>Se clasificarán como asignaturas “en acceso abierto” aquellas que reciban una baremación total mayor o igual a 6.<office:annotation-end office:name="__Annotation__237_2829001358"/><office:annotation loext:resolved="false"><dc:creator>Jesus Gonzalez-Barahona</dc:creator><dc:date>2022-06-10T09:45:13</dc:date><text:p><text:span text:style-name="T11">Reply to Alberto Sánchez Campos (09/06/2022, 16:44): "..."</text:span></text:p><text:p><text:span text:style-name="T12">XXX: Está puesto porque pedía más precisión la Asesoría Juridica, pero hacemos como veáis ;-) (en los proyectos Horizonte Europa, sí hay una rúbrica detallada, que indica que si no llegas a un mínimo de puntos de cada categoría, y a un número de puntos total, no pasas <text:s/>a la lista de financiables. Y luego, entre esa lista de financiables,según puntuación hasta que se acabe el dinero. Este modelo está cogido de ahí: un mínimo de puntuación para estar “en abierto”, hasta que se acabe el dinero según puntuación para el incentivo económico,y un porcentaje sobre los “admitidos” para los “excelentes”)</text:span></text:p></office:annotation></text:p>
      <text:p text:style-name="Text_20_body">Se clasificarán como asignaturas “destacadamente en acceso abierto” el 10% de asignaturas con baremación más alta, calculado sobre el total de asignaturas clasificadas como “en acceso abierto”, siempre que su baremación sea igual o superior a 20. <text:s/></text:p>
      <text:p text:style-name="Text_20_body">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 corresponden a dicho docente en esa asignatura por la cantidad económica por crédito, hasta un total máximo por docente de 1.500 euros. El número de créditos que corresponden a cada docente en una asignatura se obtendrá como resultado de dividir a partes iguales entre los beneficiarios de la asignatura el número de créditos ECTS que corresponden a la misma. Se entiende por “beneficiario de la asignatura” quien participe en su impartición (según el Plan de Ordenación Docente correspondiente) y sea autor de alguno de los materiales que cumplan las condiciones especificadas anteriormente.<office:annotation loext:resolved="false"><dc:creator>Jesus Gonzalez-Barahona</dc:creator><dc:date>2022-05-24T10:02:00</dc:date><text:p><text:span text:style-name="T10">Nueva redacción, siguiendo las indicaciones (gracias por al redacción propuesta, es más clara que la que proponíamos).</text:span></text:p><text:p/><text:p><text:span text:style-name="T10">XXX: 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 La dotación global de los fondos para el curso 2022/23 ascenderá a 80.000 euros (40.000 euros por cuatrimestre), que serán satisfechos con cargo al presupuesto 30NTUD06 <office:annotation loext:resolved="false"><dc:creator>Jesus Gonzalez-Barahona</dc:creator><dc:date>2022-05-24T10:06:00</dc:date><text:p><text:span text:style-name="T10">XXX: Es necesario especificar la partida presupuestaria completa y el ejercicio económico al que se aplicará</text:span></text:p></office:annotation>de la partida Unidigital.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 y agotar crédito presupuestario. El procedimiento de ejecución del crédito asignado a la presente convocatoria se ajustará a la misma y a lo dispuesto en las Normas de Ejecución del Presupuesto de la Universidad Rey Juan Carlos para el año 2022. La cuantía económica <text:soft-page-break/>correspondiente a este incentivo no será consolidable, y se recibirá en un único pago abonado en nómina, en concepto de “cuantía económica ligada a publicación de asignaturas en abierto”<office:annotation loext:resolved="false"><dc:creator>Jesus Gonzalez-Barahona</dc:creator><dc:date>2022-05-24T10:10:00</dc:date><text:p><text:span text:style-name="T10">Añadido este detalle según se sugiere.</text:span></text:p><text:p/><text:p><text:span text:style-name="T10">XXX: Comprobar que esto es lo apropiado.</text:span></text:p></office:annotation>.</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office:annotation office:name="__Annotation__265_2829001358" loext:resolved="false"><dc:creator>Alberto Sánchez Campos</dc:creator><dc:date>2022-06-09T16:43:00</dc:date><meta:creator-initials>ASC</meta:creator-initials><text:p><text:span text:style-name="T13">Yo esto lo quitaría. No soluciona nada y puede generar problemas entre profesores. En la normativa de online además no lo pone.</text:span></text:p><text:p/></office:annotation>siempre que <office:annotation office:name="__Annotation__261_2829001358" loext:resolved="false"><dc:creator>Mercedes Del Hoyo Hurtado</dc:creator><dc:date>2022-06-09T12:21:00</dc:date><meta:creator-initials>MDHH</meta:creator-initials><text:p><text:span text:style-name="T14">Yo no veo otra redacción posible…</text:span></text:p></office:annotation><office:annotation loext:resolved="false"><dc:creator>Jesus Gonzalez-Barahona</dc:creator><dc:date>2022-05-24T10:14:00</dc:date><text:p><text:span text:style-name="T10">Añadido según se sugiere.</text:span></text:p><text:p/><text:p><text:span text:style-name="T10">XXX: ¿Causa esta redacción algún problema, por dejar demasiada opción para evitar asignar docencia como se pretende? ¿Se os ocurre otra redacción? (ver las razones expuestas en el comentario recibido de Asesoría Jurídica).</text:span></text:p></office:annotation><office:annotation-end office:name="__Annotation__261_2829001358"/><office:annotation-end office:name="__Annotation__265_2829001358"/>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133946699094476" text:continue-numbering="true" text:style-name="WWNum4">
        <text:list-item>
          <text:h text:style-name="P1" text:outline-level="1">4. Evaluación de las propuestas</text:h>
        </text:list-item>
      </text:list>
      <text:p text:style-name="Text_20_body">La evaluación de las propuestas presentadas se llevará a cabo de forma colegiada por los Coordinadores o Coordinadoras de la Oficina de Conocimiento y Cultura Libres, de Software Libre y de Cultura Libre de la Universidad, asistidos por personal adscrito al Vicerrectorado de Extensión Universitaria y al Centro de Innovación Docente y Educación Digital de la Universidad, atendiendo a los criterios establecidos en la rúbrica del Anexo III. El funcionamiento será colegiado excepto en lo que les pueda afectar personalmente, en cuyo caso se inhibirán y la evaluación se realizará por los evaluadores no afectados.<office:annotation loext:resolved="false"><dc:creator>Jesus Gonzalez-Barahona</dc:creator><dc:date>2022-05-24T13:19:00</dc:date><text:p><text:span text:style-name="T10">Añadida regla de inhibición, para dejar más claro el funcionamiento colegiado.</text:span></text:p></office:annotation></text:p>
      <text:p text:style-name="Text_20_body">Los resultados de esta evaluación serán utilizados por la Comisión de Asignaturas en Abierto para decidir su clasificación en las tres categorías mencionadas anteriormente<office:annotation loext:resolved="false"><dc:creator>Jesus Gonzalez-Barahona</dc:creator><dc:date>2022-05-24T12:55:00</dc:date><text:p><text:span text:style-name="T10">Añadido para aclarar qué clasificación se refiere.</text:span></text:p></office:annotation> y su financiación si procede. Esta Comisión está integrada por:</text:p>
      <text:list xml:id="list315590879" text:style-name="WWNum8">
        <text:list-item>
          <text:p text:style-name="P11">El Vicerrector o la Vicerrectora, o persona en quien delegue, con competencias en materia de Publicación en Acceso Abierto, que la presidirá.<office:annotation loext:resolved="false"><dc:creator>Jesus Gonzalez-Barahona</dc:creator><dc:date>2022-05-24T13:12:00</dc:date><text:p><text:span text:style-name="T10">Se clarifica “publicación en acceso abierto” como competencia,y se especifica que actuará como presidente.</text:span></text:p></office:annotation></text:p>
        </text:list-item>
        <text:list-item>
          <text:p text:style-name="P11">El Vicerrector o la Vicerrectora, o persona en quien delegue, con competencias en materia de Ordenación Académica.</text:p>
        </text:list-item>
        <text:list-item>
          <text:p text:style-name="P11">El Vicerrector o la Vicerrectora, o persona en quien delegue, con competencias en materia de Transformación Digital.</text:p>
        </text:list-item>
        <text:list-item>
          <text:p text:style-name="P11">El Director Académico o la Directora Académica del Centro de Innovación Docente y Educación Digital (CIED), o persona en quien delegue.</text:p>
        </text:list-item>
        <text:list-item>
          <text:p text:style-name="P11">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loext:resolved="false"><dc:creator>Jesus Gonzalez-Barahona</dc:creator><dc:date>2022-05-24T13:14:00</dc:date><text:p><text:span text:style-name="T10">Añadido para especificar el régimen de funcionamiento. En el comentario que menciona que habría que indicar suplentes, se dice en todos los casos “persona en quien delegue”, especificando delegación explícita como forma de suplencia.</text:span></text:p></office:annotation></text:p>
      <text:list xml:id="list133945741042644" text:continue-list="list133946699094476" text:style-name="WWNum4">
        <text:list-item>
          <text:h text:style-name="P1"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Text_20_body"><text:soft-page-break/><text:span text:style-name="T9">5.1. Consideraciones previas y presentación de solicitudes</text:span></text:p>
      <text:p text:style-name="Text_20_body">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grupo de actas correspondiente para el curso 2022/2023. Para ello rellenará por cada asignatura a solicitar un formulario que incluirá al menos los datos descritos en el Anexo I de esta convocatoria. El procedimiento de entrega, incluido el enlace a dicho formulario estarán disponibles en la Guía sobre reconocimiento de publicación de asignaturas en acceso abierto<text:note text:id="ftn11"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office:annotation loext:resolved="false"><dc:creator>Jesus Gonzalez-Barahona</dc:creator><dc:date>2022-05-24T13:43:00</dc:date><text:p><text:span text:style-name="T10">Especificación del mecanismo de entrega de la solicitud (formulario enlazado desde la Guía de la convocatoria)</text:span></text:p></office:annotation></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mediante declaración responsable<office:annotation loext:resolved="false"><dc:creator>Jesus Gonzalez-Barahona</dc:creator><dc:date>2022-05-24T13:41:00</dc:date><text:p><text:span text:style-name="T10">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 que la información que incluye en él es cierta, y que efectivamente los autores indicados tienen los derechos correspondientes para la publicación de los materiales en abierto de la asignatura que indica. Asimismo, deberá asegurar de que ha informado a dichos docentes de la política de tratamiento de datos personales de la presente convocatoria.<office:annotation loext:resolved="false"><dc:creator>Jesus Gonzalez-Barahona</dc:creator><dc:date>2022-06-08T20:17:00</dc:date><text:p><text:span text:style-name="T10">Añadido por sugerencia de la Delegada de Protección de Datos</text:span></text:p></office:annotation></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y hacer así efectiva la solicitud para una asignatura<office:annotation loext:resolved="false"><dc:creator>Jesus Gonzalez-Barahona</dc:creator><dc:date>2022-05-24T13:47:00</dc:date><text:p><text:span text:style-name="T10">Se especifica cómo se hace efectiva la solicitud.</text:span></text:p></office:annotation>, es el día 30 de septiembre de 2022 a las 23:59 para asignaturas que se impartan durante el primer cuatrimestre, y el 20 de enero de 2023 a la misma hora para asignaturas que se impartan durante el segundo cuatrimestre.</text:p>
      <text:p text:style-name="Text_20_body"><text:span text:style-name="T9">5.2 Publicación de listas provisionales de solicitudes admitidas y excluidas</text:span></text:p>
      <text:p text:style-name="Text_20_body">Finalizado el plazo para la presentación de solicitudes, el Vicerrectorado de Extensión Universitaria, <office:annotation office:name="__Annotation__317_2829001358" loext:resolved="false"><dc:creator>Alberto Sánchez Campos</dc:creator><dc:date>2022-06-09T16:48:00</dc:date><meta:creator-initials>ASC</meta:creator-initials><text:p><text:span text:style-name="T13">Qué es esto de u órgano que asuma sus competencias?</text:span></text:p></office:annotation>u órgano que asuma sus competencias<office:annotation-end office:name="__Annotation__317_2829001358"/><office:annotation loext:resolved="false"><dc:creator>Jesus Gonzalez-Barahona</dc:creator><dc:date>2022-06-10T09:51:50</dc:date><text:p><text:span text:style-name="T11">Reply to Alberto Sánchez Campos (09/06/2022, 16:48): "..."</text:span></text:p><text:p><text:span text:style-name="T12">XXX: Está puesto a sugerencia de Asesoría Jurídica (veréis que hay otros casos similares más adelante). Entiendo que una previsión para el caso de que desapareciese el vicerrectorado. Pero esto es una suposición mía... </text:span></text:p></office:annotation>, examinará las solicitudes, y hará público en el tablón de anuncios electrónico de la URJC la resolución <office:annotation office:name="__Annotation__326_2829001358" loext:resolved="false"><dc:creator>Jesus Gonzalez-Barahona</dc:creator><dc:date>2022-06-08T20:18:00</dc:date><text:p><text:span text:style-name="T10">Modificado por sugerencia de la Delegada de Protección de datos.</text:span></text:p></office:annotation>por la que se proceda a la publicación de las solicitudes<office:annotation-end office:name="__Annotation__326_2829001358"/> admitidas a trámite y las excluidas provisionalmente, junto con las causas de exclusión, concediendo un plazo de 10 días hábiles para la subsanación.</text:p>
      <text:p text:style-name="Text_20_body"><text:span text:style-name="T9">5.3 Subsanación de errores y publicación de listas definitivas</text:span></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Text_20_body"><text:span text:style-name="T9">5.4 Presentación de recursos a las listas definitivas</text:span></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text:soft-page-break/>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Text_20_body"><text:span text:style-name="T9">5.5 Valoración de propuestas y publicación de resolución provisional</text:span></text:p>
      <text:p text:style-name="Text_20_body">Las propuestas serán evaluadas, según se ha especificado, y los resultados de esta evalu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emitirá la Resolución provisional de las asignaturas concedidas en abierto y la financiación correspondiente del profesorado, publicándola en el tablón de anuncios electrónico de la URJC. </text:p>
      <text:p text:style-name="Text_20_body"><text:span text:style-name="T9">5.6 Presentación de reclamaciones a la resolución provisional y publicación de resolución definitiva</text:span></text:p>
      <text:p text:style-name="Text_20_body">Seguidamente, se abrirá un proceso de reclamación concediendo un plazo de 10 días hábiles. Estas reclamaciones podrán ser tanto sobre los resultados de la evaluación como sobre la valoración final realizada por la Comisión de Asignaturas en Abierto.<office:annotation loext:resolved="false"><dc:creator>Jesus Gonzalez-Barahona</dc:creator><dc:date>2022-05-24T13:58:00</dc:date><text:p><text:span text:style-name="T10">Se especifica que se puede reclamar también la evaluación realizada.</text:span></text:p></office:annotation>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Text_20_body"><text:span text:style-name="T9">5.7 Presentación de reclamaciones a la resolución definitiva</text:span></text:p>
      <text:p text:style-name="Text_20_body">Contra la resolución definitiva, el solicitante podrá presentar recurso de alzada ante el Rector en los términos indicados en el punto 5.4.</text:p>
      <text:list xml:id="list133945375940619" text:continue-numbering="true" text:style-name="WWNum4">
        <text:list-item>
          <text:h text:style-name="P1" text:outline-level="1">6. Tratamiento de datos de carácter personal<office:annotation loext:resolved="false"><dc:creator>Jesus Gonzalez-Barahona</dc:creator><dc:date>2022-06-08T20:18:00</dc:date><text:p><text:span text:style-name="T10">Texto modificado por sugerencia de la Delegada de Protección de Datos (toda la sección)</text:span></text:p></office:annotation></text:h>
        </text:list-item>
      </text:list>
      <text:p text:style-name="P3"/>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Text_20_body"><text:span text:style-name="T9">6.1 Responsable del tratamiento</text:span></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Text_20_body"><text:span text:style-name="T9">6.2. Finalidad y legitimación del tratamiento</text:span></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3510911913" text:style-name="WWNum3">
        <text:list-item>
          <text:p text:style-name="P12">Recogida de datos mediante solicitud.</text:p>
        </text:list-item>
        <text:list-item>
          <text:p text:style-name="P12">Las publicaciones realizadas con efectos de notificación de acuerdo con las normas del procedimiento administrativo común. </text:p>
        </text:list-item>
        <text:list-item>
          <text:p text:style-name="P12"><text:soft-page-break/>Las publicaciones realizadas, en su caso, en el portal de transparencia exigibles por la normativa de transparencia.</text:p>
        </text:list-item>
      </text:list>
      <text:p text:style-name="Text_20_body"><text:span text:style-name="T9">6.3. Comprobación de la veracidad de los datos</text:span></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Text_20_body"><text:span text:style-name="T9">6.4. Comunicación de datos</text:span></text:p>
      <text:p text:style-name="Text_20_body">Los datos personales no serán cedidos a terceros salvo en aquellos casos que exista una obligación legal.</text:p>
      <text:p text:style-name="Text_20_body"><text:span text:style-name="T9">6.5. Conservación de los datos</text:span></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Text_20_body"><text:span text:style-name="T9">6.6. Ejercicio de derechos por los interesados</text:span></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1"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Text_20_body"><text:span text:style-name="T9">6.7. Información por el solicitante al resto de interesados</text:span></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p>
      <text:list xml:id="list133945899038071" text:continue-list="list133945375940619" text:style-name="WWNum4">
        <text:list-item>
          <text:h text:style-name="P1" text:outline-level="1">7. Recursos</text:h>
        </text:list-item>
      </text:list>
      <text:p text:style-name="Text_20_body">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office:annotation loext:resolved="false"><dc:creator>Jesus Gonzalez-Barahona</dc:creator><dc:date>2022-05-24T14:01:00</dc:date><text:p><text:span text:style-name="T10">XXX: Hay un comentario que dice: “Quién aprueba y firma la presente convocatoria? Es necesario especificarlo en el encabezamiento de la resolución e introducir un pie de firma al efecto, acreditando la competencia para ello.”</text:span></text:p><text:p/><text:p><text:span text:style-name="T10">Entiendo que quien aprueba es el Consejo de Gobierno, y así lo he indicado en el encabezado. Pero no sé quién firma. ¿El rector? ¿Tenéis algún pie de firma de ese estilo, que incluya la acreditación para la firma que se pide? </text:span></text:p></office:annotation></text:p>
      <text:p text:style-name="Standard"/>
      <text:p text:style-name="P13"/>
      <text:list xml:id="list133945211119953" text:continue-numbering="true" text:style-name="WWNum4">
        <text:list-item>
          <text:h text:style-name="P1" text:outline-level="1">ANEXO I: Formulario de solicitud</text:h>
        </text:list-item>
      </text:list>
      <text:p text:style-name="Text_20_body"><text:s/>Constará de los siguientes campos:</text:p>
      <text:list xml:id="list2023063738" text:style-name="WWNum7">
        <text:list-item>
          <text:p text:style-name="P14">Nombre del docente</text:p>
        </text:list-item>
        <text:list-item>
          <text:p text:style-name="P14">Dirección de correo electrónico corporativa de la URJC</text:p>
        </text:list-item>
        <text:list-item>
          <text:p text:style-name="P14">Para cada asignatura que se aporte:</text:p>
          <text:list>
            <text:list-item>
              <text:p text:style-name="P14">Nombre de la asignatura</text:p>
            </text:list-item>
            <text:list-item>
              <text:p text:style-name="P14">Titulación </text:p>
            </text:list-item>
            <text:list-item>
              <text:p text:style-name="P14">Titulaciones y asignaturas que podrían utilizar de forma directa los mismos materiales </text:p>
            </text:list-item>
            <text:list-item>
              <text:p text:style-name="P14">Identificador de la asignatura en el Aula Virtual de la URJC (URL directa de la asignatura)</text:p>
            </text:list-item>
            <text:list-item>
              <text:p text:style-name="P14">Listado de docentes que han participado en la elaboración de los materiales (direcciones de correo electrónico corporativo de la URJC)</text:p>
            </text:list-item>
            <text:list-item>
              <text:p text:style-name="P14">Listado de docentes que imparten la asignatura en el curso 2022/2023 (direcciones de correo electrónico corporativo de la URJC)</text:p>
            </text:list-item>
            <text:list-item>
              <text:p text:style-name="P14">Créditos ECTS de la asignatura</text:p>
            </text:list-item>
            <text:list-item>
              <text:p text:style-name="P14">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14">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office:annotation loext:resolved="false"><dc:creator>Jesus Gonzalez-Barahona</dc:creator><dc:date>2022-05-24T16:58:00</dc:date><text:p><text:span text:style-name="T10">Ver comentario sobre declaración responsable, en la parte dispositiva.</text:span></text:p></office:annotation>.</text:p>
            </text:list-item>
          </text:list>
        </text:list-item>
      </text:list>
      <text:p text:style-name="Text_20_body">Así mismo, incluirá la siguiente información relativa al tratamiento de datos personales:</text:p>
      <text:p text:style-name="Text_20_body"><text:span text:style-name="T2">“En cumplimiento de la normativa sobre protección de datos se le informa de lo siguiente:</text:span></text:p>
      <text:p text:style-name="Text_20_body"><text:span text:style-name="T2">RESPONSABLE DEL TRATAMIENTO: Universidad Rey Juan Carlos</text:span></text:p>
      <text:p text:style-name="Text_20_body"><text:span text:style-name="T2">FINALIDAD: Gestión de la convocatoria de reconocimiento de publicación de asignaturas en abierto.</text:span></text:p>
      <text:p text:style-name="Text_20_body"><text:span text:style-name="T2">EJERCICIO DE DERECHOS: Puede ejercer sus derechos de acceso, rectificación, supresión, limitación del tratamiento, portabilidad, oposición y demás reconocidos por el Reglamento General de Protección de Datos, mediante solicitud dirigida a la la Universidad Rey Juan Carlos, C/ Tulipán s/n, 28933 Móstoles, por registro o en su sede electrónica o contactando con: protecciondedatos@urjc.es</text:span></text:p>
      <text:p text:style-name="Text_20_body"><text:span text:style-name="T2">MÁS INFORMACIÓN EN LA CONVOCATORIA”</text:span></text:p>
      <text:p text:style-name="P15"/>
      <text:p text:style-name="Standard"/>
      <text:p text:style-name="P13"/>
      <text:list xml:id="list133945330964297" text:continue-list="list133945211119953" text:style-name="WWNum4">
        <text:list-item>
          <text:h text:style-name="P1" text:outline-level="1">ANEXO II: Rúbrica de evaluación</text:h>
        </text:list-item>
      </text:list>
      <text:p text:style-name="Text_20_body">Cada categoría de material será evaluada con la rúbrica correspondiente, según se indica a continuación para cada una de las categorías del listado<office:annotation loext:resolved="false"><dc:creator>Jesus Gonzalez-Barahona</dc:creator><dc:date>2022-05-25T21:23:00</dc:date><text:p><text:span text:style-name="T10">Se ha detallado cómo se realiza la valoración de una asignatura, se han asignado valores numéricos a los items de calificación en las rúbricas, y se han detallado y uniformizado las <text:s/>rúbricas, siguiendo las recomendaciones recibidas</text:span></text:p></office:annotation>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La valoración total de la asignatura se realizará mediante la suma aritmética de los valores numéricos asignados, según la rúbrica correspondiente, a las cuatro categorías con valoración más alta.</text:p>
      <text:p text:style-name="Text_20_body">Rúbrica para la categoría “guía de la asignatura”:</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text:span text:style-name="T4">0</text:span></text:p>
          </table:table-cell>
          <table:table-cell table:style-name="Table1.A1" office:value-type="string">
            <text:p text:style-name="P7"><text:span text:style-name="T4">1</text:span></text:p>
          </table:table-cell>
          <table:table-cell table:style-name="Table1.A1" office:value-type="string">
            <text:p text:style-name="P7"><text:span text:style-name="T4">2</text:span></text:p>
          </table:table-cell>
          <table:table-cell table:style-name="Table1.A1" office:value-type="string">
            <text:p text:style-name="P7"><text:span text:style-name="T4">3</text:span></text:p>
          </table:table-cell>
          <table:table-cell table:style-name="Table1.E1" office:value-type="string">
            <text:p text:style-name="P7"><text:span text:style-name="T4">4</text:span></text:p>
          </table:table-cell>
        </table:table-row>
        <table:table-row table:style-name="Table1.1">
          <table:table-cell table:style-name="Table1.A2" office:value-type="string">
            <text:p text:style-name="P6"><text:span text:style-name="T4">No presenta, no cumple los criterios de la convocatoria, o no llega al mínimo para ser puntuado</text:span></text:p>
          </table:table-cell>
          <table:table-cell table:style-name="Table1.A2" office:value-type="string">
            <text:p text:style-name="P7"><text:span text:style-name="T4">Incluye un calendario con el plan docente detallado para todas las sesiones del curso académico, indicando al menos los temas cubiertos cada sesión</text:span></text:p>
          </table:table-cell>
          <table:table-cell table:style-name="Table1.A2" office:value-type="string">
            <text:p text:style-name="P7"><text:span text:style-name="T4">Detalla también, para cada sesión, el listado detallado de materiales utilizados, y una breve descripción del tema cubierto y los objetivos de aprendizaje asociados</text:span></text:p>
          </table:table-cell>
          <table:table-cell table:style-name="Table1.A2" office:value-type="string">
            <text:p text:style-name="P7"><text:span text:style-name="T4">Detalla además, para cada sesión, el trabajo personal y otras actividades planificadas para los estudiantes</text:span></text:p>
          </table:table-cell>
          <table:table-cell table:style-name="Table1.E2" office:value-type="string">
            <text:p text:style-name="P7"><text:span text:style-name="T4">Incluye además otros elementos y detalles que ayuden al seguimiento de la asignatura.</text:span></text:p>
          </table:table-cell>
        </table:table-row>
      </table:table>
      <text:p text:style-name="Table"><text:span text:style-name="Caption_20_characters"/></text:p>
      <text:p text:style-name="Text_20_body">Rúbrica para las categorías “apuntes” y “presentaciones o transparencias”:<office:annotation loext:resolved="false"><dc:creator>Jesus Gonzalez-Barahona</dc:creator><dc:date>2022-06-08T09:33:00</dc:date><text:p><text:span text:style-name="T10">Para este tipo de material, y los siguientes, se mantiene una escala de valoración no lineal, siguiendo los consejos de César</text:span></text:p></office:annotation></text:p>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row table:style-name="Table2.1">
          <table:table-cell table:style-name="Table2.A1" office:value-type="string">
            <text:p text:style-name="P6"><text:span text:style-name="T4">0</text:span></text:p>
          </table:table-cell>
          <table:table-cell table:style-name="Table2.A1" office:value-type="string">
            <text:p text:style-name="P7"><text:span text:style-name="T4">1</text:span></text:p>
          </table:table-cell>
          <table:table-cell table:style-name="Table2.A1" office:value-type="string">
            <text:p text:style-name="P7"><text:span text:style-name="T4">3</text:span></text:p>
          </table:table-cell>
          <table:table-cell table:style-name="Table2.A1" office:value-type="string">
            <text:p text:style-name="P7"><text:span text:style-name="T4">5</text:span></text:p>
          </table:table-cell>
          <table:table-cell table:style-name="Table2.A1" office:value-type="string">
            <text:p text:style-name="P7"><text:span text:style-name="T4">8</text:span></text:p>
          </table:table-cell>
          <table:table-cell table:style-name="Table2.F1" office:value-type="string">
            <text:p text:style-name="P7"><text:span text:style-name="T4">14</text:span></text:p>
          </table:table-cell>
        </table:table-row>
        <table:table-row table:style-name="Table2.1">
          <table:table-cell table:style-name="Table2.A2" office:value-type="string">
            <text:p text:style-name="P6"><text:span text:style-name="T4">No presenta, no cumple los criterios de la convocatoria, o no llega al mínimo para ser puntuado</text:span></text:p>
          </table:table-cell>
          <table:table-cell table:style-name="Table2.A2" office:value-type="string">
            <text:p text:style-name="P7"><text:span text:style-name="T4">Cubre al menos un 30% del temario de la asignatura</text:span></text:p>
          </table:table-cell>
          <table:table-cell table:style-name="Table2.A2" office:value-type="string">
            <text:p text:style-name="P7"><text:span text:style-name="T4">Cubre al menos un 60% del temario de la asignatura, o al menos un 30% con un nivel de detalle alto</text:span></text:p>
          </table:table-cell>
          <table:table-cell table:style-name="Table2.A2" office:value-type="string">
            <text:p text:style-name="P7"><text:span text:style-name="T4">Cubre al menos un 90% del temario de la asignatura, o al menos un 60% con un nivel de detalle alto</text:span></text:p>
          </table:table-cell>
          <table:table-cell table:style-name="Table2.A2" office:value-type="string">
            <text:p text:style-name="P7"><text:span text:style-name="T4">Cubre al menos un 90% del temario de la asignatura, con un nivel de detalle alto</text:span></text:p>
          </table:table-cell>
          <table:table-cell table:style-name="Table2.F2" office:value-type="string">
            <text:p text:style-name="P7"><text:span text:style-name="T4">Material excelente, que destaca en cuanto a cobertura del temario y nivel de detalle</text:span></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table-column table:style-name="Table3.B"/>
        <table:table-column table:style-name="Table3.C"/>
        <table:table-column table:style-name="Table3.D"/>
        <table:table-column table:style-name="Table3.A" table:number-columns-repeated="2"/>
        <table:table-row table:style-name="Table3.1">
          <table:table-cell table:style-name="Table3.A1" office:value-type="string">
            <text:p text:style-name="P6"><text:span text:style-name="T4">0</text:span></text:p>
          </table:table-cell>
          <table:table-cell table:style-name="Table3.A1" office:value-type="string">
            <text:p text:style-name="P7"><text:span text:style-name="T4">1</text:span></text:p>
          </table:table-cell>
          <table:table-cell table:style-name="Table3.A1" office:value-type="string">
            <text:p text:style-name="P7"><text:span text:style-name="T4">3</text:span></text:p>
          </table:table-cell>
          <table:table-cell table:style-name="Table3.A1" office:value-type="string">
            <text:p text:style-name="P7"><text:span text:style-name="T4">5</text:span></text:p>
          </table:table-cell>
          <table:table-cell table:style-name="Table3.A1" office:value-type="string">
            <text:p text:style-name="P7"><text:span text:style-name="T4">8</text:span></text:p>
          </table:table-cell>
          <table:table-cell table:style-name="Table3.F1" office:value-type="string">
            <text:p text:style-name="P7"><text:span text:style-name="T4">14</text:span></text:p>
          </table:table-cell>
        </table:table-row>
        <table:table-row table:style-name="Table3.1">
          <table:table-cell table:style-name="Table3.A2" office:value-type="string">
            <text:p text:style-name="P6"><text:span text:style-name="T4">No presenta, no cumple los criterios de la convocatoria, o no llega al mínimo para ser puntuado</text:span></text:p>
          </table:table-cell>
          <table:table-cell table:style-name="Table3.A2" office:value-type="string">
            <text:p text:style-name="P7"><text:span text:style-name="T4">Cubre al menos un 30% del temario de la asignatura</text:span></text:p>
          </table:table-cell>
          <table:table-cell table:style-name="Table3.A2" office:value-type="string">
            <text:p text:style-name="P7"><text:span text:style-name="T4">Cubre al menos un 60% del temario de la asignatura, o al menos un 30% con soluciones</text:span></text:p>
          </table:table-cell>
          <table:table-cell table:style-name="Table3.A2" office:value-type="string">
            <text:p text:style-name="P7"><text:span text:style-name="T4">Cubre al menos un 90% del temario de la asignatura, o al menos un 60% con soluciones</text:span></text:p>
          </table:table-cell>
          <table:table-cell table:style-name="Table3.A2" office:value-type="string">
            <text:p text:style-name="P7"><text:span text:style-name="T4">Cubre al menos un 90% del temario de la asignatura, con soluciones</text:span></text:p>
          </table:table-cell>
          <table:table-cell table:style-name="Table3.F2" office:value-type="string">
            <text:p text:style-name="P7"><text:span text:style-name="T4">Material excelente, que destaca en cuanto a cobertura del temario y nivel de detalle</text:span></text:p>
          </table:table-cell>
        </table:table-row>
      </table:table>
      <text:p text:style-name="Text_20_body"/>
      <text:p text:style-name="Text_20_body">Rúbrica para la categoría “videos cortos (video-píldoras)”. Se considerarán como videos cortos los que son de menos de 10 minutos, y están concebidos para explicar un tema concreto relevante para la asignatura:</text:p>
      <table:table table:name="Table4" table:style-name="Table4">
        <table:table-column table:style-name="Table4.A"/>
        <table:table-column table:style-name="Table4.B"/>
        <table:table-column table:style-name="Table4.C"/>
        <table:table-column table:style-name="Table4.D"/>
        <table:table-column table:style-name="Table4.A" table:number-columns-repeated="2"/>
        <table:table-row table:style-name="Table4.1">
          <table:table-cell table:style-name="Table4.A1" office:value-type="string">
            <text:p text:style-name="P6"><text:span text:style-name="T4">0</text:span></text:p>
          </table:table-cell>
          <table:table-cell table:style-name="Table4.A1" office:value-type="string">
            <text:p text:style-name="P7"><text:span text:style-name="T4">1</text:span></text:p>
          </table:table-cell>
          <table:table-cell table:style-name="Table4.A1" office:value-type="string">
            <text:p text:style-name="P7"><text:span text:style-name="T4">3</text:span></text:p>
          </table:table-cell>
          <table:table-cell table:style-name="Table4.A1" office:value-type="string">
            <text:p text:style-name="P7"><text:span text:style-name="T4">5</text:span></text:p>
          </table:table-cell>
          <table:table-cell table:style-name="Table4.A1" office:value-type="string">
            <text:p text:style-name="P7"><text:span text:style-name="T4">8</text:span></text:p>
          </table:table-cell>
          <table:table-cell table:style-name="Table4.F1" office:value-type="string">
            <text:p text:style-name="P7"><text:span text:style-name="T4">14</text:span></text:p>
          </table:table-cell>
        </table:table-row>
        <table:table-row table:style-name="Table4.1">
          <table:table-cell table:style-name="Table4.A2" office:value-type="string">
            <text:p text:style-name="P6"><text:span text:style-name="T4">No presenta, no cumple los criterios de la convocatoria, o no llega al mínimo para ser puntuado</text:span></text:p>
          </table:table-cell>
          <table:table-cell table:style-name="Table4.A2" office:value-type="string">
            <text:p text:style-name="P7"><text:span text:style-name="T4">Incluye al menos un video corto de presentación de la asignatura</text:span></text:p>
          </table:table-cell>
          <table:table-cell table:style-name="Table4.A2" office:value-type="string">
            <text:p text:style-name="P7"><text:span text:style-name="T4">Incluye al menos 5 videos cortos de temas diferentes de la asignatura, o videos de otros tamaños que cubran al menos el 50% del temario de la asignatura</text:span></text:p>
          </table:table-cell>
          <table:table-cell table:style-name="Table4.A2" office:value-type="string">
            <text:p text:style-name="P7"><text:span text:style-name="T4">Incluye al menos 12 videos cortos, cubriendo temas de al menos el 50% del temario de la asignatura, o videos de otros tamaños que cubran al menos el 90% del temario de la asignatura</text:span></text:p>
          </table:table-cell>
          <table:table-cell table:style-name="Table4.A2" office:value-type="string">
            <text:p text:style-name="P7"><text:span text:style-name="T4">Incluye al menos 20 videos cortos, cubriendo temas de al menos el 90% del temario de la asignatura</text:span></text:p>
          </table:table-cell>
          <table:table-cell table:style-name="Table4.F2" office:value-type="string">
            <text:p text:style-name="P7"><text:span text:style-name="T4">Material excelente, que destaca en cuanto a cobertura del temario y nivel de detalle</text:span></text:p>
          </table:table-cell>
        </table:table-row>
      </table:table>
      <text:p text:style-name="P16"/>
      <text:p text:style-name="Text_20_body"><text:soft-page-break/>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table-column table:style-name="Table5.B"/>
        <table:table-column table:style-name="Table5.C"/>
        <table:table-column table:style-name="Table5.D"/>
        <table:table-column table:style-name="Table5.A" table:number-columns-repeated="2"/>
        <table:table-row table:style-name="Table5.1">
          <table:table-cell table:style-name="Table5.A1" office:value-type="string">
            <text:p text:style-name="P6"><text:span text:style-name="T4">0</text:span></text:p>
          </table:table-cell>
          <table:table-cell table:style-name="Table5.A1" office:value-type="string">
            <text:p text:style-name="P7"><text:span text:style-name="T4">1</text:span></text:p>
          </table:table-cell>
          <table:table-cell table:style-name="Table5.A1" office:value-type="string">
            <text:p text:style-name="P7"><text:span text:style-name="T4">3</text:span></text:p>
          </table:table-cell>
          <table:table-cell table:style-name="Table5.A1" office:value-type="string">
            <text:p text:style-name="P7"><text:span text:style-name="T4">5</text:span></text:p>
          </table:table-cell>
          <table:table-cell table:style-name="Table5.A1" office:value-type="string">
            <text:p text:style-name="P7"><text:span text:style-name="T4">8</text:span></text:p>
          </table:table-cell>
          <table:table-cell table:style-name="Table5.F1" office:value-type="string">
            <text:p text:style-name="P7"><text:span text:style-name="T4">14</text:span></text:p>
          </table:table-cell>
        </table:table-row>
        <table:table-row table:style-name="Table5.1">
          <table:table-cell table:style-name="Table5.A2" office:value-type="string">
            <text:p text:style-name="P6"><text:span text:style-name="T4">No presenta, no cumple los criterios de la convocatoria, o no llega al mínimo para ser puntuado</text:span></text:p>
          </table:table-cell>
          <table:table-cell table:style-name="Table5.A2" office:value-type="string">
            <text:p text:style-name="P7"><text:span text:style-name="T4">Cubre al menos un 30% del temario de la asignatura</text:span></text:p>
          </table:table-cell>
          <table:table-cell table:style-name="Table5.A2" office:value-type="string">
            <text:p text:style-name="P7"><text:span text:style-name="T4">Cubre al menos un 60% del temario de la asignatura, o al menos un 30% con un nivel de detalle alto</text:span></text:p>
          </table:table-cell>
          <table:table-cell table:style-name="Table5.A2" office:value-type="string">
            <text:p text:style-name="P7"><text:span text:style-name="T4">Cubre al menos un 90% del temario de la asignatura, o al menos un 60% con un nivel de detalle alto</text:span></text:p>
          </table:table-cell>
          <table:table-cell table:style-name="Table5.A2" office:value-type="string">
            <text:p text:style-name="P7"><text:span text:style-name="T4">Cubre al menos un 90% del temario de la asignatura, con un nivel de detalle alto</text:span></text:p>
          </table:table-cell>
          <table:table-cell table:style-name="Table5.F2" office:value-type="string">
            <text:p text:style-name="P7"><text:span text:style-name="T4">Material excelente, que destaca en cuanto a cobertura del temario y nivel de detalle</text:span></text:p>
          </table:table-cell>
        </table:table-row>
      </table:table>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9pt" fo:language="es" fo:country="ES" style:letter-kerning="true" style:font-name-asian="AR PL KaitiM GB" style:font-family-asian="'AR PL KaitiM GB'" style:font-family-generic-asian="system" style:font-pitch-asian="variable" style:font-size-asian="9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4" style:list-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true" style:font-name-asian="AR PL KaitiM GB" style:font-family-asian="'AR PL KaitiM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Liberation Serif1" style:font-family-complex="'Liberation Seri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10:26:00</meta:creation-date>
    <meta:initial-creator>Jesus Gonzalez-Barahona</meta:initial-creator>
    <dc:language>es-ES</dc:language>
    <dc:creator>Jesus Gonzalez-Barahona</dc:creator>
    <dc:date>2022-06-10T10:43:23</dc:date>
    <meta:editing-cycles>8</meta:editing-cycles>
    <meta:editing-duration>PT1H</meta:editing-duration>
    <meta:generator>LibreOffice/7.3.4.1$Linux_X86_64 LibreOffice_project/30$Build-1</meta:generator>
    <meta:document-statistic meta:table-count="5" meta:image-count="2" meta:object-count="0" meta:page-count="11" meta:paragraph-count="191" meta:word-count="5238" meta:character-count="34084" meta:non-whitespace-character-count="29038"/>
    <meta:user-defined meta:name="AppVersion">15.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