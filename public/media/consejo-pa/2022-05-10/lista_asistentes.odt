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fo:keep-with-next="alway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-left="none" fo:border-right="0.05pt solid #000000" fo:border-top="0.05pt solid #000000" fo:border-bottom="0.05pt solid #000000" style:writing-mode="page"/>
    </style:style>
    <style:style style:name="Table1.2" style:family="table-row">
      <style:table-row-properties style:min-row-height="0.5in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keep-with-next="alway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201in" fo:border-left="none" fo:border-right="0.05pt solid #000000" fo:border-top="0.05pt solid #000000" fo:border-bottom="0.05pt solid #000000" style:writing-mode="page"/>
    </style:style>
    <style:style style:name="Table2.2" style:family="table-row">
      <style:table-row-properties style:min-row-height="0.5in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4pt" fo:font-weight="bold" officeooo:rsid="000ee3aa" officeooo:paragraph-rsid="000ee3aa" style:font-size-asian="14pt" style:font-weight-asian="bold" style:font-size-complex="14pt" style:font-weight-complex="bold"/>
    </style:style>
    <style:style style:name="P2" style:family="paragraph" style:parent-style-name="Standard">
      <style:paragraph-properties fo:break-before="page"/>
      <style:text-properties fo:font-size="14pt" fo:font-weight="bold" officeooo:rsid="000ee3aa" officeooo:paragraph-rsid="001018f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ee3aa" officeooo:paragraph-rsid="001018f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ee3aa" officeooo:paragraph-rsid="000ee3a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ee3aa" officeooo:paragraph-rsid="001018f1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font-size="12pt" style:font-size-asian="10.5pt" style:font-size-complex="12pt"/>
    </style:style>
    <style:style style:name="P7" style:family="paragraph" style:parent-style-name="Table_20_Contents">
      <style:text-properties fo:font-size="12pt" officeooo:rsid="000ee3aa" officeooo:paragraph-rsid="000ee3aa" style:font-size-asian="10.5pt" style:font-size-complex="12pt"/>
    </style:style>
    <style:style style:name="P8" style:family="paragraph" style:parent-style-name="Table_20_Contents">
      <style:text-properties fo:font-size="12pt" officeooo:rsid="000ee3aa" officeooo:paragraph-rsid="001018f1" style:font-size-asian="10.5pt" style:font-size-complex="12pt"/>
    </style:style>
    <style:style style:name="P9" style:family="paragraph" style:parent-style-name="Table_20_Contents">
      <style:text-properties fo:font-size="12pt" officeooo:rsid="001018f1" officeooo:paragraph-rsid="001018f1" style:font-size-asian="10.5pt" style:font-size-complex="12pt"/>
    </style:style>
    <style:style style:name="P10" style:family="paragraph" style:parent-style-name="Table_20_Contents">
      <style:text-properties fo:font-size="12pt" officeooo:paragraph-rsid="001018f1" style:font-size-asian="10.5pt" style:font-size-complex="12pt"/>
    </style:style>
    <style:style style:name="P11" style:family="paragraph" style:parent-style-name="Table">
      <style:text-properties officeooo:paragraph-rsid="001018f1"/>
    </style:style>
    <style:style style:name="T1" style:family="text">
      <style:text-properties officeooo:rsid="001018f1"/>
    </style:style>
    <style:style style:name="T2" style:family="text">
      <style:text-properties officeooo:rsid="00121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stencia a la reunión del Consejo de Publicación Abierta</text:p>
      <text:p text:style-name="P1">de la Universidad Rey Juan Carlos <text:span text:style-name="T1">(1/2)</text:span></text:p>
      <text:p text:style-name="P1"/>
      <text:p text:style-name="P4">Reunión de <text:span text:style-name="T2">10</text:span> de <text:span text:style-name="T2">mayo</text:span> de 2022, convocada a las 1<text:span text:style-name="T2">1</text:span>:00.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94900160259152">
          <table:table-cell table:style-name="Table1.A1" office:value-type="string">
            <text:p text:style-name="P7">Nombre</text:p>
          </table:table-cell>
          <table:table-cell table:style-name="Table1.B1" office:value-type="string">
            <text:p text:style-name="P9">Firma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Table"><text:span text:style-name="Caption_20_characters"/></text:p>
      <text:p text:style-name="P4"/>
      <text:p text:style-name="P2">Asistencia a la reunión del Consejo de Publicación Abierta</text:p>
      <text:p text:style-name="P3">de la Universidad Rey Juan Carlos <text:span text:style-name="T1">(2/2)</text:span></text:p>
      <text:p text:style-name="P3"/>
      <text:p text:style-name="P5">Reunión de 26 de abril de 2022, convocada a las 13:00.</text:p>
      <text:p text:style-name="P5"/>
      <table:table table:name="Table2" table:style-name="Table2">
        <table:table-column table:style-name="Table2.A"/>
        <table:table-column table:style-name="Table2.B"/>
        <table:table-row table:style-name="TableLine94900160683872">
          <table:table-cell table:style-name="Table2.A1" office:value-type="string">
            <text:p text:style-name="P8">Nombre</text:p>
          </table:table-cell>
          <table:table-cell table:style-name="Table2.B1" office:value-type="string">
            <text:p text:style-name="P9">Firma</text:p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</table:table>
      <text:p text:style-name="P11"><text:span text:style-name="Caption_20_characters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aption_20_characters" style:display-name="Caption character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Gonzalez-Barahona</meta:initial-creator>
    <meta:creation-date>2022-04-26T12:48:41.968136448</meta:creation-date>
    <dc:date>2022-05-10T08:57:45.382675216</dc:date>
    <dc:creator>Jesus Gonzalez-Barahona</dc:creator>
    <meta:editing-duration>PT6M51S</meta:editing-duration>
    <meta:editing-cycles>2</meta:editing-cycles>
    <meta:generator>LibreOffice/7.3.3.1$Linux_X86_64 LibreOffice_project/30$Build-1</meta:generator>
    <meta:document-statistic meta:table-count="2" meta:image-count="0" meta:object-count="0" meta:page-count="2" meta:paragraph-count="10" meta:word-count="58" meta:character-count="323" meta:non-whitespace-character-count="275"/>
  </office:meta>
</office:document-meta>
</file>