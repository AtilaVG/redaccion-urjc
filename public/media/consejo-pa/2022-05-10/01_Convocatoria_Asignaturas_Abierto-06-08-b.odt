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42EC265FC88E7C86.png" manifest:media-type="image/png"/>
  <manifest:file-entry manifest:full-path="Pictures/10000000000005D4000002413C0F70541D32920D.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KaitiM GB" svg:font-family="'AR PL KaitiM GB'" style:font-family-generic="system"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2" style:family="table">
      <style:table-properties style:width="6.6931in" table:align="margins" fo:keep-with-next="always" style:writing-mode="lr-tb"/>
    </style:style>
    <style:style style:name="Table2.A" style:family="table-column">
      <style:table-column-properties style:column-width="1.3389in" style:rel-column-width="13107*"/>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6931in" table:align="margins" fo:keep-with-next="always" style:writing-mode="lr-tb"/>
    </style:style>
    <style:style style:name="Table3.A" style:family="table-column">
      <style:table-column-properties style:column-width="1.1153in" style:rel-column-width="10922*"/>
    </style:style>
    <style:style style:name="Table3.F" style:family="table-column">
      <style:table-column-properties style:column-width="1.116in" style:rel-column-width="10925*"/>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F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6931in" table:align="margins" fo:keep-with-next="always" style:writing-mode="lr-tb"/>
    </style:style>
    <style:style style:name="Table4.A" style:family="table-column">
      <style:table-column-properties style:column-width="1.1153in" style:rel-column-width="10922*"/>
    </style:style>
    <style:style style:name="Table4.F" style:family="table-column">
      <style:table-column-properties style:column-width="1.116in" style:rel-column-width="10925*"/>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F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6.6931in" table:align="margins" fo:keep-with-next="always" style:writing-mode="lr-tb"/>
    </style:style>
    <style:style style:name="Table5.A" style:family="table-column">
      <style:table-column-properties style:column-width="1.1153in" style:rel-column-width="10922*"/>
    </style:style>
    <style:style style:name="Table5.F" style:family="table-column">
      <style:table-column-properties style:column-width="1.116in" style:rel-column-width="10925*"/>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F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6931in" table:align="margins" fo:keep-with-next="always" style:writing-mode="lr-tb"/>
    </style:style>
    <style:style style:name="Table6.A" style:family="table-column">
      <style:table-column-properties style:column-width="1.1153in" style:rel-column-width="10922*"/>
    </style:style>
    <style:style style:name="Table6.F" style:family="table-column">
      <style:table-column-properties style:column-width="1.116in" style:rel-column-width="10925*"/>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F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7715in" fo:margin-left="0.0625in" fo:margin-top="0in" fo:margin-bottom="0in" table:align="left" style:writing-mode="lr-tb"/>
    </style:style>
    <style:style style:name="Table1.A" style:family="table-column">
      <style:table-column-properties style:column-width="1.2597in"/>
    </style:style>
    <style:style style:name="Table1.B" style:family="table-column">
      <style:table-column-properties style:column-width="0.6368in"/>
    </style:style>
    <style:style style:name="Table1.C" style:family="table-column">
      <style:table-column-properties style:column-width="0.7007in"/>
    </style:style>
    <style:style style:name="Table1.D" style:family="table-column">
      <style:table-column-properties style:column-width="0.8278in"/>
    </style:style>
    <style:style style:name="Table1.E" style:family="table-column">
      <style:table-column-properties style:column-width="0.9556in"/>
    </style:style>
    <style:style style:name="Table1.F" style:family="table-column">
      <style:table-column-properties style:column-width="1.1951in"/>
    </style:style>
    <style:style style:name="Table1.G" style:family="table-column">
      <style:table-column-properties style:column-width="1.1958in"/>
    </style:style>
    <style:style style:name="Table1.1" style:family="table-row">
      <style:table-row-properties style:min-row-height="0.2438in" fo:keep-together="auto"/>
    </style:style>
    <style:style style:name="Table1.A1" style:family="table-cell">
      <style:table-cell-properties style:vertical-align="middle" fo:background-color="#ffffff" fo:padding-left="0.0208in" fo:padding-right="0.0208in" fo:padding-top="0.0104in" fo:padding-bottom="0.0104in" fo:border="3pt solid #d1d1d1">
        <style:background-image/>
      </style:table-cell-properties>
    </style:style>
    <style:style style:name="Table1.2" style:family="table-row">
      <style:table-row-properties fo:keep-together="auto"/>
    </style:style>
    <style:style style:name="Table1.A2" style:family="table-cell">
      <style:table-cell-properties fo:background-color="#ffffff" fo:padding-left="0.0208in" fo:padding-right="0.0208in" fo:padding-top="0.0104in" fo:padding-bottom="0.0104in" fo:border="3pt solid #d1d1d1">
        <style:background-image/>
      </style:table-cell-properties>
    </style:style>
    <style:style style:name="Table1.B2" style:family="table-cell">
      <style:table-cell-properties fo:background-color="#ffffff" fo:padding-left="0.0208in" fo:padding-right="0.0208in" fo:padding-top="0.0104in" fo:padding-bottom="0.0104in" fo:border="3pt solid #d1d1d1">
        <style:background-image/>
      </style:table-cell-properties>
    </style:style>
    <style:style style:name="Table1.C2" style:family="table-cell">
      <style:table-cell-properties fo:background-color="#ffffff" fo:padding-left="0.0208in" fo:padding-right="0.0208in" fo:padding-top="0.0104in" fo:padding-bottom="0.0104in" fo:border="3pt solid #d1d1d1">
        <style:background-image/>
      </style:table-cell-properties>
    </style:style>
    <style:style style:name="Table1.D2" style:family="table-cell">
      <style:table-cell-properties fo:background-color="#ffffff" fo:padding-left="0.0208in" fo:padding-right="0.0208in" fo:padding-top="0.0104in" fo:padding-bottom="0.0104in" fo:border="3pt solid #d1d1d1">
        <style:background-image/>
      </style:table-cell-properties>
    </style:style>
    <style:style style:name="Table1.E2" style:family="table-cell">
      <style:table-cell-properties fo:background-color="#ffffff" fo:padding-left="0.0208in" fo:padding-right="0.0208in" fo:padding-top="0.0104in" fo:padding-bottom="0.0104in" fo:border-left="3pt solid #d1d1d1" fo:border-right="none" fo:border-top="3pt solid #d1d1d1" fo:border-bottom="3pt solid #d1d1d1">
        <style:background-image/>
      </style:table-cell-properties>
    </style:style>
    <style:style style:name="Table1.F2" style:family="table-cell">
      <style:table-cell-properties fo:background-color="#ffffff" fo:padding-left="0.0208in" fo:padding-right="0.0208in" fo:padding-top="0.0104in" fo:padding-bottom="0.0104in" fo:border-left="3pt solid #d1d1d1" fo:border-right="none" fo:border-top="3pt solid #d1d1d1" fo:border-bottom="3pt solid #d1d1d1">
        <style:background-image/>
      </style:table-cell-properties>
    </style:style>
    <style:style style:name="Table1.G2" style:family="table-cell">
      <style:table-cell-properties fo:background-color="#ffffff" fo:padding-left="0.0208in" fo:padding-right="0.0208in" fo:padding-top="0.0104in" fo:padding-bottom="0.0104in" fo:border="3pt solid #d1d1d1">
        <style:background-image/>
      </style:table-cell-properties>
    </style:style>
    <style:style style:name="Table1.3" style:family="table-row">
      <style:table-row-properties fo:keep-together="auto"/>
    </style:style>
    <style:style style:name="Table1.A3" style:family="table-cell">
      <style:table-cell-properties fo:background-color="#ffffff" fo:padding-left="0.0208in" fo:padding-right="0.0208in" fo:padding-top="0.0104in" fo:padding-bottom="0.0104in" fo:border="3pt solid #d1d1d1">
        <style:background-image/>
      </style:table-cell-properties>
    </style:style>
    <style:style style:name="Table1.B3" style:family="table-cell">
      <style:table-cell-properties fo:background-color="#ffffff" fo:padding-left="0.0208in" fo:padding-right="0.0208in" fo:padding-top="0.0104in" fo:padding-bottom="0.0104in" fo:border="3pt solid #d1d1d1">
        <style:background-image/>
      </style:table-cell-properties>
    </style:style>
    <style:style style:name="Table1.4" style:family="table-row">
      <style:table-row-properties fo:keep-together="auto"/>
    </style:style>
    <style:style style:name="Table1.A4"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B4"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C4"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D4"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E4" style:family="table-cell">
      <style:table-cell-properties fo:background-color="#ffffff" fo:padding-left="0.0208in" fo:padding-right="0.0208in" fo:padding-top="0.0104in" fo:padding-bottom="0.0104in" fo:border-left="3pt solid #d1d1d1" fo:border-right="none" fo:border-top="none" fo:border-bottom="3pt solid #d1d1d1">
        <style:background-image/>
      </style:table-cell-properties>
    </style:style>
    <style:style style:name="Table1.F4" style:family="table-cell">
      <style:table-cell-properties fo:background-color="#ffffff" fo:padding-left="0.0208in" fo:padding-right="0.0208in" fo:padding-top="0.0104in" fo:padding-bottom="0.0104in" fo:border-left="3pt solid #d1d1d1" fo:border-right="none" fo:border-top="none" fo:border-bottom="3pt solid #d1d1d1">
        <style:background-image/>
      </style:table-cell-properties>
    </style:style>
    <style:style style:name="Table1.G4"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5" style:family="table-row">
      <style:table-row-properties fo:keep-together="auto"/>
    </style:style>
    <style:style style:name="Table1.A5"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B5"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C5"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D5"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E5" style:family="table-cell">
      <style:table-cell-properties fo:background-color="#ffffff" fo:padding-left="0.0208in" fo:padding-right="0.0208in" fo:padding-top="0.0104in" fo:padding-bottom="0.0104in" fo:border-left="3pt solid #d1d1d1" fo:border-right="none" fo:border-top="none" fo:border-bottom="3pt solid #d1d1d1">
        <style:background-image/>
      </style:table-cell-properties>
    </style:style>
    <style:style style:name="Table1.F5" style:family="table-cell">
      <style:table-cell-properties fo:background-color="#ffffff" fo:padding-left="0.0208in" fo:padding-right="0.0208in" fo:padding-top="0.0104in" fo:padding-bottom="0.0104in" fo:border-left="3pt solid #d1d1d1" fo:border-right="none" fo:border-top="none" fo:border-bottom="3pt solid #d1d1d1">
        <style:background-image/>
      </style:table-cell-properties>
    </style:style>
    <style:style style:name="Table1.G5"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6" style:family="table-row">
      <style:table-row-properties fo:keep-together="auto"/>
    </style:style>
    <style:style style:name="Table1.A6"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B6"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C6"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D6"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E6" style:family="table-cell">
      <style:table-cell-properties fo:background-color="#ffffff" fo:padding-left="0.0208in" fo:padding-right="0.0208in" fo:padding-top="0.0104in" fo:padding-bottom="0.0104in" fo:border-left="3pt solid #d1d1d1" fo:border-right="none" fo:border-top="none" fo:border-bottom="3pt solid #d1d1d1">
        <style:background-image/>
      </style:table-cell-properties>
    </style:style>
    <style:style style:name="Table1.F6" style:family="table-cell">
      <style:table-cell-properties fo:background-color="#ffffff" fo:padding-left="0.0208in" fo:padding-right="0.0208in" fo:padding-top="0.0104in" fo:padding-bottom="0.0104in" fo:border-left="3pt solid #d1d1d1" fo:border-right="none" fo:border-top="none" fo:border-bottom="3pt solid #d1d1d1">
        <style:background-image/>
      </style:table-cell-properties>
    </style:style>
    <style:style style:name="Table1.G6"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7" style:family="table-row">
      <style:table-row-properties fo:keep-together="auto"/>
    </style:style>
    <style:style style:name="Table1.A7" style:family="table-cell">
      <style:table-cell-properties fo:background-color="#ffffff" fo:padding-left="0.0208in" fo:padding-right="0.0208in" fo:padding-top="0.0104in" fo:padding-bottom="0.0104in" fo:border="3pt solid #d1d1d1">
        <style:background-image/>
      </style:table-cell-properties>
    </style:style>
    <style:style style:name="Table1.B7" style:family="table-cell">
      <style:table-cell-properties fo:background-color="#ffffff" fo:padding-left="0.0208in" fo:padding-right="0.0208in" fo:padding-top="0.0104in" fo:padding-bottom="0.0104in" fo:border="3pt solid #d1d1d1">
        <style:background-image/>
      </style:table-cell-properties>
    </style:style>
    <style:style style:name="Table1.C7" style:family="table-cell">
      <style:table-cell-properties fo:background-color="#ffffff" fo:padding-left="0.0208in" fo:padding-right="0.0208in" fo:padding-top="0.0104in" fo:padding-bottom="0.0104in" fo:border="3pt solid #d1d1d1">
        <style:background-image/>
      </style:table-cell-properties>
    </style:style>
    <style:style style:name="Table1.D7" style:family="table-cell">
      <style:table-cell-properties fo:background-color="#ffffff" fo:padding-left="0.0208in" fo:padding-right="0.0208in" fo:padding-top="0.0104in" fo:padding-bottom="0.0104in" fo:border="3pt solid #d1d1d1">
        <style:background-image/>
      </style:table-cell-properties>
    </style:style>
    <style:style style:name="Table1.E7" style:family="table-cell">
      <style:table-cell-properties fo:background-color="#ffffff" fo:padding-left="0.0208in" fo:padding-right="0.0208in" fo:padding-top="0.0104in" fo:padding-bottom="0.0104in" fo:border-left="3pt solid #d1d1d1" fo:border-right="none" fo:border-top="3pt solid #d1d1d1" fo:border-bottom="3pt solid #d1d1d1">
        <style:background-image/>
      </style:table-cell-properties>
    </style:style>
    <style:style style:name="Table1.F7" style:family="table-cell">
      <style:table-cell-properties fo:background-color="#ffffff" fo:padding-left="0.0208in" fo:padding-right="0.0208in" fo:padding-top="0.0104in" fo:padding-bottom="0.0104in" fo:border-left="3pt solid #d1d1d1" fo:border-right="none" fo:border-top="3pt solid #d1d1d1" fo:border-bottom="3pt solid #d1d1d1">
        <style:background-image/>
      </style:table-cell-properties>
    </style:style>
    <style:style style:name="Table1.G7" style:family="table-cell">
      <style:table-cell-properties fo:background-color="#ffffff" fo:padding-left="0.0208in" fo:padding-right="0.0208in" fo:padding-top="0.0104in" fo:padding-bottom="0.0104in" fo:border="3pt solid #d1d1d1">
        <style:background-image/>
      </style:table-cell-properties>
    </style:style>
    <style:style style:name="Table1.8" style:family="table-row">
      <style:table-row-properties fo:keep-together="auto"/>
    </style:style>
    <style:style style:name="Table1.A8" style:family="table-cell">
      <style:table-cell-properties fo:background-color="#ffffff" fo:padding-left="0.0208in" fo:padding-right="0.0208in" fo:padding-top="0.0104in" fo:padding-bottom="0.0104in" fo:border="3pt solid #d1d1d1">
        <style:background-image/>
      </style:table-cell-properties>
    </style:style>
    <style:style style:name="Table1.B8" style:family="table-cell">
      <style:table-cell-properties fo:background-color="#ffffff" fo:padding-left="0.0208in" fo:padding-right="0.0208in" fo:padding-top="0.0104in" fo:padding-bottom="0.0104in" fo:border="3pt solid #d1d1d1">
        <style:background-image/>
      </style:table-cell-properties>
    </style:style>
    <style:style style:name="Table1.C8" style:family="table-cell">
      <style:table-cell-properties fo:background-color="#ffffff" fo:padding-left="0.0208in" fo:padding-right="0.0208in" fo:padding-top="0.0104in" fo:padding-bottom="0.0104in" fo:border="3pt solid #d1d1d1">
        <style:background-image/>
      </style:table-cell-properties>
    </style:style>
    <style:style style:name="Table1.D8" style:family="table-cell">
      <style:table-cell-properties fo:background-color="#ffffff" fo:padding-left="0.0208in" fo:padding-right="0.0208in" fo:padding-top="0.0104in" fo:padding-bottom="0.0104in" fo:border="3pt solid #d1d1d1">
        <style:background-image/>
      </style:table-cell-properties>
    </style:style>
    <style:style style:name="Table1.E8" style:family="table-cell">
      <style:table-cell-properties fo:background-color="#ffffff" fo:padding-left="0.0208in" fo:padding-right="0.0208in" fo:padding-top="0.0104in" fo:padding-bottom="0.0104in" fo:border-left="3pt solid #d1d1d1" fo:border-right="none" fo:border-top="3pt solid #d1d1d1" fo:border-bottom="3pt solid #d1d1d1">
        <style:background-image/>
      </style:table-cell-properties>
    </style:style>
    <style:style style:name="Table1.F8" style:family="table-cell">
      <style:table-cell-properties fo:background-color="#ffffff" fo:padding-left="0.0208in" fo:padding-right="0.0208in" fo:padding-top="0.0104in" fo:padding-bottom="0.0104in" fo:border-left="3pt solid #d1d1d1" fo:border-right="none" fo:border-top="3pt solid #d1d1d1" fo:border-bottom="3pt solid #d1d1d1">
        <style:background-image/>
      </style:table-cell-properties>
    </style:style>
    <style:style style:name="Table1.G8" style:family="table-cell">
      <style:table-cell-properties fo:background-color="#ffffff" fo:padding-left="0.0208in" fo:padding-right="0.0208in" fo:padding-top="0.0104in" fo:padding-bottom="0.0104in" fo:border="3pt solid #d1d1d1">
        <style:background-image/>
      </style:table-cell-properties>
    </style:style>
    <style:style style:name="Table1.9" style:family="table-row">
      <style:table-row-properties fo:keep-together="auto"/>
    </style:style>
    <style:style style:name="Table1.A9" style:family="table-cell">
      <style:table-cell-properties fo:background-color="#ffffff" fo:padding-left="0.0208in" fo:padding-right="0.0208in" fo:padding-top="0.0104in" fo:padding-bottom="0.0104in" fo:border="3pt solid #d1d1d1">
        <style:background-image/>
      </style:table-cell-properties>
    </style:style>
    <style:style style:name="Table1.B9" style:family="table-cell">
      <style:table-cell-properties fo:background-color="#ffffff" fo:padding-left="0.0208in" fo:padding-right="0.0208in" fo:padding-top="0.0104in" fo:padding-bottom="0.0104in" fo:border="3pt solid #d1d1d1">
        <style:background-image/>
      </style:table-cell-properties>
    </style:style>
    <style:style style:name="Table1.C9" style:family="table-cell">
      <style:table-cell-properties fo:background-color="#ffffff" fo:padding-left="0.0208in" fo:padding-right="0.0208in" fo:padding-top="0.0104in" fo:padding-bottom="0.0104in" fo:border="3pt solid #d1d1d1">
        <style:background-image/>
      </style:table-cell-properties>
    </style:style>
    <style:style style:name="Table1.D9" style:family="table-cell">
      <style:table-cell-properties fo:background-color="#ffffff" fo:padding-left="0.0208in" fo:padding-right="0.0208in" fo:padding-top="0.0104in" fo:padding-bottom="0.0104in" fo:border="3pt solid #d1d1d1">
        <style:background-image/>
      </style:table-cell-properties>
    </style:style>
    <style:style style:name="Table1.E9" style:family="table-cell">
      <style:table-cell-properties fo:background-color="#ffffff" fo:padding-left="0.0208in" fo:padding-right="0.0208in" fo:padding-top="0.0104in" fo:padding-bottom="0.0104in" fo:border-left="3pt solid #d1d1d1" fo:border-right="none" fo:border-top="3pt solid #d1d1d1" fo:border-bottom="3pt solid #d1d1d1">
        <style:background-image/>
      </style:table-cell-properties>
    </style:style>
    <style:style style:name="Table1.F9" style:family="table-cell">
      <style:table-cell-properties fo:background-color="#ffffff" fo:padding-left="0.0208in" fo:padding-right="0.0208in" fo:padding-top="0.0104in" fo:padding-bottom="0.0104in" fo:border-left="3pt solid #d1d1d1" fo:border-right="none" fo:border-top="3pt solid #d1d1d1" fo:border-bottom="3pt solid #d1d1d1">
        <style:background-image/>
      </style:table-cell-properties>
    </style:style>
    <style:style style:name="Table1.G9" style:family="table-cell">
      <style:table-cell-properties fo:background-color="#ffffff" fo:padding-left="0.0208in" fo:padding-right="0.0208in" fo:padding-top="0.0104in" fo:padding-bottom="0.0104in" fo:border="3pt solid #d1d1d1">
        <style:background-image/>
      </style:table-cell-properties>
    </style:style>
    <style:style style:name="Table1.10" style:family="table-row">
      <style:table-row-properties fo:keep-together="auto"/>
    </style:style>
    <style:style style:name="Table1.A10" style:family="table-cell">
      <style:table-cell-properties fo:background-color="#ffffff" fo:padding-left="0.0208in" fo:padding-right="0.0208in" fo:padding-top="0.0104in" fo:padding-bottom="0.0104in" fo:border="3pt solid #d1d1d1">
        <style:background-image/>
      </style:table-cell-properties>
    </style:style>
    <style:style style:name="Table1.B10" style:family="table-cell">
      <style:table-cell-properties fo:background-color="#ffffff" fo:padding-left="0.0208in" fo:padding-right="0.0208in" fo:padding-top="0.0104in" fo:padding-bottom="0.0104in" fo:border="3pt solid #d1d1d1">
        <style:background-image/>
      </style:table-cell-properties>
    </style:style>
    <style:style style:name="Table1.C10" style:family="table-cell">
      <style:table-cell-properties fo:background-color="#ffffff" fo:padding-left="0.0208in" fo:padding-right="0.0208in" fo:padding-top="0.0104in" fo:padding-bottom="0.0104in" fo:border="3pt solid #d1d1d1">
        <style:background-image/>
      </style:table-cell-properties>
    </style:style>
    <style:style style:name="Table1.D10" style:family="table-cell">
      <style:table-cell-properties fo:background-color="#ffffff" fo:padding-left="0.0208in" fo:padding-right="0.0208in" fo:padding-top="0.0104in" fo:padding-bottom="0.0104in" fo:border="3pt solid #d1d1d1">
        <style:background-image/>
      </style:table-cell-properties>
    </style:style>
    <style:style style:name="Table1.E10" style:family="table-cell">
      <style:table-cell-properties fo:background-color="#ffffff" fo:padding-left="0.0208in" fo:padding-right="0.0208in" fo:padding-top="0.0104in" fo:padding-bottom="0.0104in" fo:border-left="3pt solid #d1d1d1" fo:border-right="none" fo:border-top="3pt solid #d1d1d1" fo:border-bottom="3pt solid #d1d1d1">
        <style:background-image/>
      </style:table-cell-properties>
    </style:style>
    <style:style style:name="Table1.F10" style:family="table-cell">
      <style:table-cell-properties fo:background-color="#ffffff" fo:padding-left="0.0208in" fo:padding-right="0.0208in" fo:padding-top="0.0104in" fo:padding-bottom="0.0104in" fo:border-left="3pt solid #d1d1d1" fo:border-right="none" fo:border-top="3pt solid #d1d1d1" fo:border-bottom="3pt solid #d1d1d1">
        <style:background-image/>
      </style:table-cell-properties>
    </style:style>
    <style:style style:name="Table1.G10" style:family="table-cell">
      <style:table-cell-properties fo:background-color="#ffffff" fo:padding-left="0.0208in" fo:padding-right="0.0208in" fo:padding-top="0.0104in" fo:padding-bottom="0.0104in" fo:border="3pt solid #d1d1d1">
        <style:background-image/>
      </style:table-cell-properties>
    </style:style>
    <style:style style:name="Table1.11" style:family="table-row">
      <style:table-row-properties fo:keep-together="auto"/>
    </style:style>
    <style:style style:name="Table1.A11" style:family="table-cell">
      <style:table-cell-properties fo:background-color="#ffffff" fo:padding-left="0.0208in" fo:padding-right="0.0208in" fo:padding-top="0.0104in" fo:padding-bottom="0.0104in" fo:border="3pt solid #d1d1d1">
        <style:background-image/>
      </style:table-cell-properties>
    </style:style>
    <style:style style:name="Table1.B11" style:family="table-cell">
      <style:table-cell-properties fo:background-color="#ffffff" fo:padding-left="0.0208in" fo:padding-right="0.0208in" fo:padding-top="0.0104in" fo:padding-bottom="0.0104in" fo:border="3pt solid #d1d1d1">
        <style:background-image/>
      </style:table-cell-properties>
    </style:style>
    <style:style style:name="Table1.C11" style:family="table-cell">
      <style:table-cell-properties fo:background-color="#ffffff" fo:padding-left="0.0208in" fo:padding-right="0.0208in" fo:padding-top="0.0104in" fo:padding-bottom="0.0104in" fo:border="3pt solid #d1d1d1">
        <style:background-image/>
      </style:table-cell-properties>
    </style:style>
    <style:style style:name="Table1.D11" style:family="table-cell">
      <style:table-cell-properties fo:background-color="#ffffff" fo:padding-left="0.0208in" fo:padding-right="0.0208in" fo:padding-top="0.0104in" fo:padding-bottom="0.0104in" fo:border="3pt solid #d1d1d1">
        <style:background-image/>
      </style:table-cell-properties>
    </style:style>
    <style:style style:name="Table1.E11" style:family="table-cell">
      <style:table-cell-properties fo:background-color="#ffffff" fo:padding-left="0.0208in" fo:padding-right="0.0208in" fo:padding-top="0.0104in" fo:padding-bottom="0.0104in" fo:border-left="3pt solid #d1d1d1" fo:border-right="none" fo:border-top="3pt solid #d1d1d1" fo:border-bottom="3pt solid #d1d1d1">
        <style:background-image/>
      </style:table-cell-properties>
    </style:style>
    <style:style style:name="Table1.F11" style:family="table-cell">
      <style:table-cell-properties fo:background-color="#ffffff" fo:padding-left="0.0208in" fo:padding-right="0.0208in" fo:padding-top="0.0104in" fo:padding-bottom="0.0104in" fo:border-left="3pt solid #d1d1d1" fo:border-right="none" fo:border-top="3pt solid #d1d1d1" fo:border-bottom="3pt solid #d1d1d1">
        <style:background-image/>
      </style:table-cell-properties>
    </style:style>
    <style:style style:name="Table1.G11" style:family="table-cell">
      <style:table-cell-properties fo:background-color="#ffffff" fo:padding-left="0.0208in" fo:padding-right="0.0208in" fo:padding-top="0.0104in" fo:padding-bottom="0.0104in" fo:border="3pt solid #d1d1d1">
        <style:background-image/>
      </style:table-cell-properties>
    </style:style>
    <style:style style:name="P1" style:family="paragraph" style:parent-style-name="Footnote">
      <style:text-properties officeooo:rsid="001744c9" officeooo:paragraph-rsid="001744c9"/>
    </style:style>
    <style:style style:name="P2" style:family="paragraph" style:parent-style-name="Standard">
      <style:paragraph-properties fo:text-align="justify"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fo:break-before="page"/>
    </style:style>
    <style:style style:name="P5" style:family="paragraph" style:parent-style-name="Text_20_body">
      <style:paragraph-properties fo:text-align="justify" style:justify-single-word="false"/>
      <style:text-properties officeooo:paragraph-rsid="00193297"/>
    </style:style>
    <style:style style:name="P6" style:family="paragraph" style:parent-style-name="Text_20_body">
      <style:paragraph-properties fo:text-align="justify" style:justify-single-word="false"/>
      <style:text-properties officeooo:paragraph-rsid="002cbde8"/>
    </style:style>
    <style:style style:name="P7" style:family="paragraph" style:parent-style-name="Text_20_body">
      <style:paragraph-properties fo:text-align="justify" style:justify-single-word="false"/>
      <style:text-properties officeooo:paragraph-rsid="002e5bda"/>
    </style:style>
    <style:style style:name="P8" style:family="paragraph" style:parent-style-name="Standard">
      <style:paragraph-properties fo:hyphenation-ladder-count="no-limit"/>
      <style:text-properties style:font-name="Arial" fo:font-size="9.5pt" style:letter-kerning="false" fo:background-color="#faf9f8" style:font-name-asian="Times New Roman1" style:font-size-asian="9.5pt" style:rfc-language-tag-asian="es-ES-u-co-trad" style:language-asian="es" style:country-asian="ES" style:font-name-complex="Arial1" style:font-size-complex="9.5pt" style:language-complex="ar" style:country-complex="SA" fo:hyphenate="true" fo:hyphenation-remain-char-count="2" fo:hyphenation-push-char-count="2" loext:hyphenation-no-caps="false"/>
    </style:style>
    <style:style style:name="P9" style:family="paragraph" style:parent-style-name="Text_20_body">
      <style:paragraph-properties fo:margin-left="0.4925in" fo:margin-right="0in" fo:text-indent="-0.4925in" style:auto-text-indent="false"/>
    </style:style>
    <style:style style:name="P10" style:family="paragraph" style:parent-style-name="Text_20_body">
      <style:paragraph-properties fo:margin-left="0.75in" fo:margin-right="0in" fo:text-indent="0in" style:auto-text-indent="false"/>
    </style:style>
    <style:style style:name="P11" style:family="paragraph" style:parent-style-name="Text_20_body">
      <style:paragraph-properties fo:break-before="page"/>
    </style:style>
    <style:style style:name="P12" style:family="paragraph" style:parent-style-name="Standard">
      <style:paragraph-properties fo:text-align="center" style:justify-single-word="false" fo:orphans="0" fo:widows="0" fo:hyphenation-ladder-count="no-limit"/>
      <style:text-properties fo:color="#000000" loext:opacity="100%" style:font-name="Segoe UI" fo:font-size="10pt" style:letter-kerning="false" style:font-name-asian="Times New Roman1" style:font-size-asian="10pt" style:rfc-language-tag-asian="es-ES-u-co-trad" style:language-asian="es" style:country-asian="ES" style:font-name-complex="Segoe UI1" style:font-size-complex="10pt" style:language-complex="ar" style:country-complex="SA" fo:hyphenate="true" fo:hyphenation-remain-char-count="2" fo:hyphenation-push-char-count="2" loext:hyphenation-no-caps="false"/>
    </style:style>
    <style:style style:name="P13" style:family="paragraph" style:parent-style-name="Standard">
      <style:paragraph-properties fo:margin-top="0in" fo:margin-bottom="0in" style:contextual-spacing="false" fo:text-align="center" style:justify-single-word="false" fo:orphans="0" fo:widows="0" fo:hyphenation-ladder-count="no-limit" style:writing-mode="lr-tb"/>
      <style:text-properties fo:color="#000000" loext:opacity="100%" style:font-name="Segoe UI" fo:font-size="10pt" style:letter-kerning="false" style:font-name-asian="Times New Roman1" style:font-size-asian="10pt" style:rfc-language-tag-asian="es-ES-u-co-trad" style:language-asian="es" style:country-asian="ES" style:font-name-complex="Segoe UI1" style:font-size-complex="10pt" style:language-complex="ar" style:country-complex="SA" fo:hyphenate="true" fo:hyphenation-remain-char-count="2" fo:hyphenation-push-char-count="2" loext:hyphenation-no-caps="false"/>
    </style:style>
    <style:style style:name="P14" style:family="paragraph" style:parent-style-name="Standard">
      <style:paragraph-properties fo:text-align="center" style:justify-single-word="false" fo:orphans="0" fo:widows="0" fo:hyphenation-ladder-count="no-limit"/>
      <style:text-properties fo:color="#000000" loext:opacity="100%" style:font-name="Segoe UI" fo:font-size="10pt" officeooo:rsid="003ae36b" officeooo:paragraph-rsid="003ae36b" style:letter-kerning="false" style:font-name-asian="Times New Roman1" style:font-size-asian="10pt" style:rfc-language-tag-asian="es-ES-u-co-trad" style:language-asian="es" style:country-asian="ES" style:font-name-complex="Segoe UI1" style:font-size-complex="10pt" style:language-complex="ar" style:country-complex="SA" fo:hyphenate="true" fo:hyphenation-remain-char-count="2" fo:hyphenation-push-char-count="2" loext:hyphenation-no-caps="false"/>
    </style:style>
    <style:style style:name="P15" style:family="paragraph" style:parent-style-name="Standard">
      <style:paragraph-properties fo:text-align="center" style:justify-single-word="false" fo:orphans="0" fo:widows="0" fo:hyphenation-ladder-count="no-limit"/>
      <style:text-properties fo:color="#000000" loext:opacity="100%" style:font-name="Liberation Serif" fo:font-size="8pt" style:letter-kerning="false" style:font-name-asian="Times New Roman1" style:font-size-asian="8pt" style:rfc-language-tag-asian="es-ES-u-co-trad" style:language-asian="es" style:country-asian="ES" style:font-name-complex="Segoe UI1" style:font-size-complex="8pt" style:language-complex="ar" style:country-complex="SA" fo:hyphenate="true" fo:hyphenation-remain-char-count="2" fo:hyphenation-push-char-count="2" loext:hyphenation-no-caps="false"/>
    </style:style>
    <style:style style:name="P16" style:family="paragraph" style:parent-style-name="Standard">
      <style:paragraph-properties fo:margin-top="0in" fo:margin-bottom="0in" style:contextual-spacing="false" fo:text-align="center" style:justify-single-word="false" fo:orphans="0" fo:widows="0" fo:hyphenation-ladder-count="no-limit" style:writing-mode="lr-tb"/>
      <style:text-properties fo:color="#000000" loext:opacity="100%" style:font-name="Liberation Serif" fo:font-size="8pt" style:letter-kerning="false" style:font-name-asian="Times New Roman1" style:font-size-asian="8pt" style:rfc-language-tag-asian="es-ES-u-co-trad" style:language-asian="es" style:country-asian="ES" style:font-name-complex="Segoe UI1" style:font-size-complex="8pt" style:language-complex="ar" style:country-complex="SA" fo:hyphenate="true" fo:hyphenation-remain-char-count="2" fo:hyphenation-push-char-count="2" loext:hyphenation-no-caps="false"/>
    </style:style>
    <style:style style:name="P17" style:family="paragraph" style:parent-style-name="Standard">
      <style:paragraph-properties fo:text-align="center" style:justify-single-word="false" fo:orphans="0" fo:widows="0" fo:hyphenation-ladder-count="no-limit"/>
      <style:text-properties fo:color="#000000" loext:opacity="100%" style:font-name="Liberation Serif" fo:font-size="8pt" officeooo:rsid="003ae36b" officeooo:paragraph-rsid="003ae36b" style:letter-kerning="false" style:font-name-asian="Times New Roman1" style:font-size-asian="8pt" style:rfc-language-tag-asian="es-ES-u-co-trad" style:language-asian="es" style:country-asian="ES" style:font-name-complex="Segoe UI1" style:font-size-complex="8pt" style:language-complex="ar" style:country-complex="SA" fo:hyphenate="true" fo:hyphenation-remain-char-count="2" fo:hyphenation-push-char-count="2" loext:hyphenation-no-caps="false"/>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e49c1" officeooo:paragraph-rsid="003e49c1" style:font-size-asian="8pt" style:font-style-asian="normal" style:font-weight-asian="normal" style:font-size-complex="8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paragraph-rsid="00443c2e" style:font-size-asian="8pt" style:font-style-asian="normal" style:font-weight-asian="normal" style:font-size-complex="8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paragraph-rsid="0047042b" style:font-size-asian="8pt" style:font-style-asian="normal" style:font-weight-asian="normal" style:font-size-complex="8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f56d9" officeooo:paragraph-rsid="003f56d9" style:font-size-asian="8pt" style:font-style-asian="normal" style:font-weight-asian="normal" style:font-size-complex="8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4000c1" officeooo:paragraph-rsid="004000c1" style:font-size-asian="8pt" style:font-style-asian="normal" style:font-weight-asian="normal" style:font-size-complex="8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443c2e" officeooo:paragraph-rsid="00443c2e" style:font-size-asian="8pt" style:font-style-asian="normal" style:font-weight-asian="normal" style:font-size-complex="8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443c2e" officeooo:paragraph-rsid="0047042b" style:font-size-asian="8pt" style:font-style-asian="normal" style:font-weight-asian="normal" style:font-size-complex="8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457edb" officeooo:paragraph-rsid="00457edb" style:font-size-asian="8pt" style:font-style-asian="normal" style:font-weight-asian="normal" style:font-size-complex="8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4d8605" officeooo:paragraph-rsid="004d8605" style:font-size-asian="8pt" style:font-style-asian="normal" style:font-weight-asian="normal" style:font-size-complex="8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2171d" officeooo:paragraph-rsid="0052171d" style:font-size-asian="8pt" style:font-style-asian="normal" style:font-weight-asian="normal" style:font-size-complex="8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3126b" officeooo:paragraph-rsid="0053126b" style:font-size-asian="8pt" style:font-style-asian="normal" style:font-weight-asian="normal" style:font-size-complex="8pt" style:font-style-complex="normal" style:font-weight-complex="normal" style:text-overline-style="none" style:text-overline-color="font-color"/>
    </style:style>
    <style:style style:name="P30" style:family="paragraph" style:parent-style-name="Title">
      <style:paragraph-properties fo:text-align="start" style:justify-single-word="false"/>
      <style:text-properties fo:font-size="20pt" style:font-size-asian="20pt" style:font-size-complex="20pt"/>
    </style:style>
    <style:style style:name="P31" style:family="paragraph" style:parent-style-name="Footnote">
      <style:text-properties officeooo:rsid="0018d6be" officeooo:paragraph-rsid="0018d6be"/>
    </style:style>
    <style:style style:name="P32" style:family="paragraph" style:parent-style-name="Footnote">
      <style:text-properties officeooo:paragraph-rsid="0019012d"/>
    </style:style>
    <style:style style:name="P33" style:family="paragraph" style:parent-style-name="Text_20_body">
      <style:text-properties officeooo:paragraph-rsid="001b6c98"/>
    </style:style>
    <style:style style:name="P34" style:family="paragraph" style:parent-style-name="Text_20_body">
      <style:text-properties fo:font-style="italic" officeooo:paragraph-rsid="001b6c98" style:font-style-asian="italic" style:font-style-complex="italic"/>
    </style:style>
    <style:style style:name="P35" style:family="paragraph" style:parent-style-name="Text_20_body">
      <style:text-properties officeooo:paragraph-rsid="0026d263"/>
    </style:style>
    <style:style style:name="P36" style:family="paragraph" style:parent-style-name="Table">
      <style:text-properties officeooo:paragraph-rsid="004267ca"/>
    </style:style>
    <style:style style:name="P37" style:family="paragraph" style:parent-style-name="Text_20_body">
      <style:text-properties fo:font-size="9pt" officeooo:paragraph-rsid="00443c2e" style:font-size-asian="9pt" style:font-size-complex="9pt"/>
    </style:style>
    <style:style style:name="P38" style:family="paragraph" style:parent-style-name="Text_20_body">
      <style:text-properties officeooo:paragraph-rsid="003687c9"/>
    </style:style>
    <style:style style:name="P39" style:family="paragraph" style:parent-style-name="Text_20_body">
      <style:text-properties officeooo:paragraph-rsid="004f24a6"/>
    </style:style>
    <style:style style:name="P40" style:family="paragraph" style:parent-style-name="Footnote">
      <style:text-properties officeooo:paragraph-rsid="0019012d"/>
    </style:style>
    <style:style style:name="P41" style:family="paragraph" style:parent-style-name="Footnote">
      <style:text-properties officeooo:rsid="0057c815" officeooo:paragraph-rsid="0057c815"/>
    </style:style>
    <style:style style:name="P42" style:family="paragraph" style:parent-style-name="Heading_20_1" style:list-style-name="WWNum2"/>
    <style:style style:name="P43" style:family="paragraph" style:parent-style-name="Heading_20_1" style:list-style-name="WWNum2">
      <style:text-properties officeooo:paragraph-rsid="0057c815"/>
    </style:style>
    <style:style style:name="P44" style:family="paragraph" style:parent-style-name="Standard">
      <style:paragraph-properties fo:text-align="center" style:justify-single-word="false" fo:orphans="0" fo:widows="0" fo:hyphenation-ladder-count="no-limit"/>
      <style:text-properties fo:color="#000000" loext:opacity="100%" style:font-name="Liberation Serif" fo:font-size="8pt" style:letter-kerning="false" style:font-name-asian="Times New Roman1" style:font-size-asian="8pt" style:rfc-language-tag-asian="es-ES-u-co-trad" style:language-asian="es" style:country-asian="ES" style:font-name-complex="Segoe UI1" style:font-size-complex="8pt" style:language-complex="ar" style:country-complex="SA" fo:hyphenate="true" fo:hyphenation-remain-char-count="2" fo:hyphenation-push-char-count="2" loext:hyphenation-no-caps="false"/>
    </style:style>
    <style:style style:name="P45" style:family="paragraph" style:parent-style-name="Standard">
      <style:paragraph-properties fo:margin-top="0in" fo:margin-bottom="0in" style:contextual-spacing="false" fo:text-align="center" style:justify-single-word="false" fo:orphans="0" fo:widows="0" fo:hyphenation-ladder-count="no-limit" style:writing-mode="lr-tb"/>
      <style:text-properties fo:color="#000000" loext:opacity="100%" style:font-name="Liberation Serif" fo:font-size="8pt" style:letter-kerning="false" style:font-name-asian="Times New Roman1" style:font-size-asian="8pt" style:rfc-language-tag-asian="es-ES-u-co-trad" style:language-asian="es" style:country-asian="ES" style:font-name-complex="Segoe UI1" style:font-size-complex="8pt" style:language-complex="ar" style:country-complex="SA" fo:hyphenate="true" fo:hyphenation-remain-char-count="2" fo:hyphenation-push-char-count="2" loext:hyphenation-no-caps="false"/>
    </style:style>
    <style:style style:name="P46" style:family="paragraph" style:parent-style-name="Standard">
      <style:paragraph-properties fo:text-align="center" style:justify-single-word="false" fo:orphans="0" fo:widows="0" fo:hyphenation-ladder-count="no-limit"/>
      <style:text-properties fo:color="#000000" loext:opacity="100%" style:font-name="Segoe UI" fo:font-size="10pt" style:letter-kerning="false" style:font-name-asian="Times New Roman1" style:font-size-asian="10pt" style:rfc-language-tag-asian="es-ES-u-co-trad" style:language-asian="es" style:country-asian="ES" style:font-name-complex="Segoe UI1" style:font-size-complex="10pt" style:language-complex="ar" style:country-complex="SA" fo:hyphenate="true" fo:hyphenation-remain-char-count="2" fo:hyphenation-push-char-count="2" loext:hyphenation-no-caps="false"/>
    </style:style>
    <style:style style:name="P47" style:family="paragraph" style:parent-style-name="Standard">
      <style:paragraph-properties fo:margin-top="0in" fo:margin-bottom="0in" style:contextual-spacing="false" fo:text-align="center" style:justify-single-word="false" fo:orphans="0" fo:widows="0" fo:hyphenation-ladder-count="no-limit" style:writing-mode="lr-tb"/>
      <style:text-properties fo:color="#000000" loext:opacity="100%" style:font-name="Segoe UI" fo:font-size="10pt" style:letter-kerning="false" style:font-name-asian="Times New Roman1" style:font-size-asian="10pt" style:rfc-language-tag-asian="es-ES-u-co-trad" style:language-asian="es" style:country-asian="ES" style:font-name-complex="Segoe UI1" style:font-size-complex="10pt" style:language-complex="ar" style:country-complex="SA" fo:hyphenate="true" fo:hyphenation-remain-char-count="2" fo:hyphenation-push-char-count="2" loext:hyphenation-no-caps="false"/>
    </style:style>
    <style:style style:name="P48" style:family="paragraph" style:parent-style-name="Standard">
      <style:paragraph-properties fo:margin-top="0in" fo:margin-bottom="0in" style:contextual-spacing="false" fo:text-align="start" style:justify-single-word="false" fo:orphans="0" fo:widows="0" fo:hyphenation-ladder-count="no-limit" style:writing-mode="lr-tb"/>
      <style:text-properties fo:color="#000000" loext:opacity="100%" style:font-name="Segoe UI" fo:font-size="10pt" style:letter-kerning="false" style:font-name-asian="Times New Roman1" style:font-size-asian="10pt" style:rfc-language-tag-asian="es-ES-u-co-trad" style:language-asian="es" style:country-asian="ES" style:font-name-complex="Segoe UI1" style:font-size-complex="10pt" style:language-complex="ar" style:country-complex="SA" fo:hyphenate="true" fo:hyphenation-remain-char-count="2" fo:hyphenation-push-char-count="2" loext:hyphenation-no-caps="false"/>
    </style:style>
    <style:style style:name="P49" style:family="paragraph" style:parent-style-name="Standard">
      <style:paragraph-properties fo:margin-top="0in" fo:margin-bottom="0in" style:contextual-spacing="false" fo:line-height="100%" fo:text-align="center" style:justify-single-word="false" fo:orphans="0" fo:widows="0" fo:hyphenation-ladder-count="no-limit" style:writing-mode="lr-tb"/>
      <style:text-properties fo:hyphenate="true" fo:hyphenation-remain-char-count="2" fo:hyphenation-push-char-count="2" loext:hyphenation-no-caps="false"/>
    </style:style>
    <style:style style:name="P50" style:family="paragraph" style:parent-style-name="Standard">
      <style:paragraph-properties fo:margin-top="0in" fo:margin-bottom="0in" style:contextual-spacing="false" fo:line-height="100%" fo:text-align="center" style:justify-single-word="false" fo:orphans="0" fo:widows="0" fo:hyphenation-ladder-count="no-limit" style:writing-mode="lr-tb"/>
      <style:text-properties style:font-name="Calibri" style:font-name-asian="Calibri1" style:font-name-complex="Calibri1" fo:hyphenate="true" fo:hyphenation-remain-char-count="2" fo:hyphenation-push-char-count="2" loext:hyphenation-no-caps="false"/>
    </style:style>
    <style:style style:name="P51" style:family="paragraph" style:parent-style-name="Standard">
      <style:paragraph-properties fo:text-align="justify" style:justify-single-word="false"/>
    </style:style>
    <style:style style:name="P52" style:family="paragraph" style:parent-style-name="Table">
      <style:paragraph-properties fo:text-align="justify" style:justify-single-word="false"/>
      <style:text-properties style:font-name="Calibri" officeooo:paragraph-rsid="0047042b" style:font-name-asian="Calibri1" style:font-name-complex="Calibri1"/>
    </style:style>
    <style:style style:name="P53" style:family="paragraph" style:parent-style-name="Text_20_body" style:list-style-name="WWNum8"/>
    <style:style style:name="P54" style:family="paragraph" style:parent-style-name="Text_20_body" style:list-style-name="WWNum8">
      <style:text-properties officeooo:paragraph-rsid="001744c9"/>
    </style:style>
    <style:style style:name="P55" style:family="paragraph" style:parent-style-name="Text_20_body" style:list-style-name="WWNum8">
      <style:text-properties officeooo:paragraph-rsid="00254419"/>
    </style:style>
    <style:style style:name="P56" style:family="paragraph" style:parent-style-name="Text_20_body" style:list-style-name="WWNum4"/>
    <style:style style:name="P57" style:family="paragraph" style:parent-style-name="Text_20_body" style:list-style-name="WWNum3"/>
    <style:style style:name="P58" style:family="paragraph" style:list-style-name="WWNum5"/>
    <style:style style:name="P59" style:family="paragraph" style:parent-style-name="Text_20_body" style:list-style-name="WWNum5"/>
    <style:style style:name="P60" style:family="paragraph" style:parent-style-name="Text_20_body" style:list-style-name="WWNum5">
      <style:text-properties officeooo:paragraph-rsid="0032c8b0"/>
    </style:style>
    <style:style style:name="P61" style:family="paragraph" style:parent-style-name="Text_20_body" style:list-style-name="WWNum5">
      <style:text-properties officeooo:rsid="00314d48" officeooo:paragraph-rsid="00314d48"/>
    </style:style>
    <style:style style:name="P62" style:family="paragraph" style:parent-style-name="Text_20_body">
      <style:text-properties officeooo:paragraph-rsid="003687c9"/>
    </style:style>
    <style:style style:name="P63" style:family="paragraph" style:parent-style-name="Text_20_body">
      <style:paragraph-properties fo:text-align="justify" style:justify-single-word="false"/>
    </style:style>
    <style:style style:name="P64" style:family="paragraph" style:parent-style-name="Text_20_body">
      <style:paragraph-properties fo:text-align="justify" style:justify-single-word="false"/>
      <style:text-properties officeooo:paragraph-rsid="00193297"/>
    </style:style>
    <style:style style:name="P65" style:family="paragraph" style:parent-style-name="Text_20_body">
      <style:paragraph-properties fo:text-align="justify" style:justify-single-word="false"/>
      <style:text-properties officeooo:paragraph-rsid="002b90ab"/>
    </style:style>
    <style:style style:name="P66" style:family="paragraph" style:parent-style-name="Text_20_body">
      <style:paragraph-properties fo:text-align="justify" style:justify-single-word="false"/>
      <style:text-properties officeooo:paragraph-rsid="002e5bda"/>
    </style:style>
    <style:style style:name="P67" style:family="paragraph" style:parent-style-name="Text_20_body">
      <style:paragraph-properties fo:text-align="justify" style:justify-single-word="false"/>
      <style:text-properties officeooo:paragraph-rsid="0057c815"/>
    </style:style>
    <style:style style:name="P68" style:family="paragraph" style:parent-style-name="Text_20_body" style:list-style-name="List_20_1">
      <style:paragraph-properties fo:text-align="justify" style:justify-single-word="false"/>
      <style:text-properties officeooo:paragraph-rsid="0057c815"/>
    </style:style>
    <style:style style:name="P69" style:family="paragraph" style:parent-style-name="Text_20_body">
      <style:paragraph-properties fo:margin-left="0.4925in" fo:margin-right="0in" fo:text-indent="-0.4925in" style:auto-text-indent="false"/>
    </style:style>
    <style:style style:name="P70" style:family="paragraph" style:parent-style-name="Text_20_body">
      <style:text-properties officeooo:paragraph-rsid="0026d263"/>
    </style:style>
    <style:style style:name="P71" style:family="paragraph" style:parent-style-name="Text_20_body">
      <style:text-properties officeooo:paragraph-rsid="00254419"/>
    </style:style>
    <style:style style:name="P72" style:family="paragraph" style:parent-style-name="Text_20_body">
      <style:text-properties officeooo:paragraph-rsid="0032c8b0"/>
    </style:style>
    <style:style style:name="P73" style:family="paragraph" style:parent-style-name="Text_20_body">
      <style:text-properties fo:font-weight="bold" style:font-weight-asian="bold" style:font-weight-complex="bold"/>
    </style:style>
    <style:style style:name="P74" style:family="paragraph" style:parent-style-name="Text_20_body" style:list-style-name="WWNum2"/>
    <style:style style:name="P75" style:family="paragraph" style:parent-style-name="Text_20_body">
      <style:text-properties officeooo:rsid="005a549b" officeooo:paragraph-rsid="005a549b"/>
    </style:style>
    <style:style style:name="P76" style:family="paragraph" style:parent-style-name="Text_20_body">
      <style:text-properties fo:font-style="italic" officeooo:rsid="005a549b" officeooo:paragraph-rsid="005a549b" style:font-style-asian="italic" style:font-style-complex="italic"/>
    </style:style>
    <style:style style:name="P77" style:family="paragraph" style:parent-style-name="Text_20_body">
      <style:paragraph-properties fo:margin-top="0in" fo:margin-bottom="0.0972in" style:contextual-spacing="false" fo:line-height="115%" fo:text-align="justify" style:justify-single-word="false" fo:orphans="2" fo:widows="2" fo:hyphenation-ladder-count="no-limit" style:writing-mode="lr-tb"/>
      <style:text-properties officeooo:paragraph-rsid="001744c9" fo:hyphenate="false" fo:hyphenation-remain-char-count="2" fo:hyphenation-push-char-count="2" loext:hyphenation-no-caps="false"/>
    </style:style>
    <style:style style:name="P78" style:family="paragraph" style:parent-style-name="Text_20_body">
      <style:text-properties officeooo:paragraph-rsid="001744c9"/>
    </style:style>
    <style:style style:name="P79" style:family="paragraph" style:parent-style-name="Text_20_body">
      <style:text-properties officeooo:rsid="005b9abf" officeooo:paragraph-rsid="005b9abf"/>
    </style:style>
    <style:style style:name="P8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8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color="#000000" loext:opacity="100%"/>
    </style:style>
    <style:style style:name="T2" style:family="text">
      <style:text-properties fo:color="#000000" loext:opacity="100%" officeooo:rsid="001e4443"/>
    </style:style>
    <style:style style:name="T3" style:family="text">
      <style:text-properties fo:color="#000000" loext:opacity="100%" officeooo:rsid="001fde1e"/>
    </style:style>
    <style:style style:name="T4" style:family="text">
      <style:text-properties fo:color="#ff0000" loext:opacity="100%"/>
    </style:style>
    <style:style style:name="T5" style:family="text">
      <style:text-properties style:language-asian="es" style:country-asian="ES"/>
    </style:style>
    <style:style style:name="T6" style:family="text">
      <style:text-properties officeooo:rsid="003687c9" style:language-asian="es" style:country-asian="ES"/>
    </style:style>
    <style:style style:name="T7" style:family="text">
      <style:text-properties fo:language="en" fo:country="US"/>
    </style:style>
    <style:style style:name="T8" style:family="text">
      <style:text-properties fo:font-weight="bold" style:font-weight-asian="bold" style:font-weight-complex="bold"/>
    </style:style>
    <style:style style:name="T9" style:family="text">
      <style:text-properties fo:font-weight="bold" officeooo:rsid="00199d85" style:font-weight-asian="bold" style:font-weight-complex="bold"/>
    </style:style>
    <style:style style:name="T10" style:family="text">
      <style:text-properties fo:font-weight="bold" officeooo:rsid="00193297" style:font-weight-asian="bold" style:font-weight-complex="bold"/>
    </style:style>
    <style:style style:name="T11" style:family="text">
      <style:text-properties fo:color="#242424" loext:opacity="100%"/>
    </style:style>
    <style:style style:name="T12" style:family="text">
      <style:text-properties officeooo:rsid="001744c9"/>
    </style:style>
    <style:style style:name="T13" style:family="text">
      <style:text-properties officeooo:rsid="00181a78"/>
    </style:style>
    <style:style style:name="T14" style:family="text">
      <style:text-properties officeooo:rsid="0018d6be"/>
    </style:style>
    <style:style style:name="T15" style:family="text">
      <style:text-properties officeooo:rsid="0019012d"/>
    </style:style>
    <style:style style:name="T16" style:family="text">
      <style:text-properties officeooo:rsid="00193297"/>
    </style:style>
    <style:style style:name="T17" style:family="text">
      <style:text-properties officeooo:rsid="001b11d9"/>
    </style:style>
    <style:style style:name="T18" style:family="text">
      <style:text-properties officeooo:rsid="001b6c98"/>
    </style:style>
    <style:style style:name="T19" style:family="text">
      <style:text-properties officeooo:rsid="001cd396"/>
    </style:style>
    <style:style style:name="T20" style:family="text">
      <style:text-properties officeooo:rsid="001e4443"/>
    </style:style>
    <style:style style:name="T21" style:family="text">
      <style:text-properties officeooo:rsid="001fde1e"/>
    </style:style>
    <style:style style:name="T22" style:family="text">
      <style:text-properties officeooo:rsid="001ff361"/>
    </style:style>
    <style:style style:name="T23" style:family="text">
      <style:text-properties officeooo:rsid="002258df"/>
    </style:style>
    <style:style style:name="T24" style:family="text">
      <style:text-properties officeooo:rsid="00232247"/>
    </style:style>
    <style:style style:name="T25" style:family="text">
      <style:text-properties officeooo:rsid="00248669"/>
    </style:style>
    <style:style style:name="T26" style:family="text">
      <style:text-properties officeooo:rsid="002507e5"/>
    </style:style>
    <style:style style:name="T27" style:family="text">
      <style:text-properties officeooo:rsid="00254419"/>
    </style:style>
    <style:style style:name="T28" style:family="text">
      <style:text-properties officeooo:rsid="00265628"/>
    </style:style>
    <style:style style:name="T29" style:family="text">
      <style:text-properties officeooo:rsid="0026d263"/>
    </style:style>
    <style:style style:name="T30" style:family="text">
      <style:text-properties officeooo:rsid="0028a4f7"/>
    </style:style>
    <style:style style:name="T31" style:family="text">
      <style:text-properties officeooo:rsid="002a7002"/>
    </style:style>
    <style:style style:name="T32" style:family="text">
      <style:text-properties officeooo:rsid="002b90ab"/>
    </style:style>
    <style:style style:name="T33" style:family="text">
      <style:text-properties officeooo:rsid="002cbde8"/>
    </style:style>
    <style:style style:name="T34" style:family="text">
      <style:text-properties officeooo:rsid="002e5bda"/>
    </style:style>
    <style:style style:name="T35" style:family="text">
      <style:text-properties officeooo:rsid="00305884"/>
    </style:style>
    <style:style style:name="T36" style:family="text">
      <style:text-properties officeooo:rsid="0032a21b"/>
    </style:style>
    <style:style style:name="T37" style:family="text">
      <style:text-properties officeooo:rsid="0032c8b0"/>
    </style:style>
    <style:style style:name="T38" style:family="text">
      <style:text-properties officeooo:rsid="0034b8be"/>
    </style:style>
    <style:style style:name="T39" style:family="text">
      <style:text-properties officeooo:rsid="003687c9"/>
    </style:style>
    <style:style style:name="T40" style:family="text">
      <style:text-properties officeooo:rsid="003818ef"/>
    </style:style>
    <style:style style:name="T41" style:family="text">
      <style:text-properties officeooo:rsid="003ae36b"/>
    </style:style>
    <style:style style:name="T42" style:family="text">
      <style:text-properties officeooo:rsid="003cbafe"/>
    </style:style>
    <style:style style:name="T43" style:family="text">
      <style:text-properties officeooo:rsid="003e49c1"/>
    </style:style>
    <style:style style:name="T44" style:family="text">
      <style:text-properties officeooo:rsid="003f56d9"/>
    </style:style>
    <style:style style:name="T45" style:family="text">
      <style:text-properties officeooo:rsid="0041d151"/>
    </style:style>
    <style:style style:name="T46" style:family="text">
      <style:text-properties fo:font-size="9pt" officeooo:rsid="0047042b"/>
    </style:style>
    <style:style style:name="T47" style:family="text">
      <style:text-properties fo:font-size="9pt" officeooo:rsid="0048691e"/>
    </style:style>
    <style:style style:name="T48" style:family="text">
      <style:text-properties fo:font-size="9pt" officeooo:rsid="004f24a6"/>
    </style:style>
    <style:style style:name="T49" style:family="text">
      <style:text-properties fo:color="#404040" loext:opacity="100%" fo:font-size="11pt" officeooo:rsid="0041d151" style:font-size-asian="11pt" style:font-size-complex="11pt"/>
    </style:style>
    <style:style style:name="T50" style:family="text">
      <style:text-properties officeooo:rsid="00443c2e"/>
    </style:style>
    <style:style style:name="T51" style:family="text">
      <style:text-properties officeooo:rsid="00457edb"/>
    </style:style>
    <style:style style:name="T52" style:family="text">
      <style:text-properties officeooo:rsid="0047042b"/>
    </style:style>
    <style:style style:name="T53" style:family="text">
      <style:text-properties officeooo:rsid="0048691e"/>
    </style:style>
    <style:style style:name="T54" style:family="text">
      <style:text-properties officeooo:rsid="004d8605"/>
    </style:style>
    <style:style style:name="T55" style:family="text">
      <style:text-properties officeooo:rsid="004f24a6"/>
    </style:style>
    <style:style style:name="T56" style:family="text">
      <style:text-properties officeooo:rsid="0057c815"/>
    </style:style>
    <style:style style:name="T57" style:family="text">
      <style:text-properties officeooo:rsid="0059bc0c"/>
    </style:style>
    <style:style style:name="T58" style:family="text">
      <style:text-properties style:font-name="Liberation Sans" fo:font-size="18pt" fo:font-weight="bold" officeooo:rsid="0059bc0c" style:font-size-asian="18pt" style:font-weight-asian="bold" style:font-size-complex="18pt" style:font-weight-complex="bold"/>
    </style:style>
    <style:style style:name="T59" style:family="text">
      <style:text-properties fo:font-size="11pt"/>
    </style:style>
    <style:style style:name="T60" style:family="text">
      <style:text-properties fo:font-size="11pt" officeooo:rsid="0059bc0c"/>
    </style:style>
    <style:style style:name="T6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AR PL KaitiM GB"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AR PL KaitiM GB"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tracked-changes>
        <text:changed-region xml:id="ct94803071581968" text:id="ct94803071581968">
          <text:insertion>
            <office:change-info>
              <dc:creator>Jesus Gonzalez-Barahona</dc:creator>
              <dc:date>2022-06-08T19:59:48</dc:date>
            </office:change-info>
          </text:insertion>
        </text:changed-region>
        <text:changed-region xml:id="ct94803072538960" text:id="ct94803072538960">
          <text:insertion>
            <office:change-info>
              <dc:creator>Jesus Gonzalez-Barahona</dc:creator>
              <dc:date>2022-06-08T20:00:01</dc:date>
            </office:change-info>
          </text:insertion>
        </text:changed-region>
        <text:changed-region xml:id="ct94803053570048" text:id="ct94803053570048">
          <text:insertion>
            <office:change-info>
              <dc:creator>Jesus Gonzalez-Barahona</dc:creator>
              <dc:date>2022-06-08T19:54:47</dc:date>
            </office:change-info>
          </text:insertion>
        </text:changed-region>
        <text:changed-region xml:id="ct94802956389296" text:id="ct94802956389296">
          <text:deletion>
            <office:change-info>
              <dc:creator>Jesus Gonzalez-Barahona</dc:creator>
              <dc:date>2022-05-24T17:34:28</dc:date>
            </office:change-info>
            <text:p text:style-name="P9"><text:span text:style-name="T12">1</text:span><text:span text:style-name="T17">b</text:span></text:p>
          </text:deletion>
        </text:changed-region>
        <text:changed-region xml:id="ct94802956389536" text:id="ct94802956389536">
          <text:insertion>
            <office:change-info>
              <dc:creator>Jesus Gonzalez-Barahona</dc:creator>
              <dc:date>2022-06-08T09:28:36</dc:date>
            </office:change-info>
          </text:insertion>
        </text:changed-region>
        <text:changed-region xml:id="ct94802956389776" text:id="ct94802956389776">
          <text:deletion>
            <office:change-info>
              <dc:creator>Jesus Gonzalez-Barahona</dc:creator>
              <dc:date>2022-05-24T17:34:17</dc:date>
            </office:change-info>
            <text:p text:style-name="P9"><text:span text:style-name="T38">1</text:span><text:span text:style-name="T12">0</text:span></text:p>
          </text:deletion>
        </text:changed-region>
        <text:changed-region xml:id="ct94802956390016" text:id="ct94802956390016">
          <text:insertion>
            <office:change-info>
              <dc:creator>Jesus Gonzalez-Barahona</dc:creator>
              <dc:date>2022-06-08T09:28:39</dc:date>
            </office:change-info>
          </text:insertion>
        </text:changed-region>
        <text:changed-region xml:id="ct94802956576736" text:id="ct94802956576736">
          <text:deletion>
            <office:change-info>
              <dc:creator>Jesus Gonzalez-Barahona</dc:creator>
              <dc:date>2022-06-08T09:28:38</dc:date>
            </office:change-info>
            <text:p text:style-name="P9"><text:span text:style-name="T12">mayo</text:span></text:p>
          </text:deletion>
        </text:changed-region>
        <text:changed-region xml:id="ct94802956616400" text:id="ct94802956616400">
          <text:insertion>
            <office:change-info>
              <dc:creator>Jesus Gonzalez-Barahona</dc:creator>
              <dc:date>2022-05-24T09:15:25</dc:date>
            </office:change-info>
          </text:insertion>
        </text:changed-region>
        <text:changed-region xml:id="ct94802956593664" text:id="ct94802956593664">
          <text:insertion>
            <office:change-info>
              <dc:creator>Jesus Gonzalez-Barahona</dc:creator>
              <dc:date>2022-05-25T10:16:12</dc:date>
            </office:change-info>
          </text:insertion>
        </text:changed-region>
        <text:changed-region xml:id="ct94802956631152" text:id="ct94802956631152">
          <text:deletion>
            <office:change-info>
              <dc:creator>Jesus Gonzalez-Barahona</dc:creator>
              <dc:date>2022-06-08T09:49:44</dc:date>
            </office:change-info>
            <text:p text:style-name="P38"/>
            <text:p text:style-name="P38"/>
          </text:deletion>
        </text:changed-region>
        <text:changed-region xml:id="ct94803135156864" text:id="ct94803135156864">
          <text:deletion>
            <office:change-info>
              <dc:creator>Jesus Gonzalez-Barahona</dc:creator>
              <dc:date>2022-06-08T20:23:12</dc:date>
            </office:change-info>
            <text:p text:style-name="Text_20_body"/>
            <text:p text:style-name="Text_20_body"/>
          </text:deletion>
        </text:changed-region>
        <text:changed-region xml:id="ct94802956610976" text:id="ct94802956610976">
          <text:deletion>
            <office:change-info>
              <dc:creator>Jesus Gonzalez-Barahona</dc:creator>
              <dc:date>2022-05-25T10:17:34</dc:date>
            </office:change-info>
            <text:p text:style-name="Text_20_body">La convocatoria se enmarca dentro las acciones del proyecto colaborativo RED (<text:span text:style-name="T5">Recursos educativos digitales: calidad y compartición en abierto)</text:span>, financiado en el marco del Plan UniDigital del Ministerio de Universidades.</text:p>
          </text:deletion>
        </text:changed-region>
        <text:changed-region xml:id="ct94803020187424" text:id="ct94803020187424">
          <text:deletion>
            <office:change-info>
              <dc:creator>Jesus Gonzalez-Barahona</dc:creator>
              <dc:date>2022-06-08T20:23:07</dc:date>
            </office:change-info>
            <text:p text:style-name="Text_20_body"/>
            <text:p text:style-name="P2"/>
            <text:p text:style-name="Text_20_body"/>
          </text:deletion>
        </text:changed-region>
        <text:changed-region xml:id="ct94802956610688" text:id="ct94802956610688">
          <text:insertion>
            <office:change-info>
              <dc:creator>Jesus Gonzalez-Barahona</dc:creator>
              <dc:date>2022-05-25T10:17:56</dc:date>
            </office:change-info>
          </text:insertion>
        </text:changed-region>
        <text:changed-region xml:id="ct94802956610400" text:id="ct94802956610400">
          <text:deletion>
            <office:change-info>
              <dc:creator>Jesus Gonzalez-Barahona</dc:creator>
              <dc:date>2022-05-25T10:17:55</dc:date>
            </office:change-info>
            <text:p text:style-name="Text_20_body"><text:span text:style-name="T39">n concreto, la</text:span></text:p>
          </text:deletion>
        </text:changed-region>
        <text:changed-region xml:id="ct94802956610112" text:id="ct94802956610112">
          <text:insertion>
            <office:change-info>
              <dc:creator>Jesus Gonzalez-Barahona</dc:creator>
              <dc:date>2022-05-24T09:23:26</dc:date>
            </office:change-info>
          </text:insertion>
        </text:changed-region>
        <text:changed-region xml:id="ct94802956707088" text:id="ct94802956707088">
          <text:insertion>
            <office:change-info>
              <dc:creator>Jesus Gonzalez-Barahona</dc:creator>
              <dc:date>2022-05-24T09:24:55</dc:date>
            </office:change-info>
          </text:insertion>
        </text:changed-region>
        <text:changed-region xml:id="ct94802956676288" text:id="ct94802956676288">
          <text:insertion>
            <office:change-info>
              <dc:creator>Jesus Gonzalez-Barahona</dc:creator>
              <dc:date>2022-05-24T09:36:31</dc:date>
            </office:change-info>
          </text:insertion>
        </text:changed-region>
        <text:changed-region xml:id="ct94802956670160" text:id="ct94802956670160">
          <text:insertion>
            <office:change-info>
              <dc:creator>Jesus Gonzalez-Barahona</dc:creator>
              <dc:date>2022-05-24T09:26:02</dc:date>
            </office:change-info>
          </text:insertion>
        </text:changed-region>
        <text:changed-region xml:id="ct94802956703680" text:id="ct94802956703680">
          <text:insertion>
            <office:change-info>
              <dc:creator>Jesus Gonzalez-Barahona</dc:creator>
              <dc:date>2022-05-24T09:38:17</dc:date>
            </office:change-info>
          </text:insertion>
        </text:changed-region>
        <text:changed-region xml:id="ct94802956699584" text:id="ct94802956699584">
          <text:deletion>
            <office:change-info>
              <dc:creator>Jesus Gonzalez-Barahona</dc:creator>
              <dc:date>2022-05-24T09:37:35</dc:date>
            </office:change-info>
            <text:p text:style-name="Text_20_body"><text:span text:style-name="T20">Esta convocatoria define</text:span></text:p>
          </text:deletion>
        </text:changed-region>
        <text:changed-region xml:id="ct94802956656432" text:id="ct94802956656432">
          <text:deletion>
            <office:change-info>
              <dc:creator>Jesus Gonzalez-Barahona</dc:creator>
              <dc:date>2022-05-24T09:27:27</dc:date>
            </office:change-info>
            <text:p text:style-name="Text_20_body"><text:span text:style-name="T18">,</text:span></text:p>
          </text:deletion>
        </text:changed-region>
        <text:changed-region xml:id="ct94802956609296" text:id="ct94802956609296">
          <text:deletion>
            <office:change-info>
              <dc:creator>Jesus Gonzalez-Barahona</dc:creator>
              <dc:date>2022-05-24T09:37:49</dc:date>
            </office:change-info>
            <text:p text:style-name="Text_20_body"><text:span text:style-name="T18"><text:s/>más adelante,</text:span></text:p>
          </text:deletion>
        </text:changed-region>
        <text:changed-region xml:id="ct94802956700944" text:id="ct94802956700944">
          <text:insertion>
            <office:change-info>
              <dc:creator>Jesus Gonzalez-Barahona</dc:creator>
              <dc:date>2022-05-24T09:28:36</dc:date>
            </office:change-info>
          </text:insertion>
        </text:changed-region>
        <text:changed-region xml:id="ct94802956651776" text:id="ct94802956651776">
          <text:insertion>
            <office:change-info>
              <dc:creator>Jesus Gonzalez-Barahona</dc:creator>
              <dc:date>2022-05-24T09:41:12</dc:date>
            </office:change-info>
          </text:insertion>
        </text:changed-region>
        <text:changed-region xml:id="ct94802956700400" text:id="ct94802956700400">
          <text:insertion>
            <office:change-info>
              <dc:creator>Jesus Gonzalez-Barahona</dc:creator>
              <dc:date>2022-05-24T09:40:12</dc:date>
            </office:change-info>
          </text:insertion>
        </text:changed-region>
        <text:changed-region xml:id="ct94802956651488" text:id="ct94802956651488">
          <text:insertion>
            <office:change-info>
              <dc:creator>Jesus Gonzalez-Barahona</dc:creator>
              <dc:date>2022-05-24T09:40:17</dc:date>
            </office:change-info>
          </text:insertion>
        </text:changed-region>
        <text:changed-region xml:id="ct94802956700112" text:id="ct94802956700112">
          <text:insertion>
            <office:change-info>
              <dc:creator>Jesus Gonzalez-Barahona</dc:creator>
              <dc:date>2022-05-24T09:40:22</dc:date>
            </office:change-info>
          </text:insertion>
        </text:changed-region>
        <text:changed-region xml:id="ct94802956699824" text:id="ct94802956699824">
          <text:deletion>
            <office:change-info>
              <dc:creator>Jesus Gonzalez-Barahona</dc:creator>
              <dc:date>2022-05-24T09:40:21</dc:date>
            </office:change-info>
            <text:p text:style-name="Text_20_body"><text:span text:style-name="T2">zados</text:span></text:p>
          </text:deletion>
        </text:changed-region>
        <text:changed-region xml:id="ct94802956968704" text:id="ct94802956968704">
          <text:insertion>
            <office:change-info>
              <dc:creator>Jesus Gonzalez-Barahona</dc:creator>
              <dc:date>2022-05-24T09:40:45</dc:date>
            </office:change-info>
          </text:insertion>
        </text:changed-region>
        <text:changed-region xml:id="ct94802956980768" text:id="ct94802956980768">
          <text:insertion>
            <office:change-info>
              <dc:creator>Jesus Gonzalez-Barahona</dc:creator>
              <dc:date>2022-05-24T09:49:08</dc:date>
            </office:change-info>
          </text:insertion>
        </text:changed-region>
        <text:changed-region xml:id="ct94802956684112" text:id="ct94802956684112">
          <text:deletion>
            <office:change-info>
              <dc:creator>Jesus Gonzalez-Barahona</dc:creator>
              <dc:date>2022-05-24T09:49:16</dc:date>
            </office:change-info>
            <text:p text:style-name="Text_20_body"><text:span text:style-name="T3">en</text:span></text:p>
          </text:deletion>
        </text:changed-region>
        <text:changed-region xml:id="ct94802956683872" text:id="ct94802956683872">
          <text:deletion>
            <office:change-info>
              <dc:creator>Jesus Gonzalez-Barahona</dc:creator>
              <dc:date>2022-05-25T21:13:29</dc:date>
            </office:change-info>
            <text:p text:style-name="Text_20_body">l</text:p>
          </text:deletion>
        </text:changed-region>
        <text:changed-region xml:id="ct94802956703984" text:id="ct94802956703984">
          <text:deletion>
            <office:change-info>
              <dc:creator>Jesus Gonzalez-Barahona</dc:creator>
              <dc:date>2022-05-25T21:12:17</dc:date>
            </office:change-info>
            <text:p text:style-name="Text_20_body"><text:s/>número de grupos donde se puedan utilizar exactamente los mismos materiales docentes, y del</text:p>
          </text:deletion>
        </text:changed-region>
        <text:changed-region xml:id="ct94802956704224" text:id="ct94802956704224">
          <text:deletion>
            <office:change-info>
              <dc:creator>Jesus Gonzalez-Barahona</dc:creator>
              <dc:date>2022-05-25T21:13:29</dc:date>
            </office:change-info>
            <text:p text:style-name="Text_20_body"><text:s/>número y tipo de</text:p>
          </text:deletion>
        </text:changed-region>
        <text:changed-region xml:id="ct94802956965920" text:id="ct94802956965920">
          <text:insertion>
            <office:change-info>
              <dc:creator>Jesus Gonzalez-Barahona</dc:creator>
              <dc:date>2022-05-25T21:13:29</dc:date>
            </office:change-info>
          </text:insertion>
        </text:changed-region>
        <text:changed-region xml:id="ct94802956966160" text:id="ct94802956966160">
          <text:insertion>
            <office:change-info>
              <dc:creator>Jesus Gonzalez-Barahona</dc:creator>
              <dc:date>2022-05-25T21:14:02</dc:date>
            </office:change-info>
          </text:insertion>
        </text:changed-region>
        <text:changed-region xml:id="ct94802956707488" text:id="ct94802956707488">
          <text:deletion>
            <office:change-info>
              <dc:creator>Jesus Gonzalez-Barahona</dc:creator>
              <dc:date>2022-05-25T21:14:32</dc:date>
            </office:change-info>
            <text:p text:style-name="Text_20_body">según se indica a continuación. En concreto, se valorarán las siguientes </text:p>
          </text:deletion>
        </text:changed-region>
        <text:changed-region xml:id="ct94802956707728" text:id="ct94802956707728">
          <text:deletion>
            <office:change-info>
              <dc:creator>Jesus Gonzalez-Barahona</dc:creator>
              <dc:date>2022-05-25T21:13:06</dc:date>
            </office:change-info>
            <text:p text:style-name="Text_20_body">tipologías</text:p>
          </text:deletion>
        </text:changed-region>
        <text:changed-region xml:id="ct94802956640256" text:id="ct94802956640256">
          <text:deletion>
            <office:change-info>
              <dc:creator>Jesus Gonzalez-Barahona</dc:creator>
              <dc:date>2022-05-25T21:14:32</dc:date>
            </office:change-info>
            <text:p text:style-name="Text_20_body"><text:s/>de materiales, </text:p>
          </text:deletion>
        </text:changed-region>
        <text:changed-region xml:id="ct94802956652560" text:id="ct94802956652560">
          <text:insertion>
            <office:change-info>
              <dc:creator>Jesus Gonzalez-Barahona</dc:creator>
              <dc:date>2022-05-25T21:14:39</dc:date>
            </office:change-info>
          </text:insertion>
        </text:changed-region>
        <text:changed-region xml:id="ct94802956967440" text:id="ct94802956967440">
          <text:insertion>
            <office:change-info>
              <dc:creator>Jesus Gonzalez-Barahona</dc:creator>
              <dc:date>2022-05-25T21:15:00</dc:date>
            </office:change-info>
          </text:insertion>
        </text:changed-region>
        <text:changed-region xml:id="ct94802956696784" text:id="ct94802956696784">
          <text:deletion>
            <office:change-info>
              <dc:creator>Jesus Gonzalez-Barahona</dc:creator>
              <dc:date>2022-05-25T21:14:37</dc:date>
            </office:change-info>
            <text:p text:style-name="Text_20_body"><text:span text:style-name="T46">: </text:span></text:p>
          </text:deletion>
        </text:changed-region>
        <text:changed-region xml:id="ct94802956682784" text:id="ct94802956682784">
          <text:insertion>
            <office:change-info>
              <dc:creator>Jesus Gonzalez-Barahona</dc:creator>
              <dc:date>2022-05-24T09:44:25</dc:date>
            </office:change-info>
          </text:insertion>
        </text:changed-region>
        <text:changed-region xml:id="ct94802956996960" text:id="ct94802956996960">
          <text:insertion>
            <office:change-info>
              <dc:creator>Jesus Gonzalez-Barahona</dc:creator>
              <dc:date>2022-05-24T09:45:00</dc:date>
            </office:change-info>
          </text:insertion>
        </text:changed-region>
        <text:changed-region xml:id="ct94802956674528" text:id="ct94802956674528">
          <text:insertion>
            <office:change-info>
              <dc:creator>Jesus Gonzalez-Barahona</dc:creator>
              <dc:date>2022-05-24T09:46:24</dc:date>
            </office:change-info>
          </text:insertion>
        </text:changed-region>
        <text:changed-region xml:id="ct94802956970064" text:id="ct94802956970064">
          <text:insertion>
            <office:change-info>
              <dc:creator>Jesus Gonzalez-Barahona</dc:creator>
              <dc:date>2022-05-24T09:51:32</dc:date>
            </office:change-info>
          </text:insertion>
        </text:changed-region>
        <text:changed-region xml:id="ct94802956702448" text:id="ct94802956702448">
          <text:insertion>
            <office:change-info>
              <dc:creator>Jesus Gonzalez-Barahona</dc:creator>
              <dc:date>2022-05-25T21:16:04</dc:date>
            </office:change-info>
          </text:insertion>
        </text:changed-region>
        <text:changed-region xml:id="ct94802956996720" text:id="ct94802956996720">
          <text:deletion>
            <office:change-info>
              <dc:creator>Jesus Gonzalez-Barahona</dc:creator>
              <dc:date>2022-05-25T21:16:43</dc:date>
            </office:change-info>
            <text:p text:style-name="Text_20_body"><text:s/>o </text:p>
          </text:deletion>
        </text:changed-region>
        <text:changed-region xml:id="ct94802956996480" text:id="ct94802956996480">
          <text:insertion>
            <office:change-info>
              <dc:creator>Jesus Gonzalez-Barahona</dc:creator>
              <dc:date>2022-05-25T21:16:43</dc:date>
            </office:change-info>
          </text:insertion>
        </text:changed-region>
        <text:changed-region xml:id="ct94802956318560" text:id="ct94802956318560">
          <text:insertion>
            <office:change-info>
              <dc:creator>Jesus Gonzalez-Barahona</dc:creator>
              <dc:date>2022-05-25T21:16:46</dc:date>
            </office:change-info>
          </text:insertion>
        </text:changed-region>
        <text:changed-region xml:id="ct94803132650928" text:id="ct94803132650928">
          <text:deletion>
            <office:change-info>
              <dc:creator>Jesus Gonzalez-Barahona</dc:creator>
              <dc:date>2022-06-08T20:22:55</dc:date>
            </office:change-info>
            <text:p text:style-name="P78"/>
            <text:p text:style-name="P77"/>
          </text:deletion>
        </text:changed-region>
        <text:changed-region xml:id="ct94803131558784" text:id="ct94803131558784">
          <text:deletion>
            <office:change-info>
              <dc:creator>Jesus Gonzalez-Barahona</dc:creator>
              <dc:date>2022-06-08T20:22:55</dc:date>
            </office:change-info>
            <text:p text:style-name="P77"/>
            <text:p text:style-name="P78"/>
          </text:deletion>
        </text:changed-region>
        <text:changed-region xml:id="ct94803132616848" text:id="ct94803132616848">
          <text:deletion>
            <office:change-info>
              <dc:creator>Jesus Gonzalez-Barahona</dc:creator>
              <dc:date>2022-06-08T20:22:51</dc:date>
            </office:change-info>
            <text:p text:style-name="Text_20_body"/>
            <text:p text:style-name="Text_20_body"/>
          </text:deletion>
        </text:changed-region>
        <text:changed-region xml:id="ct94802957050112" text:id="ct94802957050112">
          <text:insertion>
            <office:change-info>
              <dc:creator>Jesus Gonzalez-Barahona</dc:creator>
              <dc:date>2022-06-08T10:48:57</dc:date>
            </office:change-info>
          </text:insertion>
        </text:changed-region>
        <text:changed-region xml:id="ct94802957049872" text:id="ct94802957049872">
          <text:insertion>
            <office:change-info>
              <dc:creator>Jesus Gonzalez-Barahona</dc:creator>
              <dc:date>2022-06-08T09:52:42</dc:date>
            </office:change-info>
          </text:insertion>
        </text:changed-region>
        <text:changed-region xml:id="ct94802957049632" text:id="ct94802957049632">
          <text:deletion>
            <office:change-info>
              <dc:creator>Jesus Gonzalez-Barahona</dc:creator>
              <dc:date>2022-06-08T09:52:41</dc:date>
            </office:change-info>
            <text:p text:style-name="Text_20_body">Las</text:p>
          </text:deletion>
        </text:changed-region>
        <text:changed-region xml:id="ct94802957049392" text:id="ct94802957049392">
          <text:insertion>
            <office:change-info>
              <dc:creator>Jesus Gonzalez-Barahona</dc:creator>
              <dc:date>2022-06-08T09:52:42</dc:date>
            </office:change-info>
          </text:insertion>
        </text:changed-region>
        <text:changed-region xml:id="ct94802957049152" text:id="ct94802957049152">
          <text:deletion>
            <office:change-info>
              <dc:creator>Jesus Gonzalez-Barahona</dc:creator>
              <dc:date>2022-06-08T09:52:53</dc:date>
            </office:change-info>
            <text:p text:style-name="Text_20_body">que sean clasificadas como </text:p>
          </text:deletion>
        </text:changed-region>
        <text:changed-region xml:id="ct94802957048912" text:id="ct94802957048912">
          <text:insertion>
            <office:change-info>
              <dc:creator>Jesus Gonzalez-Barahona</dc:creator>
              <dc:date>2022-06-08T09:52:57</dc:date>
            </office:change-info>
          </text:insertion>
        </text:changed-region>
        <text:changed-region xml:id="ct94802957048672" text:id="ct94802957048672">
          <text:insertion>
            <office:change-info>
              <dc:creator>Jesus Gonzalez-Barahona</dc:creator>
              <dc:date>2022-06-08T09:53:00</dc:date>
            </office:change-info>
          </text:insertion>
        </text:changed-region>
        <text:changed-region xml:id="ct94802957063120" text:id="ct94802957063120">
          <text:insertion>
            <office:change-info>
              <dc:creator>Jesus Gonzalez-Barahona</dc:creator>
              <dc:date>2022-06-08T09:54:00</dc:date>
            </office:change-info>
          </text:insertion>
        </text:changed-region>
        <text:changed-region xml:id="ct94802957063504" text:id="ct94802957063504">
          <text:insertion>
            <office:change-info>
              <dc:creator>Jesus Gonzalez-Barahona</dc:creator>
              <dc:date>2022-06-08T09:54:06</dc:date>
            </office:change-info>
          </text:insertion>
        </text:changed-region>
        <text:changed-region xml:id="ct94802957064896" text:id="ct94802957064896">
          <text:deletion>
            <office:change-info>
              <dc:creator>Jesus Gonzalez-Barahona</dc:creator>
              <dc:date>2022-06-08T09:54:14</dc:date>
            </office:change-info>
            <text:p text:style-name="Text_20_body">Las </text:p>
          </text:deletion>
        </text:changed-region>
        <text:changed-region xml:id="ct94802957065136" text:id="ct94802957065136">
          <text:deletion>
            <office:change-info>
              <dc:creator>Jesus Gonzalez-Barahona</dc:creator>
              <dc:date>2022-06-08T09:54:19</dc:date>
            </office:change-info>
            <text:p text:style-name="Text_20_body"><text:s/>que sean clasificadas como</text:p>
          </text:deletion>
        </text:changed-region>
        <text:changed-region xml:id="ct94802957065376" text:id="ct94802957065376">
          <text:insertion>
            <office:change-info>
              <dc:creator>Jesus Gonzalez-Barahona</dc:creator>
              <dc:date>2022-06-08T09:54:53</dc:date>
            </office:change-info>
          </text:insertion>
        </text:changed-region>
        <text:changed-region xml:id="ct94802957069552" text:id="ct94802957069552">
          <text:insertion>
            <office:change-info>
              <dc:creator>Jesus Gonzalez-Barahona</dc:creator>
              <dc:date>2022-06-08T09:55:01</dc:date>
            </office:change-info>
          </text:insertion>
        </text:changed-region>
        <text:changed-region xml:id="ct94802957071056" text:id="ct94802957071056">
          <text:insertion>
            <office:change-info>
              <dc:creator>Jesus Gonzalez-Barahona</dc:creator>
              <dc:date>2022-06-08T09:54:29</dc:date>
            </office:change-info>
          </text:insertion>
        </text:changed-region>
        <text:changed-region xml:id="ct94802957071296" text:id="ct94802957071296">
          <text:insertion>
            <office:change-info>
              <dc:creator>Jesus Gonzalez-Barahona</dc:creator>
              <dc:date>2022-06-08T09:54:31</dc:date>
            </office:change-info>
          </text:insertion>
        </text:changed-region>
        <text:changed-region xml:id="ct94802956328336" text:id="ct94802956328336">
          <text:deletion>
            <office:change-info>
              <dc:creator>Jesus Gonzalez-Barahona</dc:creator>
              <dc:date>2022-05-24T09:55:05</dc:date>
            </office:change-info>
            <text:p text:style-name="Text_20_body"><text:s/>le</text:p>
          </text:deletion>
        </text:changed-region>
        <text:changed-region xml:id="ct94802956984320" text:id="ct94802956984320">
          <text:insertion>
            <office:change-info>
              <dc:creator>Jesus Gonzalez-Barahona</dc:creator>
              <dc:date>2022-05-24T09:55:08</dc:date>
            </office:change-info>
          </text:insertion>
        </text:changed-region>
        <text:changed-region xml:id="ct94802956968352" text:id="ct94802956968352">
          <text:insertion>
            <office:change-info>
              <dc:creator>Jesus Gonzalez-Barahona</dc:creator>
              <dc:date>2022-05-24T09:56:09</dc:date>
            </office:change-info>
          </text:insertion>
        </text:changed-region>
        <text:changed-region xml:id="ct94802957037728" text:id="ct94802957037728">
          <text:insertion>
            <office:change-info>
              <dc:creator>Jesus Gonzalez-Barahona</dc:creator>
              <dc:date>2022-05-24T09:57:01</dc:date>
            </office:change-info>
          </text:insertion>
        </text:changed-region>
        <text:changed-region xml:id="ct94802956630032" text:id="ct94802956630032">
          <text:insertion>
            <office:change-info>
              <dc:creator>Jesus Gonzalez-Barahona</dc:creator>
              <dc:date>2022-05-24T09:58:36</dc:date>
            </office:change-info>
          </text:insertion>
        </text:changed-region>
        <text:changed-region xml:id="ct94802957033088" text:id="ct94802957033088">
          <text:insertion>
            <office:change-info>
              <dc:creator>Jesus Gonzalez-Barahona</dc:creator>
              <dc:date>2022-05-24T09:59:00</dc:date>
            </office:change-info>
          </text:insertion>
        </text:changed-region>
        <text:changed-region xml:id="ct94802957062464" text:id="ct94802957062464">
          <text:insertion>
            <office:change-info>
              <dc:creator>Jesus Gonzalez-Barahona</dc:creator>
              <dc:date>2022-05-24T10:00:02</dc:date>
            </office:change-info>
          </text:insertion>
        </text:changed-region>
        <text:changed-region xml:id="ct94802957058976" text:id="ct94802957058976">
          <text:insertion>
            <office:change-info>
              <dc:creator>Jesus Gonzalez-Barahona</dc:creator>
              <dc:date>2022-05-24T10:01:01</dc:date>
            </office:change-info>
          </text:insertion>
        </text:changed-region>
        <text:changed-region xml:id="ct94802957111840" text:id="ct94802957111840">
          <text:insertion>
            <office:change-info>
              <dc:creator>Jesus Gonzalez-Barahona</dc:creator>
              <dc:date>2022-05-24T10:02:01</dc:date>
            </office:change-info>
          </text:insertion>
        </text:changed-region>
        <text:changed-region xml:id="ct94802957108736" text:id="ct94802957108736">
          <text:deletion>
            <office:change-info>
              <dc:creator>Jesus Gonzalez-Barahona</dc:creator>
              <dc:date>2022-05-24T10:01:35</dc:date>
            </office:change-info>
            <text:p text:style-name="Text_20_body"><text:s/>por la división a partes iguales entre los beneficiarios de la misma de los créditos ECTS de la asignatura, por la cantidad económica por crédito, que será de 100 euros, hasta un total por docente máximo de 1.500 euros.</text:p>
          </text:deletion>
        </text:changed-region>
        <text:changed-region xml:id="ct94802957100112" text:id="ct94802957100112">
          <text:insertion>
            <office:change-info>
              <dc:creator>Jesus Gonzalez-Barahona</dc:creator>
              <dc:date>2022-05-24T10:06:38</dc:date>
            </office:change-info>
          </text:insertion>
        </text:changed-region>
        <text:changed-region xml:id="ct94802957099840" text:id="ct94802957099840">
          <text:insertion>
            <office:change-info>
              <dc:creator>Jesus Gonzalez-Barahona</dc:creator>
              <dc:date>2022-05-24T10:11:50</dc:date>
            </office:change-info>
          </text:insertion>
        </text:changed-region>
        <text:changed-region xml:id="ct94802957073120" text:id="ct94802957073120">
          <text:deletion>
            <office:change-info>
              <dc:creator>Jesus Gonzalez-Barahona</dc:creator>
              <dc:date>2022-05-24T10:12:03</dc:date>
            </office:change-info>
            <text:p text:style-name="Text_20_body">.</text:p>
          </text:deletion>
        </text:changed-region>
        <text:changed-region xml:id="ct94802957084912" text:id="ct94802957084912">
          <text:insertion>
            <office:change-info>
              <dc:creator>Jesus Gonzalez-Barahona</dc:creator>
              <dc:date>2022-05-24T10:07:34</dc:date>
            </office:change-info>
          </text:insertion>
        </text:changed-region>
        <text:changed-region xml:id="ct94802957132528" text:id="ct94802957132528">
          <text:insertion>
            <office:change-info>
              <dc:creator>Jesus Gonzalez-Barahona</dc:creator>
              <dc:date>2022-05-24T10:08:00</dc:date>
            </office:change-info>
          </text:insertion>
        </text:changed-region>
        <text:changed-region xml:id="ct94802957130368" text:id="ct94802957130368">
          <text:deletion>
            <office:change-info>
              <dc:creator>Jesus Gonzalez-Barahona</dc:creator>
              <dc:date>2022-05-24T10:13:47</dc:date>
            </office:change-info>
            <text:p text:style-name="Text_20_body"><text:s/></text:p>
          </text:deletion>
        </text:changed-region>
        <text:changed-region xml:id="ct94802957108976" text:id="ct94802957108976">
          <text:insertion>
            <office:change-info>
              <dc:creator>Jesus Gonzalez-Barahona</dc:creator>
              <dc:date>2022-05-24T10:13:36</dc:date>
            </office:change-info>
          </text:insertion>
        </text:changed-region>
        <text:changed-region xml:id="ct94802956684912" text:id="ct94802956684912">
          <text:insertion>
            <office:change-info>
              <dc:creator>Jesus Gonzalez-Barahona</dc:creator>
              <dc:date>2022-05-24T10:14:09</dc:date>
            </office:change-info>
          </text:insertion>
        </text:changed-region>
        <text:changed-region xml:id="ct94802956362256" text:id="ct94802956362256">
          <text:insertion>
            <office:change-info>
              <dc:creator>Jesus Gonzalez-Barahona</dc:creator>
              <dc:date>2022-05-24T10:14:41</dc:date>
            </office:change-info>
          </text:insertion>
        </text:changed-region>
        <text:changed-region xml:id="ct94802957133088" text:id="ct94802957133088">
          <text:insertion>
            <office:change-info>
              <dc:creator>Jesus Gonzalez-Barahona</dc:creator>
              <dc:date>2022-05-24T10:14:48</dc:date>
            </office:change-info>
          </text:insertion>
        </text:changed-region>
        <text:changed-region xml:id="ct94803075644720" text:id="ct94803075644720">
          <text:deletion>
            <office:change-info>
              <dc:creator>Jesus Gonzalez-Barahona</dc:creator>
              <dc:date>2022-06-08T20:10:57</dc:date>
            </office:change-info>
            <text:p text:style-name="Text_20_body"/>
            <text:p text:style-name="Text_20_body"/>
          </text:deletion>
        </text:changed-region>
        <text:changed-region xml:id="ct94802957154656" text:id="ct94802957154656">
          <text:insertion>
            <office:change-info>
              <dc:creator>Jesus Gonzalez-Barahona</dc:creator>
              <dc:date>2022-05-24T12:54:12</dc:date>
            </office:change-info>
          </text:insertion>
        </text:changed-region>
        <text:changed-region xml:id="ct94802957154416" text:id="ct94802957154416">
          <text:insertion>
            <office:change-info>
              <dc:creator>Jesus Gonzalez-Barahona</dc:creator>
              <dc:date>2022-05-24T10:18:49</dc:date>
            </office:change-info>
          </text:insertion>
        </text:changed-region>
        <text:changed-region xml:id="ct94802957154176" text:id="ct94802957154176">
          <text:insertion>
            <office:change-info>
              <dc:creator>Jesus Gonzalez-Barahona</dc:creator>
              <dc:date>2022-05-24T12:48:51</dc:date>
            </office:change-info>
          </text:insertion>
        </text:changed-region>
        <text:changed-region xml:id="ct94802957153936" text:id="ct94802957153936">
          <text:deletion>
            <office:change-info>
              <dc:creator>Jesus Gonzalez-Barahona</dc:creator>
              <dc:date>2022-05-24T12:49:15</dc:date>
            </office:change-info>
            <text:p text:style-name="P35"><text:s/>(OfiLibre)</text:p>
          </text:deletion>
        </text:changed-region>
        <text:changed-region xml:id="ct94802957153696" text:id="ct94802957153696">
          <text:insertion>
            <office:change-info>
              <dc:creator>Jesus Gonzalez-Barahona</dc:creator>
              <dc:date>2022-05-24T12:49:19</dc:date>
            </office:change-info>
          </text:insertion>
        </text:changed-region>
        <text:changed-region xml:id="ct94802957153456" text:id="ct94802957153456">
          <text:insertion>
            <office:change-info>
              <dc:creator>Jesus Gonzalez-Barahona</dc:creator>
              <dc:date>2022-05-24T12:50:00</dc:date>
            </office:change-info>
          </text:insertion>
        </text:changed-region>
        <text:changed-region xml:id="ct94802957153216" text:id="ct94802957153216">
          <text:insertion>
            <office:change-info>
              <dc:creator>Jesus Gonzalez-Barahona</dc:creator>
              <dc:date>2022-05-24T12:51:01</dc:date>
            </office:change-info>
          </text:insertion>
        </text:changed-region>
        <text:changed-region xml:id="ct94802957131856" text:id="ct94802957131856">
          <text:insertion>
            <office:change-info>
              <dc:creator>Jesus Gonzalez-Barahona</dc:creator>
              <dc:date>2022-05-24T12:52:16</dc:date>
            </office:change-info>
          </text:insertion>
        </text:changed-region>
        <text:changed-region xml:id="ct94802957189680" text:id="ct94802957189680">
          <text:insertion>
            <office:change-info>
              <dc:creator>Jesus Gonzalez-Barahona</dc:creator>
              <dc:date>2022-05-24T13:16:55</dc:date>
            </office:change-info>
          </text:insertion>
        </text:changed-region>
        <text:changed-region xml:id="ct94802957177264" text:id="ct94802957177264">
          <text:deletion>
            <office:change-info>
              <dc:creator>Jesus Gonzalez-Barahona</dc:creator>
              <dc:date>2022-05-24T13:16:54</dc:date>
            </office:change-info>
            <text:p text:style-name="P35"><text:s/>y sus</text:p>
          </text:deletion>
        </text:changed-region>
        <text:changed-region xml:id="ct94802957126608" text:id="ct94802957126608">
          <text:insertion>
            <office:change-info>
              <dc:creator>Jesus Gonzalez-Barahona</dc:creator>
              <dc:date>2022-05-24T13:17:27</dc:date>
            </office:change-info>
          </text:insertion>
        </text:changed-region>
        <text:changed-region xml:id="ct94802957176912" text:id="ct94802957176912">
          <text:deletion>
            <office:change-info>
              <dc:creator>Jesus Gonzalez-Barahona</dc:creator>
              <dc:date>2022-05-24T13:17:26</dc:date>
            </office:change-info>
            <text:p text:style-name="P35"><text:s/></text:p>
          </text:deletion>
        </text:changed-region>
        <text:changed-region xml:id="ct94802957131616" text:id="ct94802957131616">
          <text:insertion>
            <office:change-info>
              <dc:creator>Jesus Gonzalez-Barahona</dc:creator>
              <dc:date>2022-05-24T13:16:57</dc:date>
            </office:change-info>
          </text:insertion>
        </text:changed-region>
        <text:changed-region xml:id="ct94802957072160" text:id="ct94802957072160">
          <text:insertion>
            <office:change-info>
              <dc:creator>Jesus Gonzalez-Barahona</dc:creator>
              <dc:date>2022-05-24T13:17:10</dc:date>
            </office:change-info>
          </text:insertion>
        </text:changed-region>
        <text:changed-region xml:id="ct94802956355840" text:id="ct94802956355840">
          <text:insertion>
            <office:change-info>
              <dc:creator>Jesus Gonzalez-Barahona</dc:creator>
              <dc:date>2022-05-24T12:55:02</dc:date>
            </office:change-info>
          </text:insertion>
        </text:changed-region>
        <text:changed-region xml:id="ct94802957184896" text:id="ct94802957184896">
          <text:insertion>
            <office:change-info>
              <dc:creator>Jesus Gonzalez-Barahona</dc:creator>
              <dc:date>2022-05-24T13:00:22</dc:date>
            </office:change-info>
          </text:insertion>
        </text:changed-region>
        <text:changed-region xml:id="ct94802957184656" text:id="ct94802957184656">
          <text:insertion>
            <office:change-info>
              <dc:creator>Jesus Gonzalez-Barahona</dc:creator>
              <dc:date>2022-05-24T12:59:36</dc:date>
            </office:change-info>
          </text:insertion>
        </text:changed-region>
        <text:changed-region xml:id="ct94802957184176" text:id="ct94802957184176">
          <text:deletion>
            <office:change-info>
              <dc:creator>Jesus Gonzalez-Barahona</dc:creator>
              <dc:date>2022-05-24T12:59:35</dc:date>
            </office:change-info>
            <text:p text:style-name="P71"><text:span text:style-name="T27">a</text:span></text:p>
          </text:deletion>
        </text:changed-region>
        <text:changed-region xml:id="ct94802957197728" text:id="ct94802957197728">
          <text:deletion>
            <office:change-info>
              <dc:creator>Jesus Gonzalez-Barahona</dc:creator>
              <dc:date>2022-05-24T13:00:16</dc:date>
            </office:change-info>
            <text:list xml:id="list703569102" text:style-name="WWNum8">
              <text:list-item>
                <text:p text:style-name="P54"/>
              </text:list-item>
              <text:list-item>
                <text:p text:style-name="P54"><text:span text:style-name="T12">El</text:span> Vicerrector <text:span text:style-name="T12">o la Vicerrectora</text:span>, o persona en quien delegue, con competencias en materia de Publicación.</text:p>
              </text:list-item>
            </text:list>
          </text:deletion>
        </text:changed-region>
        <text:changed-region xml:id="ct94802957186176" text:id="ct94802957186176">
          <text:insertion>
            <office:change-info>
              <dc:creator>Jesus Gonzalez-Barahona</dc:creator>
              <dc:date>2022-05-24T13:00:43</dc:date>
            </office:change-info>
          </text:insertion>
        </text:changed-region>
        <text:changed-region xml:id="ct94802957197488" text:id="ct94802957197488">
          <text:deletion>
            <office:change-info>
              <dc:creator>Jesus Gonzalez-Barahona</dc:creator>
              <dc:date>2022-05-24T13:00:43</dc:date>
            </office:change-info>
            <text:p text:style-name="Text_20_body"><text:span text:style-name="T12">o</text:span></text:p>
          </text:deletion>
        </text:changed-region>
        <text:changed-region xml:id="ct94802957113200" text:id="ct94802957113200">
          <text:format-change>
            <office:change-info>
              <dc:creator>Jesus Gonzalez-Barahona</dc:creator>
              <dc:date>2022-05-24T13:14:01</dc:date>
            </office:change-info>
          </text:format-change>
        </text:changed-region>
        <text:changed-region xml:id="ct94802957071872" text:id="ct94802957071872">
          <text:insertion>
            <office:change-info>
              <dc:creator>Jesus Gonzalez-Barahona</dc:creator>
              <dc:date>2022-05-24T13:14:01</dc:date>
            </office:change-info>
          </text:insertion>
        </text:changed-region>
        <text:changed-region xml:id="ct94803028390432" text:id="ct94803028390432">
          <text:deletion>
            <office:change-info>
              <dc:creator>Jesus Gonzalez-Barahona</dc:creator>
              <dc:date>2022-06-08T20:10:51</dc:date>
            </office:change-info>
            <text:p text:style-name="Text_20_body"/>
            <text:p text:style-name="Text_20_body"/>
          </text:deletion>
        </text:changed-region>
        <text:changed-region xml:id="ct94803200852944" text:id="ct94803200852944">
          <text:insertion>
            <office:change-info>
              <dc:creator>Jesus Gonzalez-Barahona</dc:creator>
              <dc:date>2022-06-08T20:24:46</dc:date>
            </office:change-info>
          </text:insertion>
        </text:changed-region>
        <text:changed-region xml:id="ct94803004971712" text:id="ct94803004971712">
          <text:insertion>
            <office:change-info>
              <dc:creator>Jesus Gonzalez-Barahona</dc:creator>
              <dc:date>2022-06-08T20:25:03</dc:date>
            </office:change-info>
          </text:insertion>
        </text:changed-region>
        <text:changed-region xml:id="ct94803205291728" text:id="ct94803205291728">
          <text:insertion>
            <office:change-info>
              <dc:creator>Jesus Gonzalez-Barahona</dc:creator>
              <dc:date>2022-06-08T20:26:01</dc:date>
            </office:change-info>
          </text:insertion>
        </text:changed-region>
        <text:changed-region xml:id="ct94802957215136" text:id="ct94802957215136">
          <text:deletion>
            <office:change-info>
              <dc:creator>Jesus Gonzalez-Barahona</dc:creator>
              <dc:date>2022-05-24T13:38:27</dc:date>
            </office:change-info>
            <text:p text:style-name="P5">En <text:span text:style-name="T15">el sitio web de la Oficina de Conocimiento y Cultura Libres</text:span> existirá un<text:span text:style-name="T15">a guía con</text:span> preguntas frecuentes <text:span text:style-name="T15">(y sus respuestas) </text:span>y documentación de apoyo para ayudar en la subida de la documentación en abierto</text:p>
          </text:deletion>
        </text:changed-region>
        <text:changed-region xml:id="ct94802957214896" text:id="ct94802957214896">
          <text:deletion>
            <office:change-info>
              <dc:creator>Jesus Gonzalez-Barahona</dc:creator>
              <dc:date>2022-05-24T13:36:39</dc:date>
            </office:change-info>
            <text:p text:style-name="P5"><text:note text:id="ftn11" text:note-class="footnote"><text:note-citation>9</text:note-citation><text:note-body><text:p text:style-name="P32">Guía sobre reconocimiento de publicación de asignaturas en acceso abierto:</text:p><text:p text:style-name="P32"><text:tab/><text:tab/><text:a xlink:type="simple" xlink:href="https://ofilibre.urjc.es/guias/convocatoria-asignaturas-abierto/" text:style-name="Internet_20_link" text:visited-style-name="Visited_20_Internet_20_Link"><text:span text:style-name="T15">https://ofilibre.urjc.es/guias/convocatoria-asignaturas-abierto/</text:span></text:a></text:p></text:note-body></text:note></text:p>
          </text:deletion>
        </text:changed-region>
        <text:changed-region xml:id="ct94802957214656" text:id="ct94802957214656">
          <text:deletion>
            <office:change-info>
              <dc:creator>Jesus Gonzalez-Barahona</dc:creator>
              <dc:date>2022-05-24T13:38:29</dc:date>
            </office:change-info>
            <text:p text:style-name="P5">.</text:p>
          </text:deletion>
        </text:changed-region>
        <text:changed-region xml:id="ct94802957214416" text:id="ct94802957214416">
          <text:insertion>
            <office:change-info>
              <dc:creator>Jesus Gonzalez-Barahona</dc:creator>
              <dc:date>2022-05-24T13:20:51</dc:date>
            </office:change-info>
          </text:insertion>
        </text:changed-region>
        <text:changed-region xml:id="ct94802957214176" text:id="ct94802957214176">
          <text:deletion>
            <office:change-info>
              <dc:creator>Jesus Gonzalez-Barahona</dc:creator>
              <dc:date>2022-05-24T13:20:50</dc:date>
            </office:change-info>
            <text:p text:style-name="P65"><text:span text:style-name="T30">el</text:span></text:p>
          </text:deletion>
        </text:changed-region>
        <text:changed-region xml:id="ct94802957213936" text:id="ct94802957213936">
          <text:insertion>
            <office:change-info>
              <dc:creator>Jesus Gonzalez-Barahona</dc:creator>
              <dc:date>2022-05-24T13:20:54</dc:date>
            </office:change-info>
          </text:insertion>
        </text:changed-region>
        <text:changed-region xml:id="ct94802957213696" text:id="ct94802957213696">
          <text:insertion>
            <office:change-info>
              <dc:creator>Jesus Gonzalez-Barahona</dc:creator>
              <dc:date>2022-05-24T13:21:00</dc:date>
            </office:change-info>
          </text:insertion>
        </text:changed-region>
        <text:changed-region xml:id="ct94802957081104" text:id="ct94802957081104">
          <text:insertion>
            <office:change-info>
              <dc:creator>Jesus Gonzalez-Barahona</dc:creator>
              <dc:date>2022-05-24T13:21:02</dc:date>
            </office:change-info>
          </text:insertion>
        </text:changed-region>
        <text:changed-region xml:id="ct94802957112864" text:id="ct94802957112864">
          <text:insertion>
            <office:change-info>
              <dc:creator>Jesus Gonzalez-Barahona</dc:creator>
              <dc:date>2022-05-24T13:33:28</dc:date>
            </office:change-info>
          </text:insertion>
        </text:changed-region>
        <text:changed-region xml:id="ct94802957159600" text:id="ct94802957159600">
          <text:insertion>
            <office:change-info>
              <dc:creator>Jesus Gonzalez-Barahona</dc:creator>
              <dc:date>2022-05-24T13:34:00</dc:date>
            </office:change-info>
          </text:insertion>
        </text:changed-region>
        <text:changed-region xml:id="ct94802957160432" text:id="ct94802957160432">
          <text:insertion>
            <office:change-info>
              <dc:creator>Jesus Gonzalez-Barahona</dc:creator>
              <dc:date>2022-05-24T13:36:44</dc:date>
            </office:change-info>
          </text:insertion>
        </text:changed-region>
        <text:changed-region xml:id="ct94802957184416" text:id="ct94802957184416">
          <text:insertion>
            <office:change-info>
              <dc:creator>Jesus Gonzalez-Barahona</dc:creator>
              <dc:date>2022-05-24T13:37:00</dc:date>
            </office:change-info>
          </text:insertion>
        </text:changed-region>
        <text:changed-region xml:id="ct94802957176432" text:id="ct94802957176432">
          <text:insertion>
            <office:change-info>
              <dc:creator>Jesus Gonzalez-Barahona</dc:creator>
              <dc:date>2022-05-24T13:38:05</dc:date>
            </office:change-info>
          </text:insertion>
        </text:changed-region>
        <text:changed-region xml:id="ct94802957224832" text:id="ct94802957224832">
          <text:insertion>
            <office:change-info>
              <dc:creator>Jesus Gonzalez-Barahona</dc:creator>
              <dc:date>2022-05-24T13:43:05</dc:date>
            </office:change-info>
          </text:insertion>
        </text:changed-region>
        <text:changed-region xml:id="ct94802957229088" text:id="ct94802957229088">
          <text:insertion>
            <office:change-info>
              <dc:creator>Jesus Gonzalez-Barahona</dc:creator>
              <dc:date>2022-05-24T13:41:10</dc:date>
            </office:change-info>
          </text:insertion>
        </text:changed-region>
        <text:changed-region xml:id="ct94803046112608" text:id="ct94803046112608">
          <text:insertion>
            <office:change-info>
              <dc:creator>Jesus Gonzalez-Barahona</dc:creator>
              <dc:date>2022-06-08T20:16:29</dc:date>
            </office:change-info>
          </text:insertion>
        </text:changed-region>
        <text:changed-region xml:id="ct94803077052000" text:id="ct94803077052000">
          <text:insertion>
            <office:change-info>
              <dc:creator>Jesus Gonzalez-Barahona</dc:creator>
              <dc:date>2022-06-08T20:17:00</dc:date>
            </office:change-info>
          </text:insertion>
        </text:changed-region>
        <text:changed-region xml:id="ct94802957227600" text:id="ct94802957227600">
          <text:insertion>
            <office:change-info>
              <dc:creator>Jesus Gonzalez-Barahona</dc:creator>
              <dc:date>2022-05-24T13:45:10</dc:date>
            </office:change-info>
          </text:insertion>
        </text:changed-region>
        <text:changed-region xml:id="ct94802957162400" text:id="ct94802957162400">
          <text:insertion>
            <office:change-info>
              <dc:creator>Jesus Gonzalez-Barahona</dc:creator>
              <dc:date>2022-05-24T13:44:00</dc:date>
            </office:change-info>
          </text:insertion>
        </text:changed-region>
        <text:changed-region xml:id="ct94802957109216" text:id="ct94802957109216">
          <text:insertion>
            <office:change-info>
              <dc:creator>Jesus Gonzalez-Barahona</dc:creator>
              <dc:date>2022-05-24T13:41:58</dc:date>
            </office:change-info>
          </text:insertion>
        </text:changed-region>
        <text:changed-region xml:id="ct94802957237936" text:id="ct94802957237936">
          <text:insertion>
            <office:change-info>
              <dc:creator>Jesus Gonzalez-Barahona</dc:creator>
              <dc:date>2022-05-24T13:42:00</dc:date>
            </office:change-info>
          </text:insertion>
        </text:changed-region>
        <text:changed-region xml:id="ct94802957226720" text:id="ct94802957226720">
          <text:insertion>
            <office:change-info>
              <dc:creator>Jesus Gonzalez-Barahona</dc:creator>
              <dc:date>2022-05-24T13:48:06</dc:date>
            </office:change-info>
          </text:insertion>
        </text:changed-region>
        <text:changed-region xml:id="ct94802957226960" text:id="ct94802957226960">
          <text:insertion>
            <office:change-info>
              <dc:creator>Jesus Gonzalez-Barahona</dc:creator>
              <dc:date>2022-05-24T13:47:52</dc:date>
            </office:change-info>
          </text:insertion>
        </text:changed-region>
        <text:changed-region xml:id="ct94803063120048" text:id="ct94803063120048">
          <text:insertion>
            <office:change-info>
              <dc:creator>Jesus Gonzalez-Barahona</dc:creator>
              <dc:date>2022-06-08T20:18:00</dc:date>
            </office:change-info>
          </text:insertion>
        </text:changed-region>
        <text:changed-region xml:id="ct94802950020032" text:id="ct94802950020032">
          <text:deletion>
            <office:change-info>
              <dc:creator>Jesus Gonzalez-Barahona</dc:creator>
              <dc:date>2022-06-08T20:18:12</dc:date>
            </office:change-info>
            <text:p text:style-name="P5">un listado con </text:p>
          </text:deletion>
        </text:changed-region>
        <text:changed-region xml:id="ct94803146611616" text:id="ct94803146611616">
          <text:insertion>
            <office:change-info>
              <dc:creator>Jesus Gonzalez-Barahona</dc:creator>
              <dc:date>2022-06-08T20:18:28</dc:date>
            </office:change-info>
          </text:insertion>
        </text:changed-region>
        <text:changed-region xml:id="ct94802957218880" text:id="ct94802957218880">
          <text:insertion>
            <office:change-info>
              <dc:creator>Jesus Gonzalez-Barahona</dc:creator>
              <dc:date>2022-05-24T13:48:33</dc:date>
            </office:change-info>
          </text:insertion>
        </text:changed-region>
        <text:changed-region xml:id="ct94802957228544" text:id="ct94802957228544">
          <text:insertion>
            <office:change-info>
              <dc:creator>Jesus Gonzalez-Barahona</dc:creator>
              <dc:date>2022-05-24T13:48:47</dc:date>
            </office:change-info>
          </text:insertion>
        </text:changed-region>
        <text:changed-region xml:id="ct94802957159184" text:id="ct94802957159184">
          <text:insertion>
            <office:change-info>
              <dc:creator>Jesus Gonzalez-Barahona</dc:creator>
              <dc:date>2022-05-24T13:51:51</dc:date>
            </office:change-info>
          </text:insertion>
        </text:changed-region>
        <text:changed-region xml:id="ct94802957255952" text:id="ct94802957255952">
          <text:insertion>
            <office:change-info>
              <dc:creator>Jesus Gonzalez-Barahona</dc:creator>
              <dc:date>2022-05-24T13:52:02</dc:date>
            </office:change-info>
          </text:insertion>
        </text:changed-region>
        <text:changed-region xml:id="ct94802957256192" text:id="ct94802957256192">
          <text:insertion>
            <office:change-info>
              <dc:creator>Jesus Gonzalez-Barahona</dc:creator>
              <dc:date>2022-05-24T13:54:38</dc:date>
            </office:change-info>
          </text:insertion>
        </text:changed-region>
        <text:changed-region xml:id="ct94802957256432" text:id="ct94802957256432">
          <text:deletion>
            <office:change-info>
              <dc:creator>Jesus Gonzalez-Barahona</dc:creator>
              <dc:date>2022-05-24T13:56:02</dc:date>
            </office:change-info>
            <text:p text:style-name="P7"><text:span text:style-name="T34">Concluido el proceso de valoración de las propuestas, e</text:span></text:p>
          </text:deletion>
        </text:changed-region>
        <text:changed-region xml:id="ct94802957256672" text:id="ct94802957256672">
          <text:insertion>
            <office:change-info>
              <dc:creator>Jesus Gonzalez-Barahona</dc:creator>
              <dc:date>2022-05-24T13:56:02</dc:date>
            </office:change-info>
          </text:insertion>
        </text:changed-region>
        <text:changed-region xml:id="ct94802957257392" text:id="ct94802957257392">
          <text:insertion>
            <office:change-info>
              <dc:creator>Jesus Gonzalez-Barahona</dc:creator>
              <dc:date>2022-05-24T13:49:49</dc:date>
            </office:change-info>
          </text:insertion>
        </text:changed-region>
        <text:changed-region xml:id="ct94802957260512" text:id="ct94802957260512">
          <text:insertion>
            <office:change-info>
              <dc:creator>Jesus Gonzalez-Barahona</dc:creator>
              <dc:date>2022-05-24T13:57:13</dc:date>
            </office:change-info>
          </text:insertion>
        </text:changed-region>
        <text:changed-region xml:id="ct94802957269664" text:id="ct94802957269664">
          <text:insertion>
            <office:change-info>
              <dc:creator>Jesus Gonzalez-Barahona</dc:creator>
              <dc:date>2022-05-24T13:58:02</dc:date>
            </office:change-info>
          </text:insertion>
        </text:changed-region>
        <text:changed-region xml:id="ct94802957263968" text:id="ct94802957263968">
          <text:insertion>
            <office:change-info>
              <dc:creator>Jesus Gonzalez-Barahona</dc:creator>
              <dc:date>2022-05-24T13:50:08</dc:date>
            </office:change-info>
          </text:insertion>
        </text:changed-region>
        <text:changed-region xml:id="ct94803131707232" text:id="ct94803131707232">
          <text:deletion>
            <office:change-info>
              <dc:creator>Jesus Gonzalez-Barahona</dc:creator>
              <dc:date>2022-06-08T20:21:50</dc:date>
            </office:change-info>
            <text:p text:style-name="P5"/>
            <text:p text:style-name="P5"/>
          </text:deletion>
        </text:changed-region>
        <text:changed-region xml:id="ct94802949614368" text:id="ct94802949614368">
          <text:insertion>
            <office:change-info>
              <dc:creator>Jesus Gonzalez-Barahona</dc:creator>
              <dc:date>2022-06-08T19:55:59</dc:date>
            </office:change-info>
          </text:insertion>
        </text:changed-region>
        <text:changed-region xml:id="ct94803149338736" text:id="ct94803149338736">
          <text:insertion>
            <office:change-info>
              <dc:creator>Jesus Gonzalez-Barahona</dc:creator>
              <dc:date>2022-06-08T20:18:57</dc:date>
            </office:change-info>
          </text:insertion>
        </text:changed-region>
        <text:changed-region xml:id="ct94803007306048" text:id="ct94803007306048">
          <text:deletion>
            <office:change-info>
              <dc:creator>Jesus Gonzalez-Barahona</dc:creator>
              <dc:date>2022-06-08T19:56:02</dc:date>
            </office:change-info>
            <text:list xml:id="list4147869866" text:style-name="WWNum2">
              <text:list-item>
                <text:h text:style-name="P43" text:outline-level="1"><text:span text:style-name="T8">Protección de datos</text:span></text:h>
              </text:list-item>
            </text:list>
          </text:deletion>
        </text:changed-region>
        <text:changed-region xml:id="ct94802972603152" text:id="ct94802972603152">
          <text:deletion>
            <office:change-info>
              <dc:creator>Jesus Gonzalez-Barahona</dc:creator>
              <dc:date>2022-06-08T19:56:08</dc:date>
            </office:change-info>
            <text:p text:style-name="P3">Los datos personales recogidos con motivo de la presentación de las solicitudes serán tratados con la estricta finalidad de la concesión y gestión de las mismas, ateniéndose a las bases de la correspondiente convocatoria. Asimismo, se informa que los datos tratados no serán cedidos salvo los casos previstos legalmente, con especial atención a las obligaciones contenidas en la L.O. 3/2018, de 5 de diciembre, de Protección de Datos de Carácter Personal y garantía de los derechos digitales, y en la Ley 19/2013, de Transparencia, Acceso a la Información pública y Buen Gobierno. Se informa igualmente que, en cumplimiento de la normativa citada, si la información personal tratada contuviera datos especialmente protegidos, la publicidad solo se llevará a cabo previa disociación de los mismos. La publicación de la resolución se llevará a cabo bajo el estricto respeto de la normativa de protección de datos. Los solicitantes que participen en el proceso correspondiente podrán ejercer frente al Vicerrectorado de Extensión Universitaria, responsable del tratamiento de sus datos personales, los derechos de acceso, rectificación, cancelación y oposición de los mismos, de lo que serán informados en los correspondientes impresos habilitados al efecto.</text:p>
            <text:p text:style-name="P3"/>
          </text:deletion>
        </text:changed-region>
        <text:changed-region xml:id="ct94803008806672" text:id="ct94803008806672">
          <text:insertion>
            <office:change-info>
              <dc:creator>Jesus Gonzalez-Barahona</dc:creator>
              <dc:date>2022-06-08T19:56:42</dc:date>
            </office:change-info>
          </text:insertion>
        </text:changed-region>
        <text:changed-region xml:id="ct94803071555072" text:id="ct94803071555072">
          <text:deletion>
            <office:change-info>
              <dc:creator>Jesus Gonzalez-Barahona</dc:creator>
              <dc:date>2022-06-08T20:03:21</dc:date>
            </office:change-info>
            <text:list xml:id="list202619787243404" text:continue-numbering="true" text:style-name="WWNum2">
              <text:list-item>
                <text:h text:style-name="P42" text:outline-level="1"/>
              </text:list-item>
              <text:list-item>
                <text:p text:style-name="P74"/>
              </text:list-item>
            </text:list>
          </text:deletion>
        </text:changed-region>
        <text:changed-region xml:id="ct94802957287344" text:id="ct94802957287344">
          <text:insertion>
            <office:change-info>
              <dc:creator>Jesus Gonzalez-Barahona</dc:creator>
              <dc:date>2022-05-24T14:01:46</dc:date>
            </office:change-info>
          </text:insertion>
        </text:changed-region>
        <text:changed-region xml:id="ct94803041779504" text:id="ct94803041779504">
          <text:deletion>
            <office:change-info>
              <dc:creator>Jesus Gonzalez-Barahona</dc:creator>
              <dc:date>2022-06-08T20:09:57</dc:date>
            </office:change-info>
            <text:list xml:id="list202620122911251" text:continue-numbering="true" text:style-name="WWNum2">
              <text:list-item>
                <text:h text:style-name="P42" text:outline-level="1"/>
              </text:list-item>
              <text:list-item>
                <text:h text:style-name="P42" text:outline-level="1"/>
              </text:list-item>
            </text:list>
          </text:deletion>
        </text:changed-region>
        <text:changed-region xml:id="ct94803070394016" text:id="ct94803070394016">
          <text:insertion>
            <office:change-info>
              <dc:creator>Jesus Gonzalez-Barahona</dc:creator>
              <dc:date>2022-06-08T20:09:59</dc:date>
            </office:change-info>
          </text:insertion>
        </text:changed-region>
        <text:changed-region xml:id="ct94803042014976" text:id="ct94803042014976">
          <text:insertion>
            <office:change-info>
              <dc:creator>Jesus Gonzalez-Barahona</dc:creator>
              <dc:date>2022-06-08T20:09:45</dc:date>
            </office:change-info>
          </text:insertion>
        </text:changed-region>
        <text:changed-region xml:id="ct94803041756512" text:id="ct94803041756512">
          <text:deletion>
            <office:change-info>
              <dc:creator>Jesus Gonzalez-Barahona</dc:creator>
              <dc:date>2022-06-08T20:09:53</dc:date>
            </office:change-info>
            <text:list xml:id="list202619988269173" text:continue-numbering="true" text:style-name="WWNum2">
              <text:list-item>
                <text:h text:style-name="P42" text:outline-level="1"><text:span text:style-name="T57">ORMULARIO DE SOLICITUD</text:span></text:h>
              </text:list-item>
            </text:list>
          </text:deletion>
        </text:changed-region>
        <text:changed-region xml:id="ct94802957330048" text:id="ct94802957330048">
          <text:insertion>
            <office:change-info>
              <dc:creator>Jesus Gonzalez-Barahona</dc:creator>
              <dc:date>2022-05-24T14:04:17</dc:date>
            </office:change-info>
          </text:insertion>
        </text:changed-region>
        <text:changed-region xml:id="ct94802957329808" text:id="ct94802957329808">
          <text:insertion>
            <office:change-info>
              <dc:creator>Jesus Gonzalez-Barahona</dc:creator>
              <dc:date>2022-05-24T14:05:00</dc:date>
            </office:change-info>
          </text:insertion>
        </text:changed-region>
        <text:changed-region xml:id="ct94802957329568" text:id="ct94802957329568">
          <text:deletion>
            <office:change-info>
              <dc:creator>Jesus Gonzalez-Barahona</dc:creator>
              <dc:date>2022-05-24T16:50:21</dc:date>
            </office:change-info>
            <text:p text:style-name="Text_20_body">identificadores de dominio único</text:p>
          </text:deletion>
        </text:changed-region>
        <text:changed-region xml:id="ct94802957328672" text:id="ct94802957328672">
          <text:insertion>
            <office:change-info>
              <dc:creator>Jesus Gonzalez-Barahona</dc:creator>
              <dc:date>2022-05-24T16:50:22</dc:date>
            </office:change-info>
          </text:insertion>
        </text:changed-region>
        <text:changed-region xml:id="ct94802957312832" text:id="ct94802957312832">
          <text:deletion>
            <office:change-info>
              <dc:creator>Jesus Gonzalez-Barahona</dc:creator>
              <dc:date>2022-05-24T16:51:19</dc:date>
            </office:change-info>
            <text:p text:style-name="Text_20_body">identificadores de dominio único</text:p>
          </text:deletion>
        </text:changed-region>
        <text:changed-region xml:id="ct94802957312544" text:id="ct94802957312544">
          <text:insertion>
            <office:change-info>
              <dc:creator>Jesus Gonzalez-Barahona</dc:creator>
              <dc:date>2022-05-24T16:51:19</dc:date>
            </office:change-info>
          </text:insertion>
        </text:changed-region>
        <text:changed-region xml:id="ct94802957289600" text:id="ct94802957289600">
          <text:insertion>
            <office:change-info>
              <dc:creator>Jesus Gonzalez-Barahona</dc:creator>
              <dc:date>2022-05-25T20:44:32</dc:date>
            </office:change-info>
          </text:insertion>
        </text:changed-region>
        <text:changed-region xml:id="ct94802957289360" text:id="ct94802957289360">
          <text:deletion>
            <office:change-info>
              <dc:creator>Jesus Gonzalez-Barahona</dc:creator>
              <dc:date>2022-05-25T20:45:02</dc:date>
            </office:change-info>
            <text:p text:style-name="Text_20_body">listad</text:p>
          </text:deletion>
        </text:changed-region>
        <text:changed-region xml:id="ct94802957287104" text:id="ct94802957287104">
          <text:deletion>
            <office:change-info>
              <dc:creator>Jesus Gonzalez-Barahona</dc:creator>
              <dc:date>2022-05-25T20:44:44</dc:date>
            </office:change-info>
            <text:p text:style-name="Text_20_body">o</text:p>
          </text:deletion>
        </text:changed-region>
        <text:changed-region xml:id="ct94802957293072" text:id="ct94802957293072">
          <text:deletion>
            <office:change-info>
              <dc:creator>Jesus Gonzalez-Barahona</dc:creator>
              <dc:date>2022-05-25T20:45:02</dc:date>
            </office:change-info>
            <text:p text:style-name="Text_20_body"><text:s/>de las categorías </text:p>
          </text:deletion>
        </text:changed-region>
        <text:changed-region xml:id="ct94802957328432" text:id="ct94802957328432">
          <text:deletion>
            <office:change-info>
              <dc:creator>Jesus Gonzalez-Barahona</dc:creator>
              <dc:date>2022-05-25T20:45:04</dc:date>
            </office:change-info>
            <text:p text:style-name="Text_20_body">s</text:p>
          </text:deletion>
        </text:changed-region>
        <text:changed-region xml:id="ct94802957313808" text:id="ct94802957313808">
          <text:deletion>
            <office:change-info>
              <dc:creator>Jesus Gonzalez-Barahona</dc:creator>
              <dc:date>2022-05-25T20:45:14</dc:date>
            </office:change-info>
            <text:p text:style-name="Text_20_body">, donde </text:p>
          </text:deletion>
        </text:changed-region>
        <text:changed-region xml:id="ct94802957314320" text:id="ct94802957314320">
          <text:insertion>
            <office:change-info>
              <dc:creator>Jesus Gonzalez-Barahona</dc:creator>
              <dc:date>2022-05-25T20:45:14</dc:date>
            </office:change-info>
          </text:insertion>
        </text:changed-region>
        <text:changed-region xml:id="ct94802957319024" text:id="ct94802957319024">
          <text:deletion>
            <office:change-info>
              <dc:creator>Jesus Gonzalez-Barahona</dc:creator>
              <dc:date>2022-05-24T16:51:42</dc:date>
            </office:change-info>
            <text:p text:style-name="Text_20_body">al url</text:p>
          </text:deletion>
        </text:changed-region>
        <text:changed-region xml:id="ct94802957330688" text:id="ct94802957330688">
          <text:insertion>
            <office:change-info>
              <dc:creator>Jesus Gonzalez-Barahona</dc:creator>
              <dc:date>2022-05-24T16:51:42</dc:date>
            </office:change-info>
          </text:insertion>
        </text:changed-region>
        <text:changed-region xml:id="ct94802957319536" text:id="ct94802957319536">
          <text:deletion>
            <office:change-info>
              <dc:creator>Jesus Gonzalez-Barahona</dc:creator>
              <dc:date>2022-05-24T16:51:48</dc:date>
            </office:change-info>
            <text:p text:style-name="Text_20_body"><text:s/>del</text:p>
          </text:deletion>
        </text:changed-region>
        <text:changed-region xml:id="ct94802957321664" text:id="ct94802957321664">
          <text:insertion>
            <office:change-info>
              <dc:creator>Jesus Gonzalez-Barahona</dc:creator>
              <dc:date>2022-05-25T20:45:23</dc:date>
            </office:change-info>
          </text:insertion>
        </text:changed-region>
        <text:changed-region xml:id="ct94802957322288" text:id="ct94802957322288">
          <text:deletion>
            <office:change-info>
              <dc:creator>Jesus Gonzalez-Barahona</dc:creator>
              <dc:date>2022-05-25T20:45:56</dc:date>
            </office:change-info>
            <text:p text:style-name="Text_20_body">.</text:p>
          </text:deletion>
        </text:changed-region>
        <text:changed-region xml:id="ct94802957323312" text:id="ct94802957323312">
          <text:insertion>
            <office:change-info>
              <dc:creator>Jesus Gonzalez-Barahona</dc:creator>
              <dc:date>2022-05-25T20:45:56</dc:date>
            </office:change-info>
          </text:insertion>
        </text:changed-region>
        <text:changed-region xml:id="ct94802957324752" text:id="ct94802957324752">
          <text:insertion>
            <office:change-info>
              <dc:creator>Jesus Gonzalez-Barahona</dc:creator>
              <dc:date>2022-05-25T20:46:00</dc:date>
            </office:change-info>
          </text:insertion>
        </text:changed-region>
        <text:changed-region xml:id="ct94802957325024" text:id="ct94802957325024">
          <text:deletion>
            <office:change-info>
              <dc:creator>Jesus Gonzalez-Barahona</dc:creator>
              <dc:date>2022-05-25T20:46:05</dc:date>
            </office:change-info>
            <text:p text:style-name="Text_20_body"><text:s/>En caso de tener vídeos en abierto se debe </text:p>
          </text:deletion>
        </text:changed-region>
        <text:changed-region xml:id="ct94802957326448" text:id="ct94802957326448">
          <text:insertion>
            <office:change-info>
              <dc:creator>Jesus Gonzalez-Barahona</dc:creator>
              <dc:date>2022-05-25T20:46:07</dc:date>
            </office:change-info>
          </text:insertion>
        </text:changed-region>
        <text:changed-region xml:id="ct94802957314608" text:id="ct94802957314608">
          <text:insertion>
            <office:change-info>
              <dc:creator>Jesus Gonzalez-Barahona</dc:creator>
              <dc:date>2022-05-25T20:46:11</dc:date>
            </office:change-info>
          </text:insertion>
        </text:changed-region>
        <text:changed-region xml:id="ct94802957314880" text:id="ct94802957314880">
          <text:insertion>
            <office:change-info>
              <dc:creator>Jesus Gonzalez-Barahona</dc:creator>
              <dc:date>2022-05-25T20:46:18</dc:date>
            </office:change-info>
          </text:insertion>
        </text:changed-region>
        <text:changed-region xml:id="ct94802957343440" text:id="ct94802957343440">
          <text:insertion>
            <office:change-info>
              <dc:creator>Jesus Gonzalez-Barahona</dc:creator>
              <dc:date>2022-05-24T16:52:32</dc:date>
            </office:change-info>
          </text:insertion>
        </text:changed-region>
        <text:changed-region xml:id="ct94802957343152" text:id="ct94802957343152">
          <text:insertion>
            <office:change-info>
              <dc:creator>Jesus Gonzalez-Barahona</dc:creator>
              <dc:date>2022-05-24T16:53:13</dc:date>
            </office:change-info>
          </text:insertion>
        </text:changed-region>
        <text:changed-region xml:id="ct94802957342864" text:id="ct94802957342864">
          <text:deletion>
            <office:change-info>
              <dc:creator>Jesus Gonzalez-Barahona</dc:creator>
              <dc:date>2022-05-24T16:54:27</dc:date>
            </office:change-info>
            <text:p text:style-name="P72"><text:span text:style-name="T37">Indicación de que todos los docentes de la asignatura están de acuerdo y consienten en que se presente </text:span></text:p>
          </text:deletion>
        </text:changed-region>
        <text:changed-region xml:id="ct94802957342576" text:id="ct94802957342576">
          <text:insertion>
            <office:change-info>
              <dc:creator>Jesus Gonzalez-Barahona</dc:creator>
              <dc:date>2022-05-24T16:57:27</dc:date>
            </office:change-info>
          </text:insertion>
        </text:changed-region>
        <text:changed-region xml:id="ct94802957322576" text:id="ct94802957322576">
          <text:insertion>
            <office:change-info>
              <dc:creator>Jesus Gonzalez-Barahona</dc:creator>
              <dc:date>2022-05-24T16:58:03</dc:date>
            </office:change-info>
          </text:insertion>
        </text:changed-region>
        <text:changed-region xml:id="ct94803155456656" text:id="ct94803155456656">
          <text:insertion>
            <office:change-info>
              <dc:creator>Jesus Gonzalez-Barahona</dc:creator>
              <dc:date>2022-06-08T20:19:57</dc:date>
            </office:change-info>
          </text:insertion>
        </text:changed-region>
        <text:changed-region xml:id="ct94803088184768" text:id="ct94803088184768">
          <text:insertion>
            <office:change-info>
              <dc:creator>Jesus Gonzalez-Barahona</dc:creator>
              <dc:date>2022-06-08T20:20:00</dc:date>
            </office:change-info>
          </text:insertion>
        </text:changed-region>
        <text:changed-region xml:id="ct94803149434928" text:id="ct94803149434928">
          <text:insertion>
            <office:change-info>
              <dc:creator>Jesus Gonzalez-Barahona</dc:creator>
              <dc:date>2022-06-08T20:21:05</dc:date>
            </office:change-info>
          </text:insertion>
        </text:changed-region>
        <text:changed-region xml:id="ct94803107759168" text:id="ct94803107759168">
          <text:insertion>
            <office:change-info>
              <dc:creator>Jesus Gonzalez-Barahona</dc:creator>
              <dc:date>2022-06-08T20:12:38</dc:date>
            </office:change-info>
          </text:insertion>
        </text:changed-region>
        <text:changed-region xml:id="ct94803076775776" text:id="ct94803076775776">
          <text:deletion>
            <office:change-info>
              <dc:creator>Jesus Gonzalez-Barahona</dc:creator>
              <dc:date>2022-06-08T20:12:48</dc:date>
            </office:change-info>
            <text:list xml:id="list202619230508497" text:continue-numbering="true" text:style-name="WWNum2">
              <text:list-item>
                <text:h text:style-name="P42" text:outline-level="1"><text:span text:style-name="T58"/></text:h>
              </text:list-item>
              <text:list-item>
                <text:h text:style-name="P42" text:outline-level="1"><text:span text:style-name="T58"/></text:h>
              </text:list-item>
            </text:list>
          </text:deletion>
        </text:changed-region>
        <text:changed-region xml:id="ct94802954365664" text:id="ct94802954365664">
          <text:insertion>
            <office:change-info>
              <dc:creator>Jesus Gonzalez-Barahona</dc:creator>
              <dc:date>2022-06-08T20:12:49</dc:date>
            </office:change-info>
          </text:insertion>
        </text:changed-region>
        <text:changed-region xml:id="ct94803118279104" text:id="ct94803118279104">
          <text:deletion>
            <office:change-info>
              <dc:creator>Jesus Gonzalez-Barahona</dc:creator>
              <dc:date>2022-06-08T20:12:59</dc:date>
            </office:change-info>
            <text:list xml:id="list202618899196394" text:continue-numbering="true" text:style-name="WWNum2">
              <text:list-item>
                <text:h text:style-name="P42" text:outline-level="1">RÚBRICA DE EVALUACIÓN DE ASIGNATURAS EN ABIERTO</text:h>
              </text:list-item>
              <text:list-item>
                <text:p text:style-name="P74"/>
              </text:list-item>
            </text:list>
          </text:deletion>
        </text:changed-region>
        <text:changed-region xml:id="ct94802957344848" text:id="ct94802957344848">
          <text:insertion>
            <office:change-info>
              <dc:creator>Jesus Gonzalez-Barahona</dc:creator>
              <dc:date>2022-05-25T20:39:47</dc:date>
            </office:change-info>
          </text:insertion>
        </text:changed-region>
        <text:changed-region xml:id="ct94802957345088" text:id="ct94802957345088">
          <text:insertion>
            <office:change-info>
              <dc:creator>Jesus Gonzalez-Barahona</dc:creator>
              <dc:date>2022-05-25T20:44:01</dc:date>
            </office:change-info>
          </text:insertion>
        </text:changed-region>
        <text:changed-region xml:id="ct94802957344608" text:id="ct94802957344608">
          <text:insertion>
            <office:change-info>
              <dc:creator>Jesus Gonzalez-Barahona</dc:creator>
              <dc:date>2022-05-25T21:18:31</dc:date>
            </office:change-info>
          </text:insertion>
        </text:changed-region>
        <text:changed-region xml:id="ct94802957344368" text:id="ct94802957344368">
          <text:insertion>
            <office:change-info>
              <dc:creator>Jesus Gonzalez-Barahona</dc:creator>
              <dc:date>2022-05-25T21:10:30</dc:date>
            </office:change-info>
          </text:insertion>
        </text:changed-region>
        <text:changed-region xml:id="ct94802957341712" text:id="ct94802957341712">
          <text:insertion>
            <office:change-info>
              <dc:creator>Jesus Gonzalez-Barahona</dc:creator>
              <dc:date>2022-05-25T21:11:00</dc:date>
            </office:change-info>
          </text:insertion>
        </text:changed-region>
        <text:changed-region xml:id="ct94802957342000" text:id="ct94802957342000">
          <text:insertion>
            <office:change-info>
              <dc:creator>Jesus Gonzalez-Barahona</dc:creator>
              <dc:date>2022-05-25T21:19:21</dc:date>
            </office:change-info>
          </text:insertion>
        </text:changed-region>
        <text:changed-region xml:id="ct94802957342288" text:id="ct94802957342288">
          <text:insertion>
            <office:change-info>
              <dc:creator>Jesus Gonzalez-Barahona</dc:creator>
              <dc:date>2022-05-25T21:20:36</dc:date>
            </office:change-info>
          </text:insertion>
        </text:changed-region>
        <text:changed-region xml:id="ct94802957355584" text:id="ct94802957355584">
          <text:insertion>
            <office:change-info>
              <dc:creator>Jesus Gonzalez-Barahona</dc:creator>
              <dc:date>2022-05-25T20:48:18</dc:date>
            </office:change-info>
          </text:insertion>
        </text:changed-region>
        <text:changed-region xml:id="ct94802957367936" text:id="ct94802957367936">
          <text:deletion>
            <office:change-info>
              <dc:creator>Jesus Gonzalez-Barahona</dc:creator>
              <dc:date>2022-05-25T20:44:00</dc:date>
            </office:change-info>
            <text:p text:style-name="Text_20_body">Todos los ítems han de estar correctamente justificados en el apartado de la solicitud que se indica en la última columna.</text:p>
          </text:deletion>
        </text:changed-region>
        <text:changed-region xml:id="ct94802957381824" text:id="ct94802957381824">
          <text:insertion>
            <office:change-info>
              <dc:creator>Jesus Gonzalez-Barahona</dc:creator>
              <dc:date>2022-05-25T19:56:54</dc:date>
            </office:change-info>
          </text:insertion>
        </text:changed-region>
        <text:changed-region xml:id="ct94802957131360" text:id="ct94802957131360">
          <text:insertion>
            <office:change-info>
              <dc:creator>Jesus Gonzalez-Barahona</dc:creator>
              <dc:date>2022-05-25T19:56:56</dc:date>
            </office:change-info>
          </text:insertion>
        </text:changed-region>
        <text:changed-region xml:id="ct94802957242528" text:id="ct94802957242528">
          <text:insertion>
            <office:change-info>
              <dc:creator>Jesus Gonzalez-Barahona</dc:creator>
              <dc:date>2022-06-08T10:22:03</dc:date>
            </office:change-info>
          </text:insertion>
        </text:changed-region>
        <text:changed-region xml:id="ct94802957219120" text:id="ct94802957219120">
          <text:insertion>
            <office:change-info>
              <dc:creator>Jesus Gonzalez-Barahona</dc:creator>
              <dc:date>2022-06-08T10:25:10</dc:date>
            </office:change-info>
          </text:insertion>
        </text:changed-region>
        <text:changed-region xml:id="ct94802957253344" text:id="ct94802957253344">
          <text:insertion>
            <office:change-info>
              <dc:creator>Jesus Gonzalez-Barahona</dc:creator>
              <dc:date>2022-06-08T10:25:12</dc:date>
            </office:change-info>
          </text:insertion>
        </text:changed-region>
        <text:changed-region xml:id="ct94802957260176" text:id="ct94802957260176">
          <text:insertion>
            <office:change-info>
              <dc:creator>Jesus Gonzalez-Barahona</dc:creator>
              <dc:date>2022-05-25T19:57:26</dc:date>
            </office:change-info>
          </text:insertion>
        </text:changed-region>
        <text:changed-region xml:id="ct94802957263488" text:id="ct94802957263488">
          <text:insertion>
            <office:change-info>
              <dc:creator>Jesus Gonzalez-Barahona</dc:creator>
              <dc:date>2022-05-25T19:57:52</dc:date>
            </office:change-info>
          </text:insertion>
        </text:changed-region>
        <text:changed-region xml:id="ct94802957275744" text:id="ct94802957275744">
          <text:insertion>
            <office:change-info>
              <dc:creator>Jesus Gonzalez-Barahona</dc:creator>
              <dc:date>2022-05-25T19:58:01</dc:date>
            </office:change-info>
          </text:insertion>
        </text:changed-region>
        <text:changed-region xml:id="ct94802957276880" text:id="ct94802957276880">
          <text:insertion>
            <office:change-info>
              <dc:creator>Jesus Gonzalez-Barahona</dc:creator>
              <dc:date>2022-05-25T19:59:01</dc:date>
            </office:change-info>
          </text:insertion>
        </text:changed-region>
        <text:changed-region xml:id="ct94802957151536" text:id="ct94802957151536">
          <text:insertion>
            <office:change-info>
              <dc:creator>Jesus Gonzalez-Barahona</dc:creator>
              <dc:date>2022-05-25T20:00:00</dc:date>
            </office:change-info>
          </text:insertion>
        </text:changed-region>
        <text:changed-region xml:id="ct94802957289024" text:id="ct94802957289024">
          <text:insertion>
            <office:change-info>
              <dc:creator>Jesus Gonzalez-Barahona</dc:creator>
              <dc:date>2022-05-25T20:08:00</dc:date>
            </office:change-info>
          </text:insertion>
        </text:changed-region>
        <text:changed-region xml:id="ct94802957305248" text:id="ct94802957305248">
          <text:insertion>
            <office:change-info>
              <dc:creator>Jesus Gonzalez-Barahona</dc:creator>
              <dc:date>2022-05-25T20:07:19</dc:date>
            </office:change-info>
          </text:insertion>
        </text:changed-region>
        <text:changed-region xml:id="ct94802957305984" text:id="ct94802957305984">
          <text:insertion>
            <office:change-info>
              <dc:creator>Jesus Gonzalez-Barahona</dc:creator>
              <dc:date>2022-05-25T20:38:48</dc:date>
            </office:change-info>
          </text:insertion>
        </text:changed-region>
        <text:changed-region xml:id="ct94802957307088" text:id="ct94802957307088">
          <text:insertion>
            <office:change-info>
              <dc:creator>Jesus Gonzalez-Barahona</dc:creator>
              <dc:date>2022-05-25T20:08:48</dc:date>
            </office:change-info>
          </text:insertion>
        </text:changed-region>
        <text:changed-region xml:id="ct94802957309232" text:id="ct94802957309232">
          <text:insertion>
            <office:change-info>
              <dc:creator>Jesus Gonzalez-Barahona</dc:creator>
              <dc:date>2022-05-25T20:09:00</dc:date>
            </office:change-info>
          </text:insertion>
        </text:changed-region>
        <text:changed-region xml:id="ct94802957344032" text:id="ct94802957344032">
          <text:insertion>
            <office:change-info>
              <dc:creator>Jesus Gonzalez-Barahona</dc:creator>
              <dc:date>2022-05-25T19:54:56</dc:date>
            </office:change-info>
          </text:insertion>
        </text:changed-region>
        <text:changed-region xml:id="ct94802957382528" text:id="ct94802957382528">
          <text:insertion>
            <office:change-info>
              <dc:creator>Jesus Gonzalez-Barahona</dc:creator>
              <dc:date>2022-05-25T20:49:32</dc:date>
            </office:change-info>
          </text:insertion>
        </text:changed-region>
        <text:changed-region xml:id="ct94803139412944" text:id="ct94803139412944">
          <text:insertion>
            <office:change-info>
              <dc:creator>Jesus Gonzalez-Barahona</dc:creator>
              <dc:date>2022-06-08T20:13:48</dc:date>
            </office:change-info>
          </text:insertion>
        </text:changed-region>
        <text:changed-region xml:id="ct94802957386784" text:id="ct94802957386784">
          <text:insertion>
            <office:change-info>
              <dc:creator>Jesus Gonzalez-Barahona</dc:creator>
              <dc:date>2022-05-25T21:19:56</dc:date>
            </office:change-info>
          </text:insertion>
        </text:changed-region>
        <text:changed-region xml:id="ct94802957391136" text:id="ct94802957391136">
          <text:insertion>
            <office:change-info>
              <dc:creator>Jesus Gonzalez-Barahona</dc:creator>
              <dc:date>2022-06-08T09:33:17</dc:date>
            </office:change-info>
          </text:insertion>
        </text:changed-region>
        <text:changed-region xml:id="ct94802957401952" text:id="ct94802957401952">
          <text:insertion>
            <office:change-info>
              <dc:creator>Jesus Gonzalez-Barahona</dc:creator>
              <dc:date>2022-05-25T20:51:09</dc:date>
            </office:change-info>
          </text:insertion>
        </text:changed-region>
        <text:changed-region xml:id="ct94802957403328" text:id="ct94802957403328">
          <text:insertion>
            <office:change-info>
              <dc:creator>Jesus Gonzalez-Barahona</dc:creator>
              <dc:date>2022-05-25T20:51:09</dc:date>
            </office:change-info>
          </text:insertion>
        </text:changed-region>
        <text:changed-region xml:id="ct94802957403968" text:id="ct94802957403968">
          <text:insertion>
            <office:change-info>
              <dc:creator>Jesus Gonzalez-Barahona</dc:creator>
              <dc:date>2022-06-08T09:31:02</dc:date>
            </office:change-info>
          </text:insertion>
        </text:changed-region>
        <text:changed-region xml:id="ct94802957404608" text:id="ct94802957404608">
          <text:insertion>
            <office:change-info>
              <dc:creator>Jesus Gonzalez-Barahona</dc:creator>
              <dc:date>2022-06-08T09:31:05</dc:date>
            </office:change-info>
          </text:insertion>
        </text:changed-region>
        <text:changed-region xml:id="ct94802957405248" text:id="ct94802957405248">
          <text:insertion>
            <office:change-info>
              <dc:creator>Jesus Gonzalez-Barahona</dc:creator>
              <dc:date>2022-06-08T09:31:21</dc:date>
            </office:change-info>
          </text:insertion>
        </text:changed-region>
        <text:changed-region xml:id="ct94802957405888" text:id="ct94802957405888">
          <text:insertion>
            <office:change-info>
              <dc:creator>Jesus Gonzalez-Barahona</dc:creator>
              <dc:date>2022-06-08T09:31:32</dc:date>
            </office:change-info>
          </text:insertion>
        </text:changed-region>
        <text:changed-region xml:id="ct94802957406128" text:id="ct94802957406128">
          <text:insertion>
            <office:change-info>
              <dc:creator>Jesus Gonzalez-Barahona</dc:creator>
              <dc:date>2022-06-08T09:32:33</dc:date>
            </office:change-info>
          </text:insertion>
        </text:changed-region>
        <text:changed-region xml:id="ct94802957406768" text:id="ct94802957406768">
          <text:insertion>
            <office:change-info>
              <dc:creator>Jesus Gonzalez-Barahona</dc:creator>
              <dc:date>2022-05-25T20:51:09</dc:date>
            </office:change-info>
          </text:insertion>
        </text:changed-region>
        <text:changed-region xml:id="ct94802957407488" text:id="ct94802957407488">
          <text:insertion>
            <office:change-info>
              <dc:creator>Jesus Gonzalez-Barahona</dc:creator>
              <dc:date>2022-05-25T20:51:09</dc:date>
            </office:change-info>
          </text:insertion>
        </text:changed-region>
        <text:changed-region xml:id="ct94802957408512" text:id="ct94802957408512">
          <text:insertion>
            <office:change-info>
              <dc:creator>Jesus Gonzalez-Barahona</dc:creator>
              <dc:date>2022-05-25T20:51:09</dc:date>
            </office:change-info>
          </text:insertion>
        </text:changed-region>
        <text:changed-region xml:id="ct94802957409456" text:id="ct94802957409456">
          <text:insertion>
            <office:change-info>
              <dc:creator>Jesus Gonzalez-Barahona</dc:creator>
              <dc:date>2022-05-25T20:51:09</dc:date>
            </office:change-info>
          </text:insertion>
        </text:changed-region>
        <text:changed-region xml:id="ct94802957410368" text:id="ct94802957410368">
          <text:insertion>
            <office:change-info>
              <dc:creator>Jesus Gonzalez-Barahona</dc:creator>
              <dc:date>2022-05-25T20:51:09</dc:date>
            </office:change-info>
          </text:insertion>
        </text:changed-region>
        <text:changed-region xml:id="ct94802957411408" text:id="ct94802957411408">
          <text:insertion>
            <office:change-info>
              <dc:creator>Jesus Gonzalez-Barahona</dc:creator>
              <dc:date>2022-05-25T20:51:09</dc:date>
            </office:change-info>
          </text:insertion>
        </text:changed-region>
        <text:changed-region xml:id="ct94802957414640" text:id="ct94802957414640">
          <text:insertion>
            <office:change-info>
              <dc:creator>Jesus Gonzalez-Barahona</dc:creator>
              <dc:date>2022-05-25T20:51:09</dc:date>
            </office:change-info>
          </text:insertion>
        </text:changed-region>
        <text:changed-region xml:id="ct94803138987280" text:id="ct94803138987280">
          <text:insertion>
            <office:change-info>
              <dc:creator>Jesus Gonzalez-Barahona</dc:creator>
              <dc:date>2022-06-08T20:14:10</dc:date>
            </office:change-info>
          </text:insertion>
        </text:changed-region>
        <text:changed-region xml:id="ct94802957414096" text:id="ct94802957414096">
          <text:insertion>
            <office:change-info>
              <dc:creator>Jesus Gonzalez-Barahona</dc:creator>
              <dc:date>2022-05-25T21:19:50</dc:date>
            </office:change-info>
          </text:insertion>
        </text:changed-region>
        <text:changed-region xml:id="ct94802957414880" text:id="ct94802957414880">
          <text:insertion>
            <office:change-info>
              <dc:creator>Jesus Gonzalez-Barahona</dc:creator>
              <dc:date>2022-05-25T20:51:09</dc:date>
            </office:change-info>
          </text:insertion>
        </text:changed-region>
        <text:changed-region xml:id="ct94802957416496" text:id="ct94802957416496">
          <text:insertion>
            <office:change-info>
              <dc:creator>Jesus Gonzalez-Barahona</dc:creator>
              <dc:date>2022-05-25T20:51:09</dc:date>
            </office:change-info>
          </text:insertion>
        </text:changed-region>
        <text:changed-region xml:id="ct94802957417136" text:id="ct94802957417136">
          <text:insertion>
            <office:change-info>
              <dc:creator>Jesus Gonzalez-Barahona</dc:creator>
              <dc:date>2022-06-08T09:31:46</dc:date>
            </office:change-info>
          </text:insertion>
        </text:changed-region>
        <text:changed-region xml:id="ct94802957417776" text:id="ct94802957417776">
          <text:insertion>
            <office:change-info>
              <dc:creator>Jesus Gonzalez-Barahona</dc:creator>
              <dc:date>2022-06-08T09:31:48</dc:date>
            </office:change-info>
          </text:insertion>
        </text:changed-region>
        <text:changed-region xml:id="ct94802957418416" text:id="ct94802957418416">
          <text:insertion>
            <office:change-info>
              <dc:creator>Jesus Gonzalez-Barahona</dc:creator>
              <dc:date>2022-06-08T09:31:51</dc:date>
            </office:change-info>
          </text:insertion>
        </text:changed-region>
        <text:changed-region xml:id="ct94802957419136" text:id="ct94802957419136">
          <text:insertion>
            <office:change-info>
              <dc:creator>Jesus Gonzalez-Barahona</dc:creator>
              <dc:date>2022-06-08T09:31:53</dc:date>
            </office:change-info>
          </text:insertion>
        </text:changed-region>
        <text:changed-region xml:id="ct94802957419376" text:id="ct94802957419376">
          <text:insertion>
            <office:change-info>
              <dc:creator>Jesus Gonzalez-Barahona</dc:creator>
              <dc:date>2022-06-08T09:32:29</dc:date>
            </office:change-info>
          </text:insertion>
        </text:changed-region>
        <text:changed-region xml:id="ct94802957421104" text:id="ct94802957421104">
          <text:insertion>
            <office:change-info>
              <dc:creator>Jesus Gonzalez-Barahona</dc:creator>
              <dc:date>2022-05-25T20:51:09</dc:date>
            </office:change-info>
          </text:insertion>
        </text:changed-region>
        <text:changed-region xml:id="ct94802957421824" text:id="ct94802957421824">
          <text:insertion>
            <office:change-info>
              <dc:creator>Jesus Gonzalez-Barahona</dc:creator>
              <dc:date>2022-05-25T20:51:09</dc:date>
            </office:change-info>
          </text:insertion>
        </text:changed-region>
        <text:changed-region xml:id="ct94802957422544" text:id="ct94802957422544">
          <text:insertion>
            <office:change-info>
              <dc:creator>Jesus Gonzalez-Barahona</dc:creator>
              <dc:date>2022-05-25T20:51:09</dc:date>
            </office:change-info>
          </text:insertion>
        </text:changed-region>
        <text:changed-region xml:id="ct94802957423120" text:id="ct94802957423120">
          <text:insertion>
            <office:change-info>
              <dc:creator>Jesus Gonzalez-Barahona</dc:creator>
              <dc:date>2022-05-25T20:56:13</dc:date>
            </office:change-info>
          </text:insertion>
        </text:changed-region>
        <text:changed-region xml:id="ct94802957423760" text:id="ct94802957423760">
          <text:insertion>
            <office:change-info>
              <dc:creator>Jesus Gonzalez-Barahona</dc:creator>
              <dc:date>2022-05-25T20:51:09</dc:date>
            </office:change-info>
          </text:insertion>
        </text:changed-region>
        <text:changed-region xml:id="ct94802957424288" text:id="ct94802957424288">
          <text:insertion>
            <office:change-info>
              <dc:creator>Jesus Gonzalez-Barahona</dc:creator>
              <dc:date>2022-05-25T20:56:22</dc:date>
            </office:change-info>
          </text:insertion>
        </text:changed-region>
        <text:changed-region xml:id="ct94802957424928" text:id="ct94802957424928">
          <text:insertion>
            <office:change-info>
              <dc:creator>Jesus Gonzalez-Barahona</dc:creator>
              <dc:date>2022-05-25T20:51:09</dc:date>
            </office:change-info>
          </text:insertion>
        </text:changed-region>
        <text:changed-region xml:id="ct94802957425408" text:id="ct94802957425408">
          <text:insertion>
            <office:change-info>
              <dc:creator>Jesus Gonzalez-Barahona</dc:creator>
              <dc:date>2022-05-25T20:56:29</dc:date>
            </office:change-info>
          </text:insertion>
        </text:changed-region>
        <text:changed-region xml:id="ct94802957426528" text:id="ct94802957426528">
          <text:insertion>
            <office:change-info>
              <dc:creator>Jesus Gonzalez-Barahona</dc:creator>
              <dc:date>2022-05-25T20:51:09</dc:date>
            </office:change-info>
          </text:insertion>
        </text:changed-region>
        <text:changed-region xml:id="ct94802998482512" text:id="ct94802998482512">
          <text:insertion>
            <office:change-info>
              <dc:creator>Jesus Gonzalez-Barahona</dc:creator>
              <dc:date>2022-06-08T20:07:07</dc:date>
            </office:change-info>
          </text:insertion>
        </text:changed-region>
        <text:changed-region xml:id="ct94802957429712" text:id="ct94802957429712">
          <text:insertion>
            <office:change-info>
              <dc:creator>Jesus Gonzalez-Barahona</dc:creator>
              <dc:date>2022-05-25T20:56:54</dc:date>
            </office:change-info>
          </text:insertion>
        </text:changed-region>
        <text:changed-region xml:id="ct94802957432192" text:id="ct94802957432192">
          <text:insertion>
            <office:change-info>
              <dc:creator>Jesus Gonzalez-Barahona</dc:creator>
              <dc:date>2022-05-25T21:00:35</dc:date>
            </office:change-info>
          </text:insertion>
        </text:changed-region>
        <text:changed-region xml:id="ct94802957434048" text:id="ct94802957434048">
          <text:insertion>
            <office:change-info>
              <dc:creator>Jesus Gonzalez-Barahona</dc:creator>
              <dc:date>2022-05-25T21:20:05</dc:date>
            </office:change-info>
          </text:insertion>
        </text:changed-region>
        <text:changed-region xml:id="ct94802957436208" text:id="ct94802957436208">
          <text:insertion>
            <office:change-info>
              <dc:creator>Jesus Gonzalez-Barahona</dc:creator>
              <dc:date>2022-05-25T20:57:07</dc:date>
            </office:change-info>
          </text:insertion>
        </text:changed-region>
        <text:changed-region xml:id="ct94802957436848" text:id="ct94802957436848">
          <text:insertion>
            <office:change-info>
              <dc:creator>Jesus Gonzalez-Barahona</dc:creator>
              <dc:date>2022-05-25T20:57:07</dc:date>
            </office:change-info>
          </text:insertion>
        </text:changed-region>
        <text:changed-region xml:id="ct94802957437488" text:id="ct94802957437488">
          <text:insertion>
            <office:change-info>
              <dc:creator>Jesus Gonzalez-Barahona</dc:creator>
              <dc:date>2022-06-08T09:31:57</dc:date>
            </office:change-info>
          </text:insertion>
        </text:changed-region>
        <text:changed-region xml:id="ct94802957438128" text:id="ct94802957438128">
          <text:insertion>
            <office:change-info>
              <dc:creator>Jesus Gonzalez-Barahona</dc:creator>
              <dc:date>2022-06-08T09:31:59</dc:date>
            </office:change-info>
          </text:insertion>
        </text:changed-region>
        <text:changed-region xml:id="ct94802957438768" text:id="ct94802957438768">
          <text:insertion>
            <office:change-info>
              <dc:creator>Jesus Gonzalez-Barahona</dc:creator>
              <dc:date>2022-06-08T09:32:02</dc:date>
            </office:change-info>
          </text:insertion>
        </text:changed-region>
        <text:changed-region xml:id="ct94802957439408" text:id="ct94802957439408">
          <text:insertion>
            <office:change-info>
              <dc:creator>Jesus Gonzalez-Barahona</dc:creator>
              <dc:date>2022-06-08T09:32:04</dc:date>
            </office:change-info>
          </text:insertion>
        </text:changed-region>
        <text:changed-region xml:id="ct94802957440496" text:id="ct94802957440496">
          <text:insertion>
            <office:change-info>
              <dc:creator>Jesus Gonzalez-Barahona</dc:creator>
              <dc:date>2022-05-25T20:57:07</dc:date>
            </office:change-info>
          </text:insertion>
        </text:changed-region>
        <text:changed-region xml:id="ct94802957441136" text:id="ct94802957441136">
          <text:insertion>
            <office:change-info>
              <dc:creator>Jesus Gonzalez-Barahona</dc:creator>
              <dc:date>2022-05-25T20:57:32</dc:date>
            </office:change-info>
          </text:insertion>
        </text:changed-region>
        <text:changed-region xml:id="ct94802957441376" text:id="ct94802957441376">
          <text:insertion>
            <office:change-info>
              <dc:creator>Jesus Gonzalez-Barahona</dc:creator>
              <dc:date>2022-05-25T20:58:01</dc:date>
            </office:change-info>
          </text:insertion>
        </text:changed-region>
        <text:changed-region xml:id="ct94802957442016" text:id="ct94802957442016">
          <text:insertion>
            <office:change-info>
              <dc:creator>Jesus Gonzalez-Barahona</dc:creator>
              <dc:date>2022-05-25T20:59:48</dc:date>
            </office:change-info>
          </text:insertion>
        </text:changed-region>
        <text:changed-region xml:id="ct94802957442256" text:id="ct94802957442256">
          <text:insertion>
            <office:change-info>
              <dc:creator>Jesus Gonzalez-Barahona</dc:creator>
              <dc:date>2022-05-25T21:03:20</dc:date>
            </office:change-info>
          </text:insertion>
        </text:changed-region>
        <text:changed-region xml:id="ct94802957442496" text:id="ct94802957442496">
          <text:insertion>
            <office:change-info>
              <dc:creator>Jesus Gonzalez-Barahona</dc:creator>
              <dc:date>2022-05-25T21:00:04</dc:date>
            </office:change-info>
          </text:insertion>
        </text:changed-region>
        <text:changed-region xml:id="ct94802957442896" text:id="ct94802957442896">
          <text:insertion>
            <office:change-info>
              <dc:creator>Jesus Gonzalez-Barahona</dc:creator>
              <dc:date>2022-05-25T21:01:04</dc:date>
            </office:change-info>
          </text:insertion>
        </text:changed-region>
        <text:changed-region xml:id="ct94802957443424" text:id="ct94802957443424">
          <text:insertion>
            <office:change-info>
              <dc:creator>Jesus Gonzalez-Barahona</dc:creator>
              <dc:date>2022-05-25T21:05:46</dc:date>
            </office:change-info>
          </text:insertion>
        </text:changed-region>
        <text:changed-region xml:id="ct94802957443664" text:id="ct94802957443664">
          <text:insertion>
            <office:change-info>
              <dc:creator>Jesus Gonzalez-Barahona</dc:creator>
              <dc:date>2022-05-25T21:06:00</dc:date>
            </office:change-info>
          </text:insertion>
        </text:changed-region>
        <text:changed-region xml:id="ct94802957444464" text:id="ct94802957444464">
          <text:insertion>
            <office:change-info>
              <dc:creator>Jesus Gonzalez-Barahona</dc:creator>
              <dc:date>2022-05-25T21:01:21</dc:date>
            </office:change-info>
          </text:insertion>
        </text:changed-region>
        <text:changed-region xml:id="ct94802957444704" text:id="ct94802957444704">
          <text:insertion>
            <office:change-info>
              <dc:creator>Jesus Gonzalez-Barahona</dc:creator>
              <dc:date>2022-05-25T21:02:01</dc:date>
            </office:change-info>
          </text:insertion>
        </text:changed-region>
        <text:changed-region xml:id="ct94802957445168" text:id="ct94802957445168">
          <text:insertion>
            <office:change-info>
              <dc:creator>Jesus Gonzalez-Barahona</dc:creator>
              <dc:date>2022-05-25T21:06:41</dc:date>
            </office:change-info>
          </text:insertion>
        </text:changed-region>
        <text:changed-region xml:id="ct94802957445808" text:id="ct94802957445808">
          <text:insertion>
            <office:change-info>
              <dc:creator>Jesus Gonzalez-Barahona</dc:creator>
              <dc:date>2022-05-25T21:02:29</dc:date>
            </office:change-info>
          </text:insertion>
        </text:changed-region>
        <text:changed-region xml:id="ct94802957446048" text:id="ct94802957446048">
          <text:insertion>
            <office:change-info>
              <dc:creator>Jesus Gonzalez-Barahona</dc:creator>
              <dc:date>2022-05-25T21:03:49</dc:date>
            </office:change-info>
          </text:insertion>
        </text:changed-region>
        <text:changed-region xml:id="ct94802957446288" text:id="ct94802957446288">
          <text:insertion>
            <office:change-info>
              <dc:creator>Jesus Gonzalez-Barahona</dc:creator>
              <dc:date>2022-05-25T21:04:06</dc:date>
            </office:change-info>
          </text:insertion>
        </text:changed-region>
        <text:changed-region xml:id="ct94802957446528" text:id="ct94802957446528">
          <text:insertion>
            <office:change-info>
              <dc:creator>Jesus Gonzalez-Barahona</dc:creator>
              <dc:date>2022-05-25T21:07:31</dc:date>
            </office:change-info>
          </text:insertion>
        </text:changed-region>
        <text:changed-region xml:id="ct94802957447360" text:id="ct94802957447360">
          <text:insertion>
            <office:change-info>
              <dc:creator>Jesus Gonzalez-Barahona</dc:creator>
              <dc:date>2022-05-25T20:57:07</dc:date>
            </office:change-info>
          </text:insertion>
        </text:changed-region>
        <text:changed-region xml:id="ct94802957449008" text:id="ct94802957449008">
          <text:insertion>
            <office:change-info>
              <dc:creator>Jesus Gonzalez-Barahona</dc:creator>
              <dc:date>2022-05-25T20:51:09</dc:date>
            </office:change-info>
          </text:insertion>
        </text:changed-region>
        <text:changed-region xml:id="ct94802957450624" text:id="ct94802957450624">
          <text:insertion>
            <office:change-info>
              <dc:creator>Jesus Gonzalez-Barahona</dc:creator>
              <dc:date>2022-05-25T21:08:28</dc:date>
            </office:change-info>
          </text:insertion>
        </text:changed-region>
        <text:changed-region xml:id="ct94802957452320" text:id="ct94802957452320">
          <text:insertion>
            <office:change-info>
              <dc:creator>Jesus Gonzalez-Barahona</dc:creator>
              <dc:date>2022-05-25T21:08:28</dc:date>
            </office:change-info>
          </text:insertion>
        </text:changed-region>
        <text:changed-region xml:id="ct94802956481536" text:id="ct94802956481536">
          <text:insertion>
            <office:change-info>
              <dc:creator>Jesus Gonzalez-Barahona</dc:creator>
              <dc:date>2022-05-25T21:08:28</dc:date>
            </office:change-info>
          </text:insertion>
        </text:changed-region>
        <text:changed-region xml:id="ct94802956482688" text:id="ct94802956482688">
          <text:insertion>
            <office:change-info>
              <dc:creator>Jesus Gonzalez-Barahona</dc:creator>
              <dc:date>2022-06-08T09:32:09</dc:date>
            </office:change-info>
          </text:insertion>
        </text:changed-region>
        <text:changed-region xml:id="ct94802957251680" text:id="ct94802957251680">
          <text:insertion>
            <office:change-info>
              <dc:creator>Jesus Gonzalez-Barahona</dc:creator>
              <dc:date>2022-06-08T09:32:11</dc:date>
            </office:change-info>
          </text:insertion>
        </text:changed-region>
        <text:changed-region xml:id="ct94802957252320" text:id="ct94802957252320">
          <text:insertion>
            <office:change-info>
              <dc:creator>Jesus Gonzalez-Barahona</dc:creator>
              <dc:date>2022-06-08T09:32:13</dc:date>
            </office:change-info>
          </text:insertion>
        </text:changed-region>
        <text:changed-region xml:id="ct94802957252960" text:id="ct94802957252960">
          <text:insertion>
            <office:change-info>
              <dc:creator>Jesus Gonzalez-Barahona</dc:creator>
              <dc:date>2022-06-08T09:32:15</dc:date>
            </office:change-info>
          </text:insertion>
        </text:changed-region>
        <text:changed-region xml:id="ct94802957398976" text:id="ct94802957398976">
          <text:insertion>
            <office:change-info>
              <dc:creator>Jesus Gonzalez-Barahona</dc:creator>
              <dc:date>2022-05-25T21:08:28</dc:date>
            </office:change-info>
          </text:insertion>
        </text:changed-region>
        <text:changed-region xml:id="ct94802957397776" text:id="ct94802957397776">
          <text:insertion>
            <office:change-info>
              <dc:creator>Jesus Gonzalez-Barahona</dc:creator>
              <dc:date>2022-05-25T21:08:28</dc:date>
            </office:change-info>
          </text:insertion>
        </text:changed-region>
        <text:changed-region xml:id="ct94802957458096" text:id="ct94802957458096">
          <text:insertion>
            <office:change-info>
              <dc:creator>Jesus Gonzalez-Barahona</dc:creator>
              <dc:date>2022-05-25T21:08:28</dc:date>
            </office:change-info>
          </text:insertion>
        </text:changed-region>
        <text:changed-region xml:id="ct94802957458960" text:id="ct94802957458960">
          <text:insertion>
            <office:change-info>
              <dc:creator>Jesus Gonzalez-Barahona</dc:creator>
              <dc:date>2022-05-25T21:08:28</dc:date>
            </office:change-info>
          </text:insertion>
        </text:changed-region>
        <text:changed-region xml:id="ct94802957459600" text:id="ct94802957459600">
          <text:insertion>
            <office:change-info>
              <dc:creator>Jesus Gonzalez-Barahona</dc:creator>
              <dc:date>2022-05-25T21:08:28</dc:date>
            </office:change-info>
          </text:insertion>
        </text:changed-region>
        <text:changed-region xml:id="ct94802957460880" text:id="ct94802957460880">
          <text:insertion>
            <office:change-info>
              <dc:creator>Jesus Gonzalez-Barahona</dc:creator>
              <dc:date>2022-05-25T21:08:28</dc:date>
            </office:change-info>
          </text:insertion>
        </text:changed-region>
        <text:changed-region xml:id="ct94802957463056" text:id="ct94802957463056">
          <text:deletion>
            <office:change-info>
              <dc:creator>Jesus Gonzalez-Barahona</dc:creator>
              <dc:date>2022-05-25T21:08:33</dc:date>
            </office:change-info>
            <text:p text:style-name="P52"/>
            <text:p text:style-name="P52"/>
          </text:deletion>
        </text:changed-region>
        <text:changed-region xml:id="ct94802957465088" text:id="ct94802957465088">
          <text:deletion>
            <office:change-info>
              <dc:creator>Jesus Gonzalez-Barahona</dc:creator>
              <dc:date>2022-05-25T19:54:10</dc:date>
            </office:change-info>
            <text:p text:style-name="P12">ITEMS</text:p>
          </text:deletion>
        </text:changed-region>
        <text:changed-region xml:id="ct94802957466080" text:id="ct94802957466080">
          <text:deletion>
            <office:change-info>
              <dc:creator>Jesus Gonzalez-Barahona</dc:creator>
              <dc:date>2022-05-25T19:24:53</dc:date>
            </office:change-info>
            <text:p text:style-name="P12">ESCALA DE VALORACIÓN</text:p>
          </text:deletion>
        </text:changed-region>
        <text:changed-region xml:id="ct94802957467296" text:id="ct94802957467296">
          <text:deletion>
            <office:change-info>
              <dc:creator>Jesus Gonzalez-Barahona</dc:creator>
              <dc:date>2022-05-25T19:15:45</dc:date>
            </office:change-info>
            <text:p text:style-name="P13">Número de grupos donde se imparte la misma asignatura donde se utilizan los mismos materiales</text:p>
          </text:deletion>
        </text:changed-region>
        <text:changed-region xml:id="ct94802957468336" text:id="ct94802957468336">
          <text:deletion>
            <office:change-info>
              <dc:creator>Jesus Gonzalez-Barahona</dc:creator>
              <dc:date>2022-05-25T19:15:45</dc:date>
            </office:change-info>
            <text:p text:style-name="P13">Los materiales solo sirven para esta asignatura de la URJC (0)</text:p>
          </text:deletion>
        </text:changed-region>
        <text:changed-region xml:id="ct94802957469152" text:id="ct94802957469152">
          <text:deletion>
            <office:change-info>
              <dc:creator>Jesus Gonzalez-Barahona</dc:creator>
              <dc:date>2022-05-25T19:15:45</dc:date>
            </office:change-info>
            <text:p text:style-name="P48">Los materiales se podrían utilizar en otras asignaturas de la URJC (3)</text:p>
          </text:deletion>
        </text:changed-region>
        <text:changed-region xml:id="ct94802957469968" text:id="ct94802957469968">
          <text:deletion>
            <office:change-info>
              <dc:creator>Jesus Gonzalez-Barahona</dc:creator>
              <dc:date>2022-05-25T19:15:45</dc:date>
            </office:change-info>
            <text:p text:style-name="P12">Los materiales se utilizan en otras asignaturas de la URJC, aunque de forma parcial (5)</text:p>
          </text:deletion>
        </text:changed-region>
        <text:changed-region xml:id="ct94802957470784" text:id="ct94802957470784">
          <text:deletion>
            <office:change-info>
              <dc:creator>Jesus Gonzalez-Barahona</dc:creator>
              <dc:date>2022-05-25T19:15:45</dc:date>
            </office:change-info>
            <text:p text:style-name="P12">Los materiales se utilizan en otras asignaturas de la URJC de forma completa (8)</text:p>
          </text:deletion>
        </text:changed-region>
        <text:changed-region xml:id="ct94802957474128" text:id="ct94802957474128">
          <text:deletion>
            <office:change-info>
              <dc:creator>Jesus Gonzalez-Barahona</dc:creator>
              <dc:date>2022-05-25T21:08:56</dc:date>
            </office:change-info>
            <text:p text:style-name="P12">‍</text:p>
          </text:deletion>
        </text:changed-region>
        <text:changed-region xml:id="ct94802957476240" text:id="ct94802957476240">
          <text:deletion>
            <office:change-info>
              <dc:creator>Jesus Gonzalez-Barahona</dc:creator>
              <dc:date>2022-05-25T21:08:56</dc:date>
            </office:change-info>
            <text:p text:style-name="P16">‍</text:p>
          </text:deletion>
        </text:changed-region>
        <text:changed-region xml:id="ct94802957481712" text:id="ct94802957481712">
          <text:deletion>
            <office:change-info>
              <dc:creator>Jesus Gonzalez-Barahona</dc:creator>
              <dc:date>2022-05-25T21:08:33</dc:date>
            </office:change-info>
            <text:p text:style-name="P16">‍Guía de la asignatura enlazada</text:p>
          </text:deletion>
        </text:changed-region>
        <text:changed-region xml:id="ct94802957482624" text:id="ct94802957482624">
          <text:deletion>
            <office:change-info>
              <dc:creator>Jesus Gonzalez-Barahona</dc:creator>
              <dc:date>2022-05-25T21:08:33</dc:date>
            </office:change-info>
            <text:p text:style-name="P15">No presenta (0)</text:p>
          </text:deletion>
        </text:changed-region>
        <text:changed-region xml:id="ct94802957483344" text:id="ct94802957483344">
          <text:deletion>
            <office:change-info>
              <dc:creator>Jesus Gonzalez-Barahona</dc:creator>
              <dc:date>2022-05-25T21:08:33</dc:date>
            </office:change-info>
            <text:p text:style-name="P15">Incluye un calendario con el plan docente detallado</text:p>
          </text:deletion>
        </text:changed-region>
        <text:changed-region xml:id="ct94802957483968" text:id="ct94802957483968">
          <text:deletion>
            <office:change-info>
              <dc:creator>Jesus Gonzalez-Barahona</dc:creator>
              <dc:date>2022-05-25T19:51:31</dc:date>
            </office:change-info>
            <text:p text:style-name="P15"><text:span text:style-name="T42"><text:s/>(3)</text:span></text:p>
          </text:deletion>
        </text:changed-region>
        <text:changed-region xml:id="ct94802957484704" text:id="ct94802957484704">
          <text:deletion>
            <office:change-info>
              <dc:creator>Jesus Gonzalez-Barahona</dc:creator>
              <dc:date>2022-05-25T21:08:33</dc:date>
            </office:change-info>
            <text:p text:style-name="P15">Incluye también el detall</text:p>
          </text:deletion>
        </text:changed-region>
        <text:changed-region xml:id="ct94802957485104" text:id="ct94802957485104">
          <text:deletion>
            <office:change-info>
              <dc:creator>Jesus Gonzalez-Barahona</dc:creator>
              <dc:date>2022-05-25T19:52:11</dc:date>
            </office:change-info>
            <text:p text:style-name="P15"><text:span text:style-name="T42">e</text:span></text:p>
          </text:deletion>
        </text:changed-region>
        <text:changed-region xml:id="ct94802957485344" text:id="ct94802957485344">
          <text:deletion>
            <office:change-info>
              <dc:creator>Jesus Gonzalez-Barahona</dc:creator>
              <dc:date>2022-05-25T21:08:33</dc:date>
            </office:change-info>
            <text:p text:style-name="P15"><text:span text:style-name="T42"><text:s/>de los materiales, ejercicios, etc, y una guía de estudio (6)</text:span></text:p>
          </text:deletion>
        </text:changed-region>
        <text:changed-region xml:id="ct94802957486080" text:id="ct94802957486080">
          <text:deletion>
            <office:change-info>
              <dc:creator>Jesus Gonzalez-Barahona</dc:creator>
              <dc:date>2022-05-25T21:08:33</dc:date>
            </office:change-info>
            <text:p text:style-name="P15">Incluye además otros detalles que ayuden al seguimiento de la asignatura (10)</text:p>
          </text:deletion>
        </text:changed-region>
        <text:changed-region xml:id="ct94802957488704" text:id="ct94802957488704">
          <text:deletion>
            <office:change-info>
              <dc:creator>Jesus Gonzalez-Barahona</dc:creator>
              <dc:date>2022-05-25T21:08:33</dc:date>
            </office:change-info>
            <text:p text:style-name="P16"><text:span text:style-name="T14">Presentaciones o t</text:span>ransparencias en abierto enlazadas</text:p>
          </text:deletion>
        </text:changed-region>
        <text:changed-region xml:id="ct94802957489616" text:id="ct94802957489616">
          <text:deletion>
            <office:change-info>
              <dc:creator>Jesus Gonzalez-Barahona</dc:creator>
              <dc:date>2022-05-25T21:08:33</dc:date>
            </office:change-info>
            <text:p text:style-name="P15">No<text:span text:style-name="T11"><text:line-break/></text:span>presenta</text:p>
            <text:p text:style-name="P15">(0)</text:p>
          </text:deletion>
        </text:changed-region>
        <text:changed-region xml:id="ct94802957490480" text:id="ct94802957490480">
          <text:deletion>
            <office:change-info>
              <dc:creator>Jesus Gonzalez-Barahona</dc:creator>
              <dc:date>2022-05-25T21:08:33</dc:date>
            </office:change-info>
            <text:p text:style-name="P15">Cubren algunos temas de la asignatura (3)</text:p>
          </text:deletion>
        </text:changed-region>
        <text:changed-region xml:id="ct94802957491344" text:id="ct94802957491344">
          <text:deletion>
            <office:change-info>
              <dc:creator>Jesus Gonzalez-Barahona</dc:creator>
              <dc:date>2022-05-25T21:08:33</dc:date>
            </office:change-info>
            <text:p text:style-name="P15">Cubren </text:p>
          </text:deletion>
        </text:changed-region>
        <text:changed-region xml:id="ct94802957491584" text:id="ct94802957491584">
          <text:deletion>
            <office:change-info>
              <dc:creator>Jesus Gonzalez-Barahona</dc:creator>
              <dc:date>2022-05-25T19:29:30</dc:date>
            </office:change-info>
            <text:p text:style-name="P15"><text:span text:style-name="T41">la mayor parte de temas de la asignatura (5)</text:span></text:p>
          </text:deletion>
        </text:changed-region>
        <text:changed-region xml:id="ct94802957492368" text:id="ct94802957492368">
          <text:deletion>
            <office:change-info>
              <dc:creator>Jesus Gonzalez-Barahona</dc:creator>
              <dc:date>2022-05-25T19:28:51</dc:date>
            </office:change-info>
            <text:p text:style-name="P15">Cubren todos los temas de la asignatura (8)</text:p>
          </text:deletion>
        </text:changed-region>
        <text:changed-region xml:id="ct94802957495280" text:id="ct94802957495280">
          <text:deletion>
            <office:change-info>
              <dc:creator>Jesus Gonzalez-Barahona</dc:creator>
              <dc:date>2022-05-25T21:08:33</dc:date>
            </office:change-info>
            <text:p text:style-name="P16">Apuntes en abierto enlazados</text:p>
          </text:deletion>
        </text:changed-region>
        <text:changed-region xml:id="ct94802957496272" text:id="ct94802957496272">
          <text:deletion>
            <office:change-info>
              <dc:creator>Jesus Gonzalez-Barahona</dc:creator>
              <dc:date>2022-05-25T21:08:33</dc:date>
            </office:change-info>
            <text:p text:style-name="P15">No<text:span text:style-name="T11"><text:line-break/></text:span>presenta</text:p>
            <text:p text:style-name="P15">(0)</text:p>
          </text:deletion>
        </text:changed-region>
        <text:changed-region xml:id="ct94802957497056" text:id="ct94802957497056">
          <text:deletion>
            <office:change-info>
              <dc:creator>Jesus Gonzalez-Barahona</dc:creator>
              <dc:date>2022-05-25T21:08:33</dc:date>
            </office:change-info>
            <text:p text:style-name="P15">Cubren algunos temas de la asignatura (5)</text:p>
          </text:deletion>
        </text:changed-region>
        <text:changed-region xml:id="ct94802957497920" text:id="ct94802957497920">
          <text:deletion>
            <office:change-info>
              <dc:creator>Jesus Gonzalez-Barahona</dc:creator>
              <dc:date>2022-05-25T21:08:33</dc:date>
            </office:change-info>
            <text:p text:style-name="P15">Cubren la mayor parte de temas de la asignatura (7)</text:p>
          </text:deletion>
        </text:changed-region>
        <text:changed-region xml:id="ct94802957498784" text:id="ct94802957498784">
          <text:deletion>
            <office:change-info>
              <dc:creator>Jesus Gonzalez-Barahona</dc:creator>
              <dc:date>2022-05-25T21:08:33</dc:date>
            </office:change-info>
            <text:p text:style-name="P15">Cubren todos los temas de la asignatura (10)</text:p>
          </text:deletion>
        </text:changed-region>
        <text:changed-region xml:id="ct94802957501696" text:id="ct94802957501696">
          <text:deletion>
            <office:change-info>
              <dc:creator>Jesus Gonzalez-Barahona</dc:creator>
              <dc:date>2022-05-25T21:08:33</dc:date>
            </office:change-info>
            <text:p text:style-name="P16">Colecciones de ejercicios o problemas en abierto enlazados</text:p>
          </text:deletion>
        </text:changed-region>
        <text:changed-region xml:id="ct94802957502608" text:id="ct94802957502608">
          <text:deletion>
            <office:change-info>
              <dc:creator>Jesus Gonzalez-Barahona</dc:creator>
              <dc:date>2022-05-25T21:08:33</dc:date>
            </office:change-info>
            <text:p text:style-name="P15">No<text:span text:style-name="T11"><text:line-break/></text:span>presenta</text:p>
            <text:p text:style-name="P15">(0)</text:p>
          </text:deletion>
        </text:changed-region>
        <text:changed-region xml:id="ct94802957503472" text:id="ct94802957503472">
          <text:deletion>
            <office:change-info>
              <dc:creator>Jesus Gonzalez-Barahona</dc:creator>
              <dc:date>2022-05-25T21:08:33</dc:date>
            </office:change-info>
            <text:p text:style-name="P15">Cubren algunos temas de la asignatura, pero están sin resolver (5)</text:p>
          </text:deletion>
        </text:changed-region>
        <text:changed-region xml:id="ct94802957504336" text:id="ct94802957504336">
          <text:deletion>
            <office:change-info>
              <dc:creator>Jesus Gonzalez-Barahona</dc:creator>
              <dc:date>2022-05-25T21:08:33</dc:date>
            </office:change-info>
            <text:p text:style-name="P15">Cubren algunos temas de la asignatura, y están resueltos (7)</text:p>
          </text:deletion>
        </text:changed-region>
        <text:changed-region xml:id="ct94802957505200" text:id="ct94802957505200">
          <text:deletion>
            <office:change-info>
              <dc:creator>Jesus Gonzalez-Barahona</dc:creator>
              <dc:date>2022-05-25T21:08:33</dc:date>
            </office:change-info>
            <text:p text:style-name="P15">Cubren todos los temas de la asignatura, y están resueltos (10)</text:p>
          </text:deletion>
        </text:changed-region>
        <text:changed-region xml:id="ct94802957508032" text:id="ct94802957508032">
          <text:deletion>
            <office:change-info>
              <dc:creator>Jesus Gonzalez-Barahona</dc:creator>
              <dc:date>2022-05-25T21:08:33</dc:date>
            </office:change-info>
            <text:p text:style-name="P16">Colecciones de trabajos, prácticas o proyectos en abierto enlazados</text:p>
          </text:deletion>
        </text:changed-region>
        <text:changed-region xml:id="ct94802957508720" text:id="ct94802957508720">
          <text:deletion>
            <office:change-info>
              <dc:creator>Jesus Gonzalez-Barahona</dc:creator>
              <dc:date>2022-05-25T21:08:33</dc:date>
            </office:change-info>
            <text:p text:style-name="P15">No<text:span text:style-name="T11"><text:line-break/></text:span>presenta</text:p>
            <text:p text:style-name="P15">(0)</text:p>
          </text:deletion>
        </text:changed-region>
        <text:changed-region xml:id="ct94802957509360" text:id="ct94802957509360">
          <text:deletion>
            <office:change-info>
              <dc:creator>Jesus Gonzalez-Barahona</dc:creator>
              <dc:date>2022-05-25T21:08:33</dc:date>
            </office:change-info>
            <text:p text:style-name="P15">Cubren algunos temas de la asignatura, pero están sin resolver (5)</text:p>
          </text:deletion>
        </text:changed-region>
        <text:changed-region xml:id="ct94802957510000" text:id="ct94802957510000">
          <text:deletion>
            <office:change-info>
              <dc:creator>Jesus Gonzalez-Barahona</dc:creator>
              <dc:date>2022-05-25T21:08:33</dc:date>
            </office:change-info>
            <text:p text:style-name="P15">Cubren algunos temas de la asignatura y están resueltos (7)</text:p>
          </text:deletion>
        </text:changed-region>
        <text:changed-region xml:id="ct94802957510640" text:id="ct94802957510640">
          <text:deletion>
            <office:change-info>
              <dc:creator>Jesus Gonzalez-Barahona</dc:creator>
              <dc:date>2022-05-25T21:08:33</dc:date>
            </office:change-info>
            <text:p text:style-name="P15">Cubren todos los temas de la asignatura, y están resueltos (10)</text:p>
          </text:deletion>
        </text:changed-region>
        <text:changed-region xml:id="ct94802957513024" text:id="ct94802957513024">
          <text:deletion>
            <office:change-info>
              <dc:creator>Jesus Gonzalez-Barahona</dc:creator>
              <dc:date>2022-05-25T21:08:33</dc:date>
            </office:change-info>
            <text:p text:style-name="P16">Colecciones de pruebas de evaluación en abierto enlazados</text:p>
          </text:deletion>
        </text:changed-region>
        <text:changed-region xml:id="ct94802957513840" text:id="ct94802957513840">
          <text:deletion>
            <office:change-info>
              <dc:creator>Jesus Gonzalez-Barahona</dc:creator>
              <dc:date>2022-05-25T21:08:33</dc:date>
            </office:change-info>
            <text:p text:style-name="P15">No<text:span text:style-name="T11"><text:line-break/></text:span>presenta</text:p>
            <text:p text:style-name="P15">(0)</text:p>
          </text:deletion>
        </text:changed-region>
        <text:changed-region xml:id="ct94802957514656" text:id="ct94802957514656">
          <text:deletion>
            <office:change-info>
              <dc:creator>Jesus Gonzalez-Barahona</dc:creator>
              <dc:date>2022-05-25T21:08:33</dc:date>
            </office:change-info>
            <text:p text:style-name="P15">Cubren algunos temas de la asignatura, pero están sin resolver (3)</text:p>
          </text:deletion>
        </text:changed-region>
        <text:changed-region xml:id="ct94802957515472" text:id="ct94802957515472">
          <text:deletion>
            <office:change-info>
              <dc:creator>Jesus Gonzalez-Barahona</dc:creator>
              <dc:date>2022-05-25T21:08:33</dc:date>
            </office:change-info>
            <text:p text:style-name="P15">Cubren algunos temas de la asignatura y están resueltos (7)</text:p>
          </text:deletion>
        </text:changed-region>
        <text:changed-region xml:id="ct94802957516288" text:id="ct94802957516288">
          <text:deletion>
            <office:change-info>
              <dc:creator>Jesus Gonzalez-Barahona</dc:creator>
              <dc:date>2022-05-25T21:08:33</dc:date>
            </office:change-info>
            <text:p text:style-name="P15">Cubren todos los temas de la asignatura, y están resueltos o con posibilidad de autoevaluación (10)</text:p>
          </text:deletion>
        </text:changed-region>
        <text:changed-region xml:id="ct94802957519056" text:id="ct94802957519056">
          <text:deletion>
            <office:change-info>
              <dc:creator>Jesus Gonzalez-Barahona</dc:creator>
              <dc:date>2022-05-25T21:08:33</dc:date>
            </office:change-info>
            <text:p text:style-name="P16">Video píldoras (hasta 15 min) enlazadas con TV URJC</text:p>
          </text:deletion>
        </text:changed-region>
        <text:changed-region xml:id="ct94802957519872" text:id="ct94802957519872">
          <text:deletion>
            <office:change-info>
              <dc:creator>Jesus Gonzalez-Barahona</dc:creator>
              <dc:date>2022-05-25T21:08:33</dc:date>
            </office:change-info>
            <text:p text:style-name="P15">No<text:span text:style-name="T11"><text:line-break/></text:span>presenta</text:p>
            <text:p text:style-name="P15">(0)</text:p>
          </text:deletion>
        </text:changed-region>
        <text:changed-region xml:id="ct94802957520688" text:id="ct94802957520688">
          <text:deletion>
            <office:change-info>
              <dc:creator>Jesus Gonzalez-Barahona</dc:creator>
              <dc:date>2022-05-25T21:08:33</dc:date>
            </office:change-info>
            <text:p text:style-name="P15">Video introductorio de la asignatura (5)</text:p>
          </text:deletion>
        </text:changed-region>
        <text:changed-region xml:id="ct94802957521504" text:id="ct94802957521504">
          <text:deletion>
            <office:change-info>
              <dc:creator>Jesus Gonzalez-Barahona</dc:creator>
              <dc:date>2022-05-25T21:08:33</dc:date>
            </office:change-info>
            <text:p text:style-name="P15">Cubren algunos temas de la asignatura (7)</text:p>
          </text:deletion>
        </text:changed-region>
        <text:changed-region xml:id="ct94802957522416" text:id="ct94802957522416">
          <text:deletion>
            <office:change-info>
              <dc:creator>Jesus Gonzalez-Barahona</dc:creator>
              <dc:date>2022-05-25T21:08:33</dc:date>
            </office:change-info>
            <text:p text:style-name="P15">Cubren todos los temas de la asignatura (10)</text:p>
          </text:deletion>
        </text:changed-region>
        <text:changed-region xml:id="ct94802957530272" text:id="ct94802957530272">
          <text:deletion>
            <office:change-info>
              <dc:creator>Jesus Gonzalez-Barahona</dc:creator>
              <dc:date>2022-05-25T21:08:33</dc:date>
            </office:change-info>
            <text:p text:style-name="P50"/>
            <text:p text:style-name="P49"/>
          </text:dele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9">Versión: 1.<text:change-start text:change-id="ct94803053570048"/><text:span text:style-name="T56">4</text:span><text:change-end text:change-id="ct94803053570048"/><text:change text:change-id="ct94802956389296"/>, <text:change-start text:change-id="ct94802956389536"/><text:span text:style-name="T54">8</text:span><text:change-end text:change-id="ct94802956389536"/><text:change text:change-id="ct94802956389776"/> de <text:change-start text:change-id="ct94802956390016"/><text:span text:style-name="T54">junio</text:span><text:change-end text:change-id="ct94802956390016"/><text:change text:change-id="ct94802956576736"/>.</text:p>
      <text:p text:style-name="P9"/>
      <text:p text:style-name="P9"><draw:frame draw:style-name="fr1" draw:name="Image1" text:anchor-type="char" svg:x="0.0189in" svg:y="-0.0063in" svg:width="2.1925in" svg:height="0.848in" draw:z-index="0"><draw:image xlink:href="Pictures/10000000000005D4000002413C0F70541D32920D.jpg" xlink:type="simple" xlink:show="embed" xlink:actuate="onLoad" draw:mime-type="image/jpeg"/></draw:frame><draw:frame draw:style-name="fr1" draw:name="Image2" text:anchor-type="char" svg:x="2.9772in" svg:y="-0.011in" svg:width="1.8472in" svg:height="1.0398in" draw:z-index="1"><draw:image xlink:href="Pictures/10000001000007800000043842EC265FC88E7C86.png" xlink:type="simple" xlink:show="embed" xlink:actuate="onLoad" draw:mime-type="image/png"/></draw:frame></text:p>
      <text:p text:style-name="P30"/>
      <text:p text:style-name="P30"/>
      <text:p text:style-name="P30">Convocatoria: Reconocimiento de publicación de asignaturas en acceso abierto 2022-2023</text:p>
      <text:p text:style-name="Standard"/>
      <text:p text:style-name="P34"><text:change-start text:change-id="ct94802956616400"/>Resolución del <text:span text:style-name="T18">Consejo de Gobierno</text:span> de la Universidad Rey Juan Carlos por la que se aprueba convocatoria pública para la concesión de un incentivo económico al personal docente e investigador de dicha Universidad, junto al reconocimiento de otros efectos favorables, por la publicación de asignaturas en acceso abierto para el curso 2022-2023.</text:p>
      <text:p text:style-name="P33"><text:change-end text:change-id="ct94802956616400"/>La Universidad Rey Juan Carlos desea promover entre sus docentes la creación de recursos educativos abiertos de calidad, y fomentar su uso en las asignaturas que imparten. Con este fin se publica esta convocatoria, que pretende reconocer la publicación de asignaturas en acceso abierto impartidas en títulos de grado y máster de la URJC durante el curso académico 2022-2023, y que se espera sea el comienzo de una serie de convocatorias que tendrán lugar anualmente.</text:p>
      <text:p text:style-name="Text_20_body">La publicación de materiales en acceso abierto supone un trabajo adicional para los docentes que los producen, <text:span text:style-name="T1">ya que han de </text:span>tener en cuenta buenas prácticas para garantizar el correcto tratamiento de los derechos sobre los materiales que se publican, su correcto licenciamiento y su depósito con el fin de asegurar su preservación y facilitar su localización futura. Por otro lado, el hecho de que los materiales estén sujetos al escrutinio público supone un esfuerzo extra de cara a la <text:span text:style-name="T1">mejora de su c</text:span>alidad académica.</text:p>
      <text:p text:style-name="Text_20_body">Pero este trabajo produce grandes beneficios. Por un lado, facilita la compartición de los recursos educativos con otros docentes, dentro y fuera de la Universidad, permitiendo la creación de comunidades informales u organizadas que colaboren en su mejora gradual a lo largo del tiempo. Por otro, hace más sencillo y fiable el acceso a los materiales <text:span text:style-name="T1">por parte del alumnado de la</text:span>s asignaturas que los utiliza, y por cualquier otra persona interesada en los temas que cubren. De esta forma, ayudan <text:span text:style-name="T1">a quien</text:span><text:span text:style-name="T4"> </text:span>los quiera utilizar para mejorar su conocimiento personal, sin importar el momen<text:span text:style-name="T1">to en que acceda ni el</text:span> lugar en el que resida. Por último, permiten una transferencia de conocimiento no sólo a los estudiantes de la Universidad, sino a la sociedad en general.</text:p>
      <text:p text:style-name="Text_20_body">Esta convocatoria se enmarca en los esfuerzos realizados por los vicerrectorados de Transformación Digital e Innovación Docente, Ordenación Académica y Formación del Profesorado y Extensión Universitaria para fomentar las prácticas de publicación abierta de materiales docentes,<text:span text:style-name="T1"> considerada una forma idónea de promover la transferencia de conocimiento a la sociedad, el mejor acceso de los estudiantes a los </text:span>materiales necesarios para su formación, y la mejora de calidad de los materiales docentes que se producen en la Universidad, todos ellos fines de la URJC. <text:change-start text:change-id="ct94802956593664"/></text:p>
      <text:p text:style-name="P39"><text:span text:style-name="T39">Esta</text:span> convocatoria <text:span text:style-name="T39">también </text:span>se enmarca dentro las acciones del Proyecto Tractor <text:span text:style-name="T40">interuniversitario</text:span> RED (<text:span text:style-name="T5">Recursos </text:span><text:span text:style-name="T6">e</text:span><text:span text:style-name="T5">ducativos digitales: calidad y compartición en abierto)</text:span>, <text:span text:style-name="T55">con un presupuesto total de 80.000 euros,</text:span> financiado en el marco del Plan UniDigital del Ministerio de Universidades <text:span text:style-name="T55">con los siguientes datos espec</text:span><text:span text:style-name="T48">íficos: Componente 21 “Modernización y digitalización del sistema educativo, incluida la educación temprana de 0 a 3 años”, </text:span><text:soft-page-break/>Inversión I5 “Mejora de infraestructuras digitales, el equipamiento, las tecnologías, la docencia y la evaluación digitales universitarios”, Proyecto P1 “Digitalización”, Subproyecto S40 “Univ. REY JUAN CARLOS. Incremento del 10% de su índice de digitalización desde 2019”, <text:span text:style-name="T48">Línea de actuación 3 “Contenidos y programas de formación”</text:span>. <text:span text:style-name="T40">El Plan UniDigital se publicó el 7 de septiembre de 2021 como Orden para la Modernización y Digitalización del sistema universitario español en el marco del plan de Recuperación, Transformación y Resiliencia, al amparo del</text:span> Real Decreto 641/2021, de 27 de julio <text:span text:style-name="T40">(publicado en BOE el</text:span> 28 de julio<text:span text:style-name="T40">)</text:span> que regula la concesión directa de subvenciones a Universidades Públicas Españolas para la Modernización y Digitalización del Sistema Universitario español en el marco del Plan de Recuperación, Transformación y Resiliencia.</text:p>
      <text:p text:style-name="P38">Estas <text:span text:style-name="T40">subvenciones</text:span> van dirigidas a fomentar la inversión en infraestructuras, desarrollos tecnológicos y proyectos de innovación docente para mejorar los recursos académicos en digitalización; reducir la brecha digital del personal académico y del estudiantado; impulsar proyectos de innovación digital interuniversitarios de carácter estratégico e interdisciplinar, e impulsar la formación digital, con el compromiso de alcanzar el hito de aumentar el «índice de digitalización de las universidades» en, al menos, un diez por ciento de media respecto a 2019.<text:change-end text:change-id="ct94802956593664"/><text:change text:change-id="ct94802956631152"/></text:p>
      <text:list xml:id="list202620696896597" text:continue-numbering="true" text:style-name="WWNum2">
        <text:list-item>
          <text:h text:style-name="P42" text:outline-level="1">1. Objeto de la convocatoria</text:h>
        </text:list-item>
      </text:list>
      <text:p text:style-name="Text_20_body"><text:change text:change-id="ct94803135156864"/><text:change text:change-id="ct94802956610976"/><text:change text:change-id="ct94803020187424"/>E<text:change-start text:change-id="ct94802956610688"/><text:span text:style-name="T39">sta</text:span><text:change-end text:change-id="ct94802956610688"/><text:change text:change-id="ct94802956610400"/> convocatoria pretende promover el trabajo del personal docente <text:span text:style-name="T1">d</text:span>e la URJC para que publiquen sus materiales en asignaturas en acceso abierto<text:change-start text:change-id="ct94802956610112"/>, evaluándose dicho trabajo y asignando, en su caso, un incentivo económico por el que se reconoce el esfuerzo realizado <text:span text:style-name="T18">en la elaboración de materiales publicados </text:span>durante el curso 2022-23<text:change-end text:change-id="ct94802956610112"/><text:change-start text:change-id="ct94802956707088"/><office:annotation loext:resolved="false"><dc:creator>Jesus Gonzalez-Barahona</dc:creator><dc:date>2022-05-24T09:24:55.102624533</dc:date><text:p text:style-name="P80"><text:span text:style-name="T61">Se añade “en la elaboración de materiales publicados durante el curso...”, dado que el esfuerzo puede ser anterior al curso, pero siempre será por materiales publicados durante el curso.</text:span></text:p></office:annotation><text:change-end text:change-id="ct94802956707088"/>. <text:change-start text:change-id="ct94802956676288"/><text:span text:style-name="T20">E</text:span><text:change-end text:change-id="ct94802956676288"/><text:change-start text:change-id="ct94802956670160"/><text:span text:style-name="T18">sta convocatoria </text:span><text:span text:style-name="T20">está dirigida a</text:span><text:span text:style-name="T18"> todo el Personal Docente de la Universidad, siempre que </text:span><text:span text:style-name="T19">cumpla las condiciones especificadas más adelante </text:span><text:span text:style-name="T20">en esta convocatoria, donde se indica</text:span><text:change-end text:change-id="ct94802956670160"/><text:change-start text:change-id="ct94802956703680"/><text:span text:style-name="T20"><office:annotation loext:resolved="false"><dc:creator>Jesus Gonzalez-Barahona</dc:creator><dc:date>2022-05-24T09:38:17.259623959</dc:date><text:p text:style-name="P80"><text:span text:style-name="T61">Añadido para dejar claro que se pueden presentar todo el Personal Docente.</text:span></text:p></office:annotation></text:span><text:change-end text:change-id="ct94802956703680"/><text:change text:change-id="ct94802956699584"/><text:change text:change-id="ct94802956656432"/><text:change text:change-id="ct94802956609296"/> qué asignaturas se pueden considerar, qué condiciones formales deben cumplir sus materiales, cómo deben ser publicados y utilizad<text:span text:style-name="T1">os en esas asignatura</text:span>s, y cómo se realizará el reconocimiento a sus autores. Todas las condic<text:span text:style-name="T1">iones deben cumplirse en el </text:span>momento de <text:change-start text:change-id="ct94802956700944"/><text:span text:style-name="T19">finalización del plazo de </text:span><text:change-end text:change-id="ct94802956700944"/>presentación de la solicitud a esta convocatoria. </text:p>
      <text:list xml:id="list202620991531028" text:continue-numbering="true" text:style-name="WWNum2">
        <text:list-item>
          <text:h text:style-name="P42" text:outline-level="1">2. Asignaturas</text:h>
        </text:list-item>
      </text:list>
      <text:p text:style-name="P2"/>
      <text:p text:style-name="Text_20_body"><text:span text:style-name="T1">Las asignaturas presentadas </text:span><text:change-start text:change-id="ct94802956651776"/><text:span text:style-name="T2">en las solicitudes </text:span><text:change-end text:change-id="ct94802956651776"/><text:span text:style-name="T1">a esta convocatoria deben tener sus materiales </text:span><text:change-start text:change-id="ct94802956700400"/><text:span text:style-name="T2">visibles </text:span><text:change-end text:change-id="ct94802956700400"/><text:span text:style-name="T1">en Aula Virtual </text:span><text:change-start text:change-id="ct94802956651488"/><text:span text:style-name="T2">mediante </text:span><text:change-end text:change-id="ct94802956651488"/><text:span text:style-name="T1">enla</text:span><text:change-start text:change-id="ct94802956700112"/><text:span text:style-name="T2">ces</text:span><text:change-end text:change-id="ct94802956700112"/><text:change text:change-id="ct94802956699824"/><text:span text:style-name="T1"> a </text:span><text:change-start text:change-id="ct94802956968704"/><text:span text:style-name="T2">las versiones depositadas en los</text:span><text:span text:style-name="T2"><office:annotation loext:resolved="false"><dc:creator>Jesus Gonzalez-Barahona</dc:creator><dc:date>2022-05-24T09:41:51.203217811</dc:date><text:p text:style-name="P80"><text:span text:style-name="T61">Redacción un poco diferente de la propuesta, para dejar claro que los materiales se depositan en los repositorios en abierto, y se enlazan desde el aula virtual.</text:span></text:p></office:annotation></text:span><text:span text:style-name="T2"> </text:span><text:change-end text:change-id="ct94802956968704"/><text:span text:style-name="T1">repositorios </text:span><text:change-start text:change-id="ct94802956980768"/><text:span text:style-name="T3">de acceso</text:span><text:change-end text:change-id="ct94802956980768"/><text:change text:change-id="ct94802956684112"/><text:span text:style-name="T1"> abierto de la Universidad, y cumplir las siguientes características:</text:span> </text:p>
      <text:list xml:id="list2188751" text:style-name="WWNum4">
        <text:list-item>
          <text:p text:style-name="P56">La asignatura debe ser de docencia oficial en un grado o máster universitario de la Universidad Rey Juan Carlos durante el curso 2022-2023. </text:p>
        </text:list-item>
        <text:list-item>
          <text:p text:style-name="P56">La asignatura en el Aula Virtual no debe mostrar materiales sobre los que los docentes no tengan permisos de publicación, y tiene que estar correctamente anonimizada, sin contener identificaciones de los estudiantes que la cursan en los documentos publicados. </text:p>
        </text:list-item>
      </text:list>
      <text:p text:style-name="Text_20_body">La valoración de la asignatura dentro de esta convocatoria se realizará en función de<text:change text:change-id="ct94802956683872"/><text:change text:change-id="ct94802956703984"/><text:change text:change-id="ct94802956704224"/><text:change-start text:change-id="ct94802956965920"/> <text:span text:style-name="T52">l</text:span><text:change-end text:change-id="ct94802956965920"/><text:change-start text:change-id="ct94802956966160"/><text:span text:style-name="T52">a variedad, detalle y cobertura del temario de los</text:span><text:change-end text:change-id="ct94802956966160"/> materiales docentes publicados en acceso abierto <text:change text:change-id="ct94802956707488"/><text:change text:change-id="ct94802956707728"/><text:change text:change-id="ct94802956640256"/>siguiendo la rúbrica de evaluación indicada en el Anexo II<text:change-start text:change-id="ct94802956652560"/>. <text:span text:style-name="T52">Las categor</text:span><text:span text:style-name="T46">ías de materiales considerados en est</text:span><text:change-end text:change-id="ct94802956652560"/><text:change-start text:change-id="ct94802956967440"/><text:span text:style-name="T46">a convocatoria son los siguientes</text:span><text:span text:style-name="T46"><office:annotation loext:resolved="false"><dc:creator>Jesus Gonzalez-Barahona</dc:creator><dc:date>2022-05-25T21:17:30.933777859</dc:date><text:p text:style-name="P80"><text:span text:style-name="T61">Se trata de clarificar lo que se valora en la convocatoria, y cómo acceder a los criterios detallados de evaluación</text:span></text:p></office:annotation></text:span><text:span text:style-name="T46">:</text:span><text:change-end text:change-id="ct94802956967440"/><text:change text:change-id="ct94802956696784"/></text:p>
      <text:list xml:id="list202620537596841" text:continue-numbering="true" text:style-name="WWNum4">
        <text:list-item>
          <text:list>
            <text:list-item>
              <text:p text:style-name="P56">Guía de la asignatura, en formato libre.</text:p>
            </text:list-item>
            <text:list-item>
              <text:p text:style-name="P56">Apuntes de la asignatura<text:note text:id="ftn1" text:note-class="footnote"><text:note-citation>1</text:note-citation><text:note-body><text:p text:style-name="P31">Por “apuntes de la asignatura” se entiende cualquier material de lectura y/o consulta que el <text:span text:style-name="T16">docente</text:span> pone a disposición del alumnado para complementar las actividades realizadas en clase.</text:p></text:note-body></text:note></text:p>
            </text:list-item>
            <text:list-item>
              <text:p text:style-name="P56"><text:soft-page-break/><text:span text:style-name="T14">Presentaciones o t</text:span>ransparencias de los temas de la asignatura</text:p>
            </text:list-item>
            <text:list-item>
              <text:p text:style-name="P56">Colecciones de ejercicios, problemas, trabajos o proyectos con o sin solución</text:p>
            </text:list-item>
            <text:list-item>
              <text:p text:style-name="P56">Colecciones de pruebas de evaluación con o sin solución</text:p>
            </text:list-item>
            <text:list-item>
              <text:p text:style-name="P56">Videos cortos (video-píldoras), para facilitar el seguimiento de los temas de la asignatura</text:p>
            </text:list-item>
            <text:list-item>
              <text:p text:style-name="P56">Otros materiales que puedan ser relevantes, dadas las características específicas de la asignatura<text:change-start text:change-id="ct94802956682784"/>, <text:span text:style-name="T21">como por ejemplo colecciones de programas de ordenador o c</text:span><text:change-end text:change-id="ct94802956682784"/><text:change-start text:change-id="ct94802956996960"/><text:span text:style-name="T21">olecciones de ilustraciones que se utilicen en para complementar las explicaciones de una asignatura.</text:span><text:change-end text:change-id="ct94802956996960"/><text:change-start text:change-id="ct94802956674528"/><text:span text:style-name="T21"><office:annotation loext:resolved="false"><dc:creator>Jesus Gonzalez-Barahona</dc:creator><dc:date>2022-05-24T09:46:24.083001527</dc:date><text:p text:style-name="P80"><text:span text:style-name="T61">Esta categoría de “otros materiales” está incluida para permitir la inclusión de materiales “atípicos” en las asignaturas que los utilicen, a propuesta de varios miembros de Consejo de Publicación Abierta. Precisamente como son atípicos, es difícil caracterizarlo, por lo que hemos optado por poner dos ejemplos que se comentaron en dicho Consejo.</text:span></text:p></office:annotation></text:span><text:change-end text:change-id="ct94802956674528"/></text:p>
            </text:list-item>
          </text:list>
        </text:list-item>
      </text:list>
      <text:p text:style-name="Text_20_body">Los materiales que se considerarán deben estar a disposición de los estudiantes en la asignatura en el Aula Virtual mediante un enlace al material publicado en abierto según se indica a continuación (dependiendo de su tipología). Si, por motivos docentes, el material se actualiza durante el curso, se podrá subir también directamente a la asignatura el material actualizado, pero siempre manteniendo el enlace a la versión publicada en abierto. En ese caso, se subirá al Archivo Abierto o a TV URJC la versión completamente actualizada al terminar el curso académico. Cualquiera de estos materiales ha de cumplir adicionalmente las siguientes condiciones:</text:p>
      <text:list xml:id="list3803176667" text:style-name="WWNum3">
        <text:list-item>
          <text:p text:style-name="P57">Ha de estar actualizado para el curso académico al que se refiere esta convocatoria, y ser utilizado durante su impartición.</text:p>
        </text:list-item>
        <text:list-item>
          <text:p text:style-name="P57">Ha de estar licenciado con una<text:span text:style-name="T1"> de las licencias de publicación en acceso abierto </text:span>aprobadas por el Consejo de Publicación Abierta, con el consentimiento de todos sus autores (licencias Atribución<text:note text:id="ftn2" text:note-class="footnote"><text:note-citation>2</text:note-citation><text:note-body><text:p text:style-name="Footnote">Licencia Atribución: <text:a xlink:type="simple" xlink:href="https://creativecommons.org/licenses/by/4.0/deed.es" text:style-name="Internet_20_link" text:visited-style-name="Visited_20_Internet_20_Link"><text:span text:style-name="Internet_20_link">https://creativecommons.org/licenses/by/4.0/deed.es</text:span></text:a></text:p></text:note-body></text:note> o Atribución-CompartirIgual<text:note text:id="ftn3" text:note-class="footnote"><text:note-citation>3</text:note-citation><text:note-body><text:p text:style-name="Footnote">Licencia Atribución-CompartirIgual: <text:a xlink:type="simple" xlink:href="https://creativecommons.org/licenses/by-sa/4.0/deed.es" text:style-name="Internet_20_link" text:visited-style-name="Visited_20_Internet_20_Link"><text:span text:style-name="Internet_20_link">https://creativecommons.org/licenses/by-sa/4.0/deed.es</text:span></text:a></text:p></text:note-body></text:note> de Creative Commons). </text:p>
        </text:list-item>
        <text:list-item>
          <text:p text:style-name="P57">Es necesario que el material tenga en cuenta las buenas prácticas que aseguren los derechos sobre los materiales que se publican en abierto.</text:p>
        </text:list-item>
        <text:list-item>
          <text:p text:style-name="P57">En el caso de materiales bibliográficos (apuntes, <text:span text:style-name="T14">presentaciones o </text:span>transparencias, colecciones de problemas, colecciones de exámenes), deben estar depositados en el Archivo Abierto Institucional de la URJC (BURJC Digital<text:note text:id="ftn4" text:note-class="footnote"><text:note-citation>4</text:note-citation><text:note-body><text:p text:style-name="Footnote">Archivo Abierto Institucional de la URJC: <text:a xlink:type="simple" xlink:href="https://burjcdigital.urjc.es/" text:style-name="Internet_20_link" text:visited-style-name="Visited_20_Internet_20_Link"><text:span text:style-name="Internet_20_link">https://burjcdigital.urjc.es</text:span></text:a></text:p></text:note-body></text:note>)<text:change-start text:change-id="ct94802956970064"/>, <text:span text:style-name="T22">como un solo documento</text:span><text:span text:style-name="T22"><office:annotation loext:resolved="false"><dc:creator>Jesus Gonzalez-Barahona</dc:creator><dc:date>2022-05-24T09:51:59.160863935</dc:date><text:p text:style-name="P80"><text:span text:style-name="T61">Añadido para clarificar cómo se han de depositar los documentos.</text:span></text:p></office:annotation></text:span><text:change-end text:change-id="ct94802956970064"/> <text:change-start text:change-id="ct94802956702448"/><text:span text:style-name="T53">por categor</text:span><text:span text:style-name="T47">ía, </text:span><text:change-end text:change-id="ct94802956702448"/>en formato PDF y en el formato fuente que se haya utilizado para su realización (como archivo anexo al documento). Para su realización, opcionalmente, se pueden utilizar las Plantillas Para Materiales de Publicación Abierta de la URJC<text:note text:id="ftn5" text:note-class="footnote"><text:note-citation>5</text:note-citation><text:note-body><text:p text:style-name="Footnote">Plantillas para Acceso Abierto de la URJC:</text:p><text:p text:style-name="Footnote"><text:tab/><text:tab/><text:a xlink:type="simple" xlink:href="https://ofilibre.urjc.es/guias/plantillas-asignaturas-abierto/" text:style-name="Internet_20_link" text:visited-style-name="Visited_20_Internet_20_Link">https://ofilibre.</text:a><text:a xlink:type="simple" xlink:href="https://ofilibre.urjc.es/guias/plantillas-asignaturas-abierto/" text:style-name="Internet_20_link" text:visited-style-name="Visited_20_Internet_20_Link"><text:span text:style-name="T15">urjc.es</text:span></text:a><text:a xlink:type="simple" xlink:href="https://ofilibre.urjc.es/guias/plantillas-asignaturas-abierto/" text:style-name="Internet_20_link" text:visited-style-name="Visited_20_Internet_20_Link">/guias/</text:a><text:a xlink:type="simple" xlink:href="https://ofilibre.urjc.es/guias/plantillas-asignaturas-abierto/" text:style-name="Internet_20_link" text:visited-style-name="Visited_20_Internet_20_Link"><text:span text:style-name="T13">plantillas-asignaturas-abierto/</text:span></text:a></text:p></text:note-body></text:note>. En cualquier caso, se recomienda utilizar formatos fuente editables con herramientas libres (LibreOffice o LaTeX, por ejemplo) o ampliamente extendidas (MS Office y similares). </text:p>
        </text:list-item>
        <text:list-item>
          <text:p text:style-name="P57">En el caso de videos, deben estar todos depositados en la misma serie correspondiente a la asignatura en TV URJC<text:note text:id="ftn6" text:note-class="footnote"><text:note-citation>6</text:note-citation><text:note-body><text:p text:style-name="Footnote"><text:span text:style-name="T7">TV URJC: </text:span><text:a xlink:type="simple" xlink:href="https://tv.urjc.es/" text:style-name="Internet_20_link" text:visited-style-name="Visited_20_Internet_20_Link"><text:span text:style-name="Internet_20_link"><text:span text:style-name="T7">https://tv.urjc.es/</text:span></text:span></text:a></text:p></text:note-body></text:note> y publicados en la asignatura correspondiente <text:span text:style-name="T12">según las instrucciones detalladas en el procedimiento de subida de materiales a TV URJC</text:span><text:span text:style-name="T12"><text:note text:id="ftn7" text:note-class="footnote"><text:note-citation>7</text:note-citation><text:note-body><text:p text:style-name="P1">Procedimiento de publicación de materiales en TV URJC:</text:p><text:p text:style-name="P1"><text:tab/><text:tab/><text:a xlink:type="simple" xlink:href="https://infotic.urjc.es/pages/viewpage.action?pageId=154370093" text:style-name="Internet_20_link" text:visited-style-name="Visited_20_Internet_20_Link">https://infotic.urjc.es/pages/viewpage.action?pageId=154370093</text:a></text:p></text:note-body></text:note></text:span>.</text:p>
        </text:list-item>
        <text:list-item>
          <text:p text:style-name="P57">Han de incluir claramente en el encabezado<text:change text:change-id="ct94802956996720"/><text:change-start text:change-id="ct94802956996480"/>, <text:change-end text:change-id="ct94802956996480"/>primera página<text:change-start text:change-id="ct94802956318560"/> <text:span text:style-name="T53">o equivalente</text:span><text:change-end text:change-id="ct94802956318560"/> los siguientes datos: Autores, título, y fecha. También incluirá una referencia a la URJC, a la asignatura o asignaturas en las que se utiliza el material y al lugar de depósito (TV URJC o BURJC digital, incluyendo su enlace) y de forma clara la licencia de distribución en acceso abierto.</text:p>
        </text:list-item>
      </text:list>
      <text:p text:style-name="P78"><text:soft-page-break/><text:span text:style-name="T12">Puede encontrarse información detallada sobre las condiciones y procedimientos relacionados con esta convocatoria, y con ayuda sobre cómo cumplirlos en la Guía sobre reconocimiento de publicación de asignaturas en acceso abierto</text:span><text:span text:style-name="T12"><text:note text:id="ftn8" text:note-class="footnote"><text:note-citation>8</text:note-citation><text:note-body><text:p text:style-name="Footnote">Guía sobre reconocimiento de publicación de asignaturas en acceso abierto:</text:p><text:p text:style-name="Footnote"><text:tab/><text:tab/><text:a xlink:type="simple" xlink:href="https://ofilibre.urjc.es/guias/convocatoria-asignaturas-abierto/" text:style-name="Internet_20_link" text:visited-style-name="Visited_20_Internet_20_Link"><text:span text:style-name="T15">https://ofilibre.urjc.es/guias/convocatoria-asignaturas-abierto/</text:span></text:a></text:p></text:note-body></text:note></text:span><text:span text:style-name="T12">.</text:span><text:change text:change-id="ct94803132650928"/><text:change text:change-id="ct94803131558784"/></text:p>
      <text:list xml:id="list202619698455854" text:continue-list="list202620991531028" text:style-name="WWNum2">
        <text:list-item>
          <text:h text:style-name="P42" text:outline-level="1">3. Incentivos y efectos </text:h>
        </text:list-item>
      </text:list>
      <text:p text:style-name="Text_20_body"><text:change text:change-id="ct94803132616848"/>Como resultado de la evaluación de las asignaturas presentadas a esta convocatoria, éstas serán clasificadas en “asignaturas sin materiales significativos en acceso abierto”, “asignaturas en acceso abierto” y “asignaturas destacadamente en acceso abierto”, según la baremación total que obtengan al aplicar la rúbrica descrita en esta convocatoria.<text:change-start text:change-id="ct94802957050112"/><office:annotation loext:resolved="false"><dc:creator>Jesus Gonzalez-Barahona</dc:creator><dc:date>2022-06-08T10:48:57.109168066</dc:date><text:p text:style-name="P80"><text:span text:style-name="T61">Se indica ahora cómo se clasifica cada asignatura en las tres categorías que tenemos, según consejo de la asesoría jurídica.</text:span></text:p></office:annotation><text:change-end text:change-id="ct94802957050112"/></text:p>
      <text:p text:style-name="Text_20_body"><text:change-start text:change-id="ct94802957049872"/>Se<text:change-end text:change-id="ct94802957049872"/><text:change text:change-id="ct94802957049632"/><text:change-start text:change-id="ct94802957049392"/> clasificarán como<text:change-end text:change-id="ct94802957049392"/> asignaturas <text:change text:change-id="ct94802957049152"/>“sin materiales significativos en acceso abierto” <text:change-start text:change-id="ct94802957048912"/>a<text:change-end text:change-id="ct94802957048912"/><text:change-start text:change-id="ct94802957048672"/>quellas que reciban una baremación total menor que 6. Estas asigna<text:change-end text:change-id="ct94802957048672"/><text:change-start text:change-id="ct94802957063120"/>turas <text:change-end text:change-id="ct94802957063120"/>recibirán indicaciones sobre cómo mejorar la publicación en acceso abierto de sus materiales.</text:p>
      <text:p text:style-name="Text_20_body"><text:change-start text:change-id="ct94802957063504"/>Se clasificarán como <text:change-end text:change-id="ct94802957063504"/><text:change text:change-id="ct94802957064896"/>asignaturas<text:change text:change-id="ct94802957065136"/> “en acceso abierto” <text:change-start text:change-id="ct94802957065376"/>aquellas que <text:change-end text:change-id="ct94802957065376"/><text:change-start text:change-id="ct94802957069552"/>reciban una baremación total mayor o igual a 6.</text:p>
      <text:p text:style-name="Text_20_body">Se clasificarán como asignaturas “destacadamente en acceso abierto” el 10% de asignaturas con baremación más alta, calculado sobre el total de asignaturas clasificadas como “en acceso abierto”, siempre que su baremación sea igual o superior a 20. <text:s/><text:change-end text:change-id="ct94802957069552"/><text:change-start text:change-id="ct94802957071056"/></text:p>
      <text:p text:style-name="Text_20_body">Las<text:change-end text:change-id="ct94802957071056"/><text:change-start text:change-id="ct94802957071296"/> asignaturas clasificadas como “en acceso abierto” <text:change-end text:change-id="ct94802957071296"/>y “destacadamente en acceso abierto” se abrirán en el Aula Virtual de la Universidad, de forma que cualquier visitante (incluso sin autenticarse como alumno de la Universidad) pueda acceder a la parte pública de ellas (en ningún caso se dará acceso abierto a los foros, datos de ejercicios, calificaciones, y otra información que pudiera tener datos que afecten a la privacidad de los estudiantes). Los docentes autores de materiales en acceso abierto de esas asignaturas, y que participen en su impartición, recibirán un certificado indicando su participación en asignaturas en abierto donde se indique la clasificación de estas. Adicionalmente el listado de estas asignaturas podrá ser tenidos en cuenta en otras convocatorias de la Universidad (como, por ejemplo, DOCENTIA). Nótese que los materiales puestos en abierto en dichas asignaturas serán preservados a largo plazo en las plataformas de acceso abierto de la Universidad</text:p>
      <text:p text:style-name="Text_20_body">Además, la apertura de las asignaturas en Aula Virtual podrá dar derecho a los docentes autores de sus materiales en acceso abierto, y que participen en su impartición, a un incentivo económico. Este incentivo se calculará, para cada docente con derecho generado en una asignatura, multiplicando el número de créditos que<text:change text:change-id="ct94802956328336"/> corresponden<text:change-start text:change-id="ct94802956984320"/> a dicho docente en esa asignatura por la cantidad económica por crédito, <text:change-end text:change-id="ct94802956984320"/><text:change-start text:change-id="ct94802956968352"/>hasta un total máximo por docente de 1.500 euros.<text:change-end text:change-id="ct94802956968352"/><text:change-start text:change-id="ct94802957037728"/> El número de créditos que corresponden a cada docente en una asignatura se obtendrá como resultado de dividir <text:change-end text:change-id="ct94802957037728"/><text:change-start text:change-id="ct94802956630032"/>a partes iguales entre los beneficiarios de la as<text:change-end text:change-id="ct94802956630032"/><text:change-start text:change-id="ct94802957033088"/>ignatura el número de créditos ECTS que corresponden a la misma. Se entiende por “beneficiario de la asignatura” quien <text:change-end text:change-id="ct94802957033088"/><text:change-start text:change-id="ct94802957062464"/>participe en su impartición (según el Plan de Ordenación Docente correspondiente) y sea autor de alguno de los materiales que cu<text:change-end text:change-id="ct94802957062464"/><text:change-start text:change-id="ct94802957058976"/>mplan las condiciones especificadas anteriormente.<text:change-end text:change-id="ct94802957058976"/><text:change-start text:change-id="ct94802957111840"/><office:annotation loext:resolved="false"><dc:creator>Jesus Gonzalez-Barahona</dc:creator><dc:date>2022-05-24T10:02:01.303117361</dc:date><text:p text:style-name="P80"><text:span text:style-name="T61">Nueva redacción, siguiendo las indicaciones (gracias por al redacción propuesta, es más clara que la que proponíamos).</text:span></text:p><text:p text:style-name="P80"><text:span text:style-name="T61"/></text:p><text:p text:style-name="P80"><text:span text:style-name="T61">XXX: Propuesta alternativa a considerar: sólo son beneficiarios los que impartan la asignatura y sean autores de al menos uno de los materiales que ha conseguido baremación X (dado que tenemos un nivel de baremación para los materiales que cumplen los mínimos especificados anteriormente).</text:span></text:p></office:annotation><text:change-end text:change-id="ct94802957111840"/><text:change text:change-id="ct94802957108736"/> La dotación global de los fondos para el curso 2022/23 ascenderá a 80.000 euros (40.000 euros por cuatrimestre), que serán satisfechos con cargo al presupuesto 30.ED<text:change-start text:change-id="ct94802957100112"/><office:annotation loext:resolved="false"><dc:creator>Jesus Gonzalez-Barahona</dc:creator><dc:date>2022-05-24T10:06:38.099418382</dc:date><text:p text:style-name="P80"><text:span text:style-name="T61">XXX: Es necesario especificar la partida presupuestaria completa y el ejercicio económico al que se aplicará</text:span></text:p></office:annotation><text:change-end text:change-id="ct94802957100112"/> de la partida Unidigital del área de Tecnologías de la Información. Para decidir qué asignaturas serán las que den derecho a este incentivo económico, se comenzará por las que tengan una baremación más alta, computando el número de ECTS que generen derecho a incentivo económico (según el cálculo anterior) hasta llegar a un total de 400 ECTS por cuatrimestre<text:change-start text:change-id="ct94802957099840"/> y agotar crédito presupuestario. El procedimiento de ejecución del crédito asignado a la presente convocatoria se ajustará a la misma y a lo dispuesto en las Normas de Ejecución del Presupuesto de la Universidad Rey Juan Carlos para <text:soft-page-break/>el año 2022. <text:change-end text:change-id="ct94802957099840"/><text:change text:change-id="ct94802957073120"/><text:change-start text:change-id="ct94802957084912"/>La cuantía económica correspo<text:change-end text:change-id="ct94802957084912"/><text:change-start text:change-id="ct94802957132528"/>ndiente a este incentivo no será consolidable, y se recibirá en un único pago abonado en nómina, en concepto de “cuantía económica ligada a publicación de asignaturas en abierto”<office:annotation loext:resolved="false"><dc:creator>Jesus Gonzalez-Barahona</dc:creator><dc:date>2022-05-24T10:10:16.579081766</dc:date><text:p text:style-name="P80"><text:span text:style-name="T61">Añadido este detalle según se sugiere.</text:span></text:p><text:p text:style-name="P80"><text:span text:style-name="T61"/></text:p><text:p text:style-name="P80"><text:span text:style-name="T61">XXX: Comprobar que esto es lo apropiado.</text:span></text:p></office:annotation>.<text:change-end text:change-id="ct94802957132528"/></text:p>
      <text:p text:style-name="Text_20_body">Por último, las asignaturas que sean clasificadas como “destacadamente en acceso abierto” darán derecho a los docentes autores de materiales en acceso abierto de esas asignaturas, y que participen en su impartición, a impartirlas durante los tres cursos académicos siguientes, siempre que<text:change text:change-id="ct94802957130368"/><text:change-start text:change-id="ct94802957108976"/> la normativa aplicable <text:span text:style-name="T23">y</text:span> las circunstancias concurrente<text:change-end text:change-id="ct94802957108976"/><text:change-start text:change-id="ct94802956684912"/><text:span text:style-name="T23">s lo permitan, y que</text:span><text:span text:style-name="T23"><office:annotation loext:resolved="false"><dc:creator>Jesus Gonzalez-Barahona</dc:creator><dc:date>2022-05-24T10:14:59.162582172</dc:date><text:p text:style-name="P80"><text:span text:style-name="T61">Añadido según se sugiere.</text:span></text:p><text:p text:style-name="P80"><text:span text:style-name="T61"/></text:p><text:p text:style-name="P80"><text:span text:style-name="T61">XXX: ¿Causa esta redacción algún problema, por dejar demasiada opción para evitar asignar docencia como se pretende? ¿Se os ocurre otra redacción? (ver las razones expuestas en el comentario recibido de Asesoría Jurídica).</text:span></text:p></office:annotation></text:span> <text:change-end text:change-id="ct94802956684912"/>cada curso académico actualice<text:change-start text:change-id="ct94802956362256"/><text:span text:style-name="T23">n</text:span><text:change-end text:change-id="ct94802956362256"/> convenientemente sus materiales y <text:change-start text:change-id="ct94802957133088"/>és<text:span text:style-name="T23">tos </text:span><text:change-end text:change-id="ct94802957133088"/>se mantengan en acceso abierto. De entre estas asignaturas se elegirán también, con criterios de excelencia, variedad de campos de conocimiento, grados, tipos de asignatura, y de tipos de documentos docentes, un grupo de documentos docentes que pasarán a formar parte del Catálogo de Buenas Prácticas en Materiales Docentes en Acceso Abierto de la Universidad. Los autores de estos materiales recibirán un certificado especial, que se podrá tener en cuenta en otras convocatorias de la Universidad. <text:change text:change-id="ct94803075644720"/></text:p>
      <text:list xml:id="list202620925467904" text:continue-numbering="true" text:style-name="WWNum2">
        <text:list-item>
          <text:h text:style-name="P42" text:outline-level="1">4. Evaluación de las propuestas</text:h>
        </text:list-item>
      </text:list>
      <text:p text:style-name="P35">La evaluación de las propuestas presentadas se llevará a cabo <text:change-start text:change-id="ct94802957154656"/><text:span text:style-name="T26">de forma colegiada </text:span><text:change-end text:change-id="ct94802957154656"/>por <text:change-start text:change-id="ct94802957154416"/><text:span text:style-name="T24">los </text:span><text:change-end text:change-id="ct94802957154416"/><text:change-start text:change-id="ct94802957154176"/><text:span text:style-name="T25">Coordinadores </text:span><text:span text:style-name="T27">o Coordinadoras </text:span><text:span text:style-name="T25">de </text:span><text:change-end text:change-id="ct94802957154176"/>la Oficina de Conocimiento y Cultura Libres<text:change text:change-id="ct94802957153936"/><text:change-start text:change-id="ct94802957153696"/>, <text:span text:style-name="T25">de Software Libre y de Cultura Libre de la Universidad, asistidos por personal</text:span><text:change-end text:change-id="ct94802957153696"/><text:change-start text:change-id="ct94802957153456"/><text:span text:style-name="T25"> adscrito al Vicerrectorado de Extensión Universitaria y al Centro de Innovac</text:span><text:change-end text:change-id="ct94802957153456"/><text:change-start text:change-id="ct94802957153216"/><text:span text:style-name="T25">ión </text:span><text:span text:style-name="T26">Docente y Educación Digital de la Universidad,</text:span><text:change-end text:change-id="ct94802957153216"/><text:change-start text:change-id="ct94802957131856"/><text:span text:style-name="T26"><office:annotation loext:resolved="false"><dc:creator>Jesus Gonzalez-Barahona</dc:creator><dc:date>2022-05-24T12:52:16.361718474</dc:date><text:p text:style-name="P80"><text:span text:style-name="T61">Añadido para especificar quién realizará la evaluación.</text:span></text:p><text:p text:style-name="P80"><text:span text:style-name="T61"/></text:p><text:p text:style-name="P80"><text:span text:style-name="T61">XXX: ¿Os parece conveniente que citemos específicamente al Coordinador Académico del CIED como evaluador colegiado, como hacemos con los de la OfiLibre?</text:span></text:p></office:annotation></text:span><text:change-end text:change-id="ct94802957131856"/> atendiendo a los criterios establecidos en la rúbrica del Anexo III<text:change-start text:change-id="ct94802957189680"/>.<text:change-end text:change-id="ct94802957189680"/><text:change text:change-id="ct94802957177264"/><text:change-start text:change-id="ct94802957126608"/> <text:span text:style-name="T29">El funcionamiento colegiado será excepto en lo que les pueda afecta personalmente, en cuyo caso se inhibirán y la evaluación se realizará por los evaluadores no afectados.</text:span><text:span text:style-name="T29"><office:annotation loext:resolved="false"><dc:creator>Jesus Gonzalez-Barahona</dc:creator><dc:date>2022-05-24T13:19:10.598694762</dc:date><text:p text:style-name="P80"><text:span text:style-name="T61">Añadida regla de inhibición, para dejar más claro el funcionamiento colegiado.</text:span></text:p></office:annotation></text:span></text:p>
      <text:p text:style-name="P35"><text:change-end text:change-id="ct94802957126608"/><text:change text:change-id="ct94802957176912"/><text:change-start text:change-id="ct94802957131616"/><text:span text:style-name="T29">Los </text:span><text:change-end text:change-id="ct94802957131616"/>resultados <text:change-start text:change-id="ct94802957072160"/><text:span text:style-name="T29">de esta evaluación </text:span><text:change-end text:change-id="ct94802957072160"/>serán utilizados por la Comisión de Asignaturas en Abierto para decidir su clasificación<text:change-start text:change-id="ct94802956355840"/> <text:span text:style-name="T26">en las tres categorías mencionadas anteriormente</text:span><text:span text:style-name="T26"><office:annotation loext:resolved="false"><dc:creator>Jesus Gonzalez-Barahona</dc:creator><dc:date>2022-05-24T12:55:25.153772003</dc:date><text:p text:style-name="P80"><text:span text:style-name="T61">Añadido para aclarar qué clasificación se refiere.</text:span></text:p></office:annotation></text:span><text:change-end text:change-id="ct94802956355840"/> y su financiación si procede. Esta Comisión está integrada por:</text:p>
      <text:list xml:id="list202620832461628" text:continue-list="list703569102" text:style-name="WWNum8">
        <text:list-item>
          <text:p text:style-name="P55"><text:change-start text:change-id="ct94802957184896"/><text:span text:style-name="T12">El</text:span> Vicerrector <text:span text:style-name="T12">o la Vicerrectora</text:span>, o persona en quien delegue, con competencias en materia de Publicación <text:span text:style-name="T27">en Acceso Abierto, que </text:span><text:span text:style-name="T28">la presidirá</text:span>.<office:annotation loext:resolved="false"><dc:creator>Jesus Gonzalez-Barahona</dc:creator><dc:date>2022-05-24T13:12:20.382004665</dc:date><text:p text:style-name="P80"><text:span text:style-name="T61">Se clarifica “publicación en acceso abierto” como competencia,y se especifica que actuará como presidente.</text:span></text:p></office:annotation></text:p>
        </text:list-item>
        <text:list-item>
          <text:p text:style-name="P55"><text:change-end text:change-id="ct94802957184896"/>El Vicerrector <text:span text:style-name="T12">o la Vicerrectora</text:span>, o persona en quien delegue, con competencias en materia de Ordenación <text:change-start text:change-id="ct94802957184656"/><text:span text:style-name="T27">A</text:span><text:change-end text:change-id="ct94802957184656"/><text:change text:change-id="ct94802957184176"/>cadémica.</text:p>
        </text:list-item>
        <text:list-item>
          <text:p text:style-name="P54">El Vicerrector <text:span text:style-name="T12">o la Vicerrectora</text:span>, o persona en quien delegue, con competencias en materia de Transformación Digital.<text:change text:change-id="ct94802957197728"/></text:p>
        </text:list-item>
        <text:list-item>
          <text:p text:style-name="P53">El Director Académico <text:span text:style-name="T12">o la Directora Académica </text:span>del Centro de Innovación Docente y Educación Digital (CIED), o persona en quien delegue.</text:p>
        </text:list-item>
        <text:list-item>
          <text:p text:style-name="P53">El Coordinador Académico <text:span text:style-name="T12">o la Coordinadora Académic</text:span><text:change-start text:change-id="ct94802957186176"/><text:span text:style-name="T27">a</text:span><text:change-end text:change-id="ct94802957186176"/><text:change text:change-id="ct94802957197488"/><text:span text:style-name="T12"> </text:span>de <text:span text:style-name="T12">la Oficina de Conocimiento y Cultura Libres</text:span>, o persona en quien delegue, que actuará como secretario.</text:p>
        </text:list-item>
      </text:list>
      <text:p text:style-name="Text_20_body">La Comisión de Asignaturas en Abierto tendrá la facultad de interpretar y aclarar las bases de la convocatoria. Para la resolución de dudas acerca de la convocatoria se puede contactar a través del correo electrónico <text:change-start text:change-id="ct94802957113200"/><text:a xlink:type="simple" xlink:href="mailto:ofilibre@urjc.es" text:style-name="Internet_20_link" text:visited-style-name="Visited_20_Internet_20_Link">ofilibre@urjc.es</text:a><text:change-end text:change-id="ct94802957113200"/>.<text:change-start text:change-id="ct94802957071872"/> En lo no dispuesto en la presente convocatoria en relación al funcionamiento y actuación del órgano que atribuirá puntuación a las solicitudes instadas y de la Comisión de Asignaturas en Abierto, se estará a la Ley 39/2015, de 1 de octubre, de Procedimiento Administrativo Común de las Administraciones Públicas y a la Ley 40/2015, de 1 de octubre, de Régimen Jurídico del Sector Público.<office:annotation loext:resolved="false"><dc:creator>Jesus Gonzalez-Barahona</dc:creator><dc:date>2022-05-24T13:14:20.103307533</dc:date><text:p text:style-name="P80"><text:span text:style-name="T61">Añadido para especificar el régimen de funcionamiento. En el comentario que menciona que habría que indicar suplentes, se dice en todos los casos “persona en quien delegue”, especificando delegación explícita como forma de suplencia.</text:span></text:p></office:annotation><text:change-end text:change-id="ct94802957071872"/><text:change text:change-id="ct94803028390432"/></text:p>
      <text:list xml:id="list202619649246453" text:continue-list="list202620925467904" text:style-name="WWNum2">
        <text:list-item>
          <text:h text:style-name="P42" text:outline-level="1">5. Formalización y presentación de solicitudes<text:change-start text:change-id="ct94803200852944"/></text:h>
        </text:list-item>
      </text:list>
      <text:p text:style-name="P79">El proceso de formalizaci<text:span text:style-name="T59">ón y presentaci</text:span><text:change-end text:change-id="ct94803200852944"/><text:change-start text:change-id="ct94803004971712"/><text:span text:style-name="T59">ón de solicitudes, la evaluación y publicación de resultados, y los procedimientos de reclamación</text:span><text:change-end text:change-id="ct94803004971712"/><text:change-start text:change-id="ct94803205291728"/><text:span text:style-name="T59">, quedan definidos como sigue.</text:span><text:change-end text:change-id="ct94803205291728"/></text:p>
      <text:p text:style-name="P5"><text:soft-page-break/><text:span text:style-name="T10">5.1. </text:span><text:span text:style-name="T9">Consideraciones previas y presentación de solicitudes</text:span></text:p>
      <text:p text:style-name="P5">Previamente al envío de la solicitud, deben asegurarse que las asignaturas presentadas constan de todos los materiales necesarios para su impartición (independientemente del semestre en el que se den), y que los materiales se encuentran publicados en abierto, con su correspondiente licencia, enlazados a la versión depositada en el Archivo Abierto de la URJC (BURJC Digital) o en TV URJC, según el tipo de material. <text:change text:change-id="ct94802957215136"/><text:change text:change-id="ct94802957214896"/><text:change text:change-id="ct94802957214656"/></text:p>
      <text:p text:style-name="P65">La solicitud de cada asignatura deberá ser realizada por el docente que figure como responsable de grupo de actas correspondiente para el curso 2022/2023. Para ello rellenará por cada asignatura a solicitar <text:change-start text:change-id="ct94802957214416"/><text:span text:style-name="T30">un</text:span><text:change-end text:change-id="ct94802957214416"/><text:change text:change-id="ct94802957214176"/> formulario <text:change-start text:change-id="ct94802957213936"/><text:span text:style-name="T30">que incluirá al menos l</text:span><text:change-end text:change-id="ct94802957213936"/><text:change-start text:change-id="ct94802957213696"/><text:span text:style-name="T30">os datos </text:span><text:change-end text:change-id="ct94802957213696"/>descrito<text:change-start text:change-id="ct94802957081104"/><text:span text:style-name="T30">s</text:span><text:change-end text:change-id="ct94802957081104"/> en el Anexo I de esta convocatoria. <text:change-start text:change-id="ct94802957112864"/><text:span text:style-name="T31">El procedimiento de entrega, incluido el enlace a </text:span><text:span text:style-name="T33">dicho</text:span><text:span text:style-name="T31"> formulario est</text:span><text:change-end text:change-id="ct94802957112864"/><text:change-start text:change-id="ct94802957159600"/><text:span text:style-name="T31">arán disponibles en la </text:span><text:span text:style-name="T32">Guía sobre reconocimiento de publicación de asignaturas en acceso abierto</text:span><text:span text:style-name="T32"><text:note text:id="ftn9" text:note-class="footnote"><text:note-citation>9</text:note-citation><text:note-body><text:p text:style-name="P32">Guía sobre reconocimiento de publicación de asignaturas en acceso abierto:</text:p><text:p text:style-name="P32"><text:tab/><text:tab/><text:a xlink:type="simple" xlink:href="https://ofilibre.urjc.es/guias/convocatoria-asignaturas-abierto/" text:style-name="Internet_20_link" text:visited-style-name="Visited_20_Internet_20_Link"><text:span text:style-name="T15">https://ofilibre.urjc.es/guias/convocatoria-asignaturas-abierto/</text:span></text:a></text:p></text:note-body></text:note></text:span><text:span text:style-name="T31">.</text:span><text:change-end text:change-id="ct94802957159600"/><text:change-start text:change-id="ct94802957160432"/><text:span text:style-name="T31"> </text:span><text:span text:style-name="T32">En esta guía </text:span><text:change-end text:change-id="ct94802957160432"/><text:change-start text:change-id="ct94802957184416"/><text:span text:style-name="T32">se mantendrá también un listado de preguntas frecuentes (y sus respuestas) y otra documentación de apoyo para ayudar en la publicación de los materiales en acceso abierto, y en general, en la presenta</text:span><text:change-end text:change-id="ct94802957184416"/><text:change-start text:change-id="ct94802957176432"/><text:span text:style-name="T32">ción en esta convocatoria.</text:span><text:change-end text:change-id="ct94802957176432"/><text:change-start text:change-id="ct94802957224832"/><text:span text:style-name="T32"><office:annotation loext:resolved="false"><dc:creator>Jesus Gonzalez-Barahona</dc:creator><dc:date>2022-05-24T13:43:05.900605798</dc:date><text:p text:style-name="P80"><text:span text:style-name="T61">Especificación del mecanismo de entrega de la solicitud (formulario enlazado desde la Guía de la convocatoria)</text:span></text:p></office:annotation></text:span><text:change-end text:change-id="ct94802957224832"/></text:p>
      <text:p text:style-name="P3">En la solicitud deberá indicar todos aquellos docentes que figuren como autores de los materiales publicados en abierto en la asignatura, indicando aquellos que pertenecen a la URJC y los que no, en el caso que los hubiera. Al enviar el formulario, el responsable de asignatura asegurará<text:change-start text:change-id="ct94802957229088"/>, <text:span text:style-name="T33">mediante declaración responsable</text:span><text:span text:style-name="T33"><office:annotation loext:resolved="false"><dc:creator>Jesus Gonzalez-Barahona</dc:creator><dc:date>2022-05-24T13:41:21.418387331</dc:date><text:p text:style-name="P80"><text:span text:style-name="T61">Añadido según comentario. El texto de la declaración responsable puede ir en el propio formulario. Se indica expresamente en el anexo correspondiente. Se estima que sólo hace falta la declaración responsable indicando el permiso de todos los docentes de la asignatura para presentarla, y de los que declaran su autoría con respecto a que tienen los derechos correspondientes para publicar en abierto, pues los derechos específicos de cada material habrán sido comprobados (y en su caso acreditados) cuando se hayan depositado en el correspondiente archivo abierto.</text:span></text:p></office:annotation></text:span><text:change-end text:change-id="ct94802957229088"/> que la información que incluye en él es cierta, y que efectivamente los autores indicados tienen los derechos correspondientes para la publicación de los materiales en abierto de la asignatura que indica.<text:change-start text:change-id="ct94803046112608"/> Asimismo, deberá asegurar de que ha informado a dichos docentes de la política de tratamiento de datos personales de la presente convocatoria.<text:change-end text:change-id="ct94803046112608"/><text:change-start text:change-id="ct94803077052000"/><office:annotation loext:resolved="false"><dc:creator>Jesus Gonzalez-Barahona</dc:creator><dc:date>2022-06-08T20:17:00.935316353</dc:date><text:p text:style-name="P81"><text:span text:style-name="T62">Añadido por sugerencia de la Delegada de Protección de Datos</text:span></text:p></office:annotation><text:change-end text:change-id="ct94803077052000"/></text:p>
      <text:p text:style-name="P3"><text:change-start text:change-id="ct94802957227600"/><text:span text:style-name="T33">Las solicitudes se harán efectivas, para una cierta asignatura, rellenando y enviando el mencionado <text:s/>formulario para esa asignatura, y habiendo depositado previamente los materiales correspondientes en BURJC digital o TV URJC, según corresponda, como se ha indicado anteriormente. </text:span><text:change-end text:change-id="ct94802957227600"/>El plazo límite para rellenar y enviar el formulario<text:change-start text:change-id="ct94802957162400"/>, <text:span text:style-name="T33">y hacer así efectiva la solicitud para una asignatura</text:span><text:span text:style-name="T33"><office:annotation loext:resolved="false"><dc:creator>Jesus Gonzalez-Barahona</dc:creator><dc:date>2022-05-24T13:47:12.973511389</dc:date><text:p text:style-name="P80"><text:span text:style-name="T61">Se especifica cómo se hace efectiva la solicitud.</text:span></text:p></office:annotation></text:span><text:span text:style-name="T33">,</text:span><text:change-end text:change-id="ct94802957162400"/> es el día 30 de septiembre de 2022 a las 23:59 para asignaturas que se impartan durante el primer cuatrimestre, y el 20 de enero de 2023 <text:change-start text:change-id="ct94802957109216"/><text:span text:style-name="T33">a la misma h</text:span><text:change-end text:change-id="ct94802957109216"/><text:change-start text:change-id="ct94802957237936"/><text:span text:style-name="T33">ora </text:span><text:change-end text:change-id="ct94802957237936"/>para asignaturas que se impartan durante el segundo cuatrimestre.</text:p>
      <text:p text:style-name="P5"><text:span text:style-name="T8">5.2 </text:span><text:span text:style-name="T9">Publicación de listas provisionales de solicitudes admitidas y excluidas</text:span></text:p>
      <text:p text:style-name="P5">Finalizado el plazo para la presentación de solicitudes, el Vicerrectorado de Extensión Universitaria<text:change-start text:change-id="ct94802957226720"/>,<text:change-end text:change-id="ct94802957226720"/> <text:change-start text:change-id="ct94802957226960"/><text:span text:style-name="T33">u órgano que asuma sus competencias, </text:span><text:change-end text:change-id="ct94802957226960"/>examinará las solicitudes, y hará público en el tablón de anuncios electrónico de la URJC <text:change-start text:change-id="ct94803063120048"/>la resolución <office:annotation office:name="__Annotation__3937_2516973421" loext:resolved="false"><dc:creator>Jesus Gonzalez-Barahona</dc:creator><dc:date>2022-06-08T20:18:28.027764911</dc:date><text:p text:style-name="P81"><text:span text:style-name="T62">Modificado por sugerencia de la Delegada de Protección de datos.</text:span></text:p></office:annotation>por la que se proceda a la publicación de <text:change-end text:change-id="ct94803063120048"/><text:change text:change-id="ct94802950020032"/>las solicitudes<text:change-start text:change-id="ct94803146611616"/><office:annotation-end office:name="__Annotation__3937_2516973421"/><text:change-end text:change-id="ct94803146611616"/> admitidas a trámite y las excluidas provisionalmente, junto con las causas de exclusión, concediendo un plazo de 10 días hábiles para la subsanación.</text:p>
      <text:p text:style-name="P5"><text:span text:style-name="T8">5.3 </text:span><text:span text:style-name="T9">Subsanación de errores y publicación de listas definitivas</text:span></text:p>
      <text:p text:style-name="P6">Tras la revisión de la documentación aportada dentro del plazo de subsanación señalado en el punto anterior, se publicará, mediante Resolución de la Vicerrectora de Extensión <text:span text:style-name="T12">Universitaria</text:span>, <text:change-start text:change-id="ct94802957218880"/><text:span text:style-name="T33">u órgano que asuma sus competencias, </text:span><text:change-end text:change-id="ct94802957218880"/>el listado definitivo con las solicitudes admitidas y excluidas, por los mismos medios antes indicados.</text:p>
      <text:p text:style-name="P5"><text:span text:style-name="T8">5.4 </text:span><text:span text:style-name="T9">Presentación de recursos a las listas definitivas</text:span></text:p>
      <text:p text:style-name="P6">La Resolución de la Vicerrectora de Extensión Universitaria, <text:change-start text:change-id="ct94802957228544"/><text:span text:style-name="T33">u órgano que asuma sus competencias, </text:span><text:change-end text:change-id="ct94802957228544"/>podrá ser recurrida en alzada ante el Rector en el plazo de un mes contado a partir del día siguiente al de la publicación de la Resolución, de acuerdo con lo preceptuado en la Ley 39/2015, de 1 de octubre, del Procedimiento Administrativo Común de las Administraciones Públicas. Contra la resolución del Rector del <text:soft-page-break/>recurso de alzada, que agota la vía administrativa, no cabe recurso ordinario alguno, salvo el recurso extraordinario de revisión, tal como establece el artículo 113 de la Ley 39/2015, de 1 de octubre, del Procedimiento Administrativo Común de las Administraciones Públicas.</text:p>
      <text:p text:style-name="P5"><text:span text:style-name="T8">5.5 </text:span><text:span text:style-name="T9">Valoración de propuestas y publicación de resolución provisional</text:span></text:p>
      <text:p text:style-name="P7"><text:change-start text:change-id="ct94802957159184"/><text:span text:style-name="T34">Las propuestas serán evaluadas, seg</text:span><text:change-end text:change-id="ct94802957159184"/><text:change-start text:change-id="ct94802957255952"/><text:span text:style-name="T34">ún se ha especificado, y los resultados de esta evaluación serán publicados para conocimiento de los solicitantes. </text:span><text:change-end text:change-id="ct94802957255952"/><text:change-start text:change-id="ct94802957256192"/><text:span text:style-name="T34">Estos resultados serán valorados por la Comisión de Asignaturas en Abierto, que decidirá sobre las asignaturas que se publicarán en abierto, y sobre la concesión de incentivos al profesorado.</text:span><text:change-end text:change-id="ct94802957256192"/><text:change text:change-id="ct94802957256432"/><text:change-start text:change-id="ct94802957256672"/> <text:span text:style-name="T34">E</text:span><text:change-end text:change-id="ct94802957256672"/>l Vicerrector de Ordenación Académica y Formación del <text:span text:style-name="T16">P</text:span>rofesorado, <text:change-start text:change-id="ct94802957257392"/><text:span text:style-name="T33">u órgano que asuma sus competencias, </text:span><text:change-end text:change-id="ct94802957257392"/>en nombre de la Comisión de Asignaturas en Abierto, emitirá la Resolución provisional de las asignaturas concedidas en abierto y la financiación correspondiente del profesorado, publicándola en el tablón de anuncios electrónico de la URJC. </text:p>
      <text:p text:style-name="P5"><text:span text:style-name="T8">5.6 </text:span><text:span text:style-name="T9">Presentación de reclamaciones a la resolución provisional y publicación de resolución definitiva</text:span></text:p>
      <text:p text:style-name="P7">Seguidamente, se abrirá un proceso de reclamación concediendo un plazo de 10 días hábiles.<text:change-start text:change-id="ct94802957260512"/> <text:span text:style-name="T35">Estas reclamaciones podrán ser tanto sobre los resultados de la evaluaci</text:span><text:change-end text:change-id="ct94802957260512"/><text:change-start text:change-id="ct94802957269664"/><text:span text:style-name="T35">ón como sobre la valoración final realizada por la Comisión de Asignaturas en Abierto.</text:span><text:span text:style-name="T35"><office:annotation loext:resolved="false"><dc:creator>Jesus Gonzalez-Barahona</dc:creator><dc:date>2022-05-24T13:58:51.736690893</dc:date><text:p text:style-name="P80"><text:span text:style-name="T61">Se especifica que se puede reclamar también la evaluación realizada.</text:span></text:p></office:annotation></text:span><text:change-end text:change-id="ct94802957269664"/> Transcurrido este plazo, la Comisión de Asignaturas en Abierto examinará todas las solicitudes presentadas, y resolverá publicando en su nombre el Vicerrector de Transformación Digital e Innovación docente<text:change-start text:change-id="ct94802957263968"/>, <text:span text:style-name="T33">u órgano que asuma sus competencias,</text:span><text:change-end text:change-id="ct94802957263968"/> la Resolución definitiva de las asignaturas en abierto y su financiación en el tablón de anuncios electrónico de la URJC. </text:p>
      <text:p text:style-name="P5"><text:span text:style-name="T8">5.7 </text:span><text:span text:style-name="T9">Presentación de reclamaciones a la resolución definitiva</text:span></text:p>
      <text:p text:style-name="P5">Contra la resolución definitiva, el solicitante podrá presentar recurso de alzada ante el Rector en los términos indicados en el punto 5.4.<text:change text:change-id="ct94803131707232"/></text:p>
      <text:list xml:id="list202618988926730" text:continue-numbering="true" text:style-name="WWNum2">
        <text:list-item>
          <text:h text:style-name="P43" text:outline-level="1">6. <text:change-start text:change-id="ct94802949614368"/><text:span text:style-name="T8">Tratamiento de datos de carácter personal</text:span><text:change-end text:change-id="ct94802949614368"/><text:change-start text:change-id="ct94803149338736"/><text:span text:style-name="T8"><office:annotation loext:resolved="false"><dc:creator>Jesus Gonzalez-Barahona</dc:creator><dc:date>2022-06-08T20:18:57.042379566</dc:date><text:p text:style-name="P81"><text:span text:style-name="T62">Texto modificado por sugerencia de la Delegada de Protección de Datos (toda la sección)</text:span></text:p></office:annotation></text:span><text:change-end text:change-id="ct94803149338736"/><text:change text:change-id="ct94803007306048"/></text:h>
        </text:list-item>
      </text:list>
      <text:p text:style-name="P8"/>
      <text:p text:style-name="P3"><text:change text:change-id="ct94802972603152"/><text:change-start text:change-id="ct94803008806672"/>Con el objetivo de dar cumplimiento a lo establecido en la normativa de protección de datos en cuanto a la información que debe facilitarse a las personas interesadas, se informa de lo siguiente en relación con la presente convocatoria:</text:p>
      <text:p text:style-name="P73"><text:span text:style-name="T56">6.1 </text:span>Responsable del tratamiento</text:p>
      <text:p text:style-name="P3">Tiene la condición de responsable del tratamiento la Universidad Rey Juan Carlos, con dirección postal en la Calle Tulipán s/n 28933 Móstoles. La responsable cuenta con una Delegada de Protección de Datos, con quien se puede contactar a través del correo electrónico protecciondedatos@urjc.es <text:s/></text:p>
      <text:p text:style-name="P73">6.2. Finalidad y legitimación del tratamiento</text:p>
      <text:p text:style-name="P3">La finalidad del tratamiento de datos personales es la gestión de la convocatoria para el <text:s/>reconocimiento de la publicación de asignaturas en acceso abierto, teniendo como bases de legitimación general las siguientes: </text:p>
      <text:p text:style-name="P3">a) Estarán legitimados por el interés público los tratamientos de datos realizados para la gestión de esta convocatoria. </text:p>
      <text:p text:style-name="P67">b) Tendrán como base de legitimación el cumplimiento de una obligación legal, los siguientes tratamientos en relación con las normas que se citan a continuación:</text:p>
      <text:list xml:id="list4127789059" text:style-name="List_20_1">
        <text:list-item>
          <text:p text:style-name="P68">Recogida de datos mediante solicitud.</text:p>
        </text:list-item>
        <text:list-item>
          <text:p text:style-name="P68">Las publicaciones realizadas con efectos de notificación de acuerdo con las normas del procedimiento administrativo común. </text:p>
        </text:list-item>
        <text:list-item>
          <text:p text:style-name="P68"><text:soft-page-break/>Las publicaciones realizadas, en su caso, en el portal de transparencia exigibles por la normativa de transparencia.</text:p>
        </text:list-item>
      </text:list>
      <text:p text:style-name="P73">6.3. Comprobación de la veracidad de los datos</text:p>
      <text:p text:style-name="P3">La Universidad Rey Juan Carlos podrá realizar las verificaciones necesarias para comprobar la exactitud de los datos consignados en la solicitud, de acuerdo con la Disposición Adicional 8ª de la Ley Orgánica 3/2018, de 5 de diciembre, de Protección de Datos de Carácter Personal y Garantía de los Derechos Digitales. </text:p>
      <text:p text:style-name="P73">6.4. Comunicación de datos</text:p>
      <text:p text:style-name="P3">Los datos personales no serán cedidos a terceros salvo en aquellos casos que exista una obligación legal.</text:p>
      <text:p text:style-name="P73">6.5. Conservación de los datos</text:p>
      <text:p text:style-name="P3">Los datos se conservarán durante el tiempo necesario para cumplir con la finalidad para la que se recabaron y para determinar las posibles responsabilidades que se pudieran derivar de dicha finalidad y del tratamiento de los datos y de conformidad con la normativa vigente. </text:p>
      <text:p text:style-name="P73">6.6. Ejercicio de derechos por los interesados</text:p>
      <text:p text:style-name="P3">Se podrán ejercer en cualquier momento los derechos de acceso, rectificación, supresión, limitación del tratamiento, portabilidad, oposición y demás reconocidos por el Reglamento General de Protección de Datos, así como por la Ley Orgánica 2/2018, de Protección de Datos de Carácter Personal y garantía de los derechos digitales, mediante solicitud dirigida a la responsable del tratamiento, la Universidad Rey Juan Carlos, C/ Tulipán s/n, 28933-Móstoles, por registro, en su sede electrónica, o contactando con la Delegada de Protección de Datos en protecciondedatos@urjc.es. </text:p>
      <text:p text:style-name="P3">Asimismo, y especialmente si considera que no ha obtenido satisfacción plena en el ejercicio de sus derechos, podrá presentar una reclamación ante la autoridad nacional de control dirigiéndose a estos efectos a la Agencia Española de Protección de Datos<text:note text:id="ftn10" text:note-class="footnote"><text:note-citation>10</text:note-citation><text:note-body><text:p text:style-name="P41"><text:change-start text:change-id="ct94803071581968"/>Agencia Española de Protección de D<text:change-end text:change-id="ct94803071581968"/><text:change-start text:change-id="ct94803072538960"/>atos: <text:a xlink:type="simple" xlink:href="https://www.aepd.es/es" text:style-name="Internet_20_link" text:visited-style-name="Visited_20_Internet_20_Link">https://www.aepd.es/es</text:a><text:change-end text:change-id="ct94803072538960"/></text:p></text:note-body></text:note>, <text:span text:style-name="T56">sita en la calle </text:span>Jorge Juan, 6, 28001 Madrid.</text:p>
      <text:p text:style-name="P73">6.7. Información por el solicitante al resto de interesados</text:p>
      <text:p text:style-name="P3">En el caso de que el/la solicitante aporte al presente procedimiento datos personales relativos a otras personas interesadas, en cumplimiento del artículo 14 del RGPD, dicho solicitante deberá comprometerse a facilitar a las mismas la información contenida en este artículo.<text:change-end text:change-id="ct94803008806672"/></text:p>
      <text:list xml:id="list202619849240128" text:continue-list="list202618988926730" text:style-name="WWNum2">
        <text:list-item>
          <text:h text:style-name="P42" text:outline-level="1">7. Recursos<text:change text:change-id="ct94803071555072"/></text:h>
        </text:list-item>
      </text:list>
      <text:p text:style-name="P3">Frente a la presente Resolución de Convocatoria, que pone fin a la vía administrativa, podrá interponerse recurso potestativo de reposición ante el Rector de la Universidad Rey Juan Carlos en el plazo de UN MES contado a partir de la publicación de dicha Resolución, de conformidad con lo dispuesto en los artículos 123 y 124 de la Ley 39/2015, de 1 de octubre, del Procedimiento Administrativo Común de las Administraciones Públicas, o alternativamente, recurso contencioso-administrativo ante los juzgados del mismo orden jurisdiccional en el plazo de DOS MESES desde su publicación.<text:change-start text:change-id="ct94802957287344"/><office:annotation loext:resolved="false"><dc:creator>Jesus Gonzalez-Barahona</dc:creator><dc:date>2022-05-24T14:01:46.201137104</dc:date><text:p text:style-name="P80"><text:span text:style-name="T61">XXX: Hay un comentario que dice: “Quién aprueba y firma la presente convocatoria? Es necesario especificarlo en el encabezamiento de la resolución e introducir un pie de firma al efecto, acreditando la competencia para ello.”</text:span></text:p><text:p text:style-name="P80"><text:span text:style-name="T61"/></text:p><text:p text:style-name="P80"><text:span text:style-name="T61">Entiendo que quien aprueba es el Consejo de Gobierno, y así lo he indicado en el encabezado. Pero no sé quién firma. ¿El rector? ¿Tenéis algún pie de firma de ese estilo, que incluya la acreditación para la firma que se pide? </text:span></text:p></office:annotation><text:change-end text:change-id="ct94802957287344"/></text:p>
      <text:p text:style-name="Standard"/>
      <text:p text:style-name="P4"/>
      <text:list xml:id="list202619936933756" text:continue-numbering="true" text:style-name="WWNum2">
        <text:list-item>
          <text:h text:style-name="Heading_20_1" text:outline-level="1">ANEXO I<text:change text:change-id="ct94803041779504"/><text:change-start text:change-id="ct94803070394016"/>: <text:change-end text:change-id="ct94803070394016"/>F<text:change-start text:change-id="ct94803042014976"/><text:span text:style-name="T57">ormulario de solicitud</text:span><text:change-end text:change-id="ct94803042014976"/><text:change text:change-id="ct94803041756512"/></text:h>
        </text:list-item>
      </text:list>
      <text:p text:style-name="Text_20_body"><text:s/>Constará de los siguientes campos:</text:p>
      <text:list xml:id="list2561645038" text:style-name="WWNum5">
        <text:list-item>
          <text:p text:style-name="P59">Nombre del <text:span text:style-name="T16">docente</text:span><text:change-start text:change-id="ct94802957330048"/></text:p>
        </text:list-item>
        <text:list-item>
          <text:p text:style-name="P61">Dirección de correo electrónico corporativa de la <text:change-end text:change-id="ct94802957330048"/><text:change-start text:change-id="ct94802957329808"/>URJC<text:change-end text:change-id="ct94802957329808"/></text:p>
        </text:list-item>
        <text:list-item>
          <text:p text:style-name="P59">Para cada asignatura que se aporte:</text:p>
          <text:list>
            <text:list-item>
              <text:p text:style-name="P59">Nombre de la asignatura</text:p>
            </text:list-item>
            <text:list-item>
              <text:p text:style-name="P59">Titulación </text:p>
            </text:list-item>
            <text:list-item>
              <text:p text:style-name="P59">Titulaciones y asignaturas que podrían utilizar de forma directa los mismos materiales </text:p>
            </text:list-item>
            <text:list-item>
              <text:p text:style-name="P59">Identificador de la asignatura en el Aula Virtual de la URJC (URL directa de la asignatura)</text:p>
            </text:list-item>
            <text:list-item>
              <text:p text:style-name="P59">Listado de <text:span text:style-name="T16">docentes</text:span> que han participado en la elaboración de los materiales (<text:change text:change-id="ct94802957329568"/><text:change-start text:change-id="ct94802957328672"/><text:span text:style-name="T36">direcciones de correo electrónico corporativo</text:span><text:change-end text:change-id="ct94802957328672"/> de la URJC)</text:p>
            </text:list-item>
            <text:list-item>
              <text:p text:style-name="P59">Listado de docentes que imparten la asignatura en el curso 2022/2023 (<text:change text:change-id="ct94802957312832"/><text:change-start text:change-id="ct94802957312544"/><text:span text:style-name="T36">direcciones de correo electrónico corporativo</text:span><text:change-end text:change-id="ct94802957312544"/> de la URJC)</text:p>
            </text:list-item>
            <text:list-item>
              <text:p text:style-name="P59">Créditos ECTS de la asignatura</text:p>
            </text:list-item>
            <text:list-item>
              <text:p text:style-name="P59">Materiales que se presentan: <text:change-start text:change-id="ct94802957289600"/>para cada categoría de material <text:change-end text:change-id="ct94802957289600"/><text:change text:change-id="ct94802957289360"/><text:change text:change-id="ct94802957287104"/><text:change text:change-id="ct94802957293072"/>contemplada<text:change text:change-id="ct94802957328432"/> en la convocatoria<text:change text:change-id="ct94802957313808"/><text:change-start text:change-id="ct94802957314320"/> <text:change-end text:change-id="ct94802957314320"/>se incluirá <text:change text:change-id="ct94802957319024"/><text:change-start text:change-id="ct94802957330688"/>el enlace al<text:change-end text:change-id="ct94802957330688"/><text:change text:change-id="ct94802957319536"/> material en acceso abierto<text:change-start text:change-id="ct94802957321664"/> en BURJC Digital o en TV URJC, según corresponda<text:change-end text:change-id="ct94802957321664"/><text:change text:change-id="ct94802957322288"/><text:change-start text:change-id="ct94802957323312"/> (en el caso de<text:change-end text:change-id="ct94802957323312"/><text:change-start text:change-id="ct94802957324752"/> <text:change-end text:change-id="ct94802957324752"/><text:change text:change-id="ct94802957325024"/><text:change-start text:change-id="ct94802957326448"/>videos, se <text:change-end text:change-id="ct94802957326448"/>incluir<text:change-start text:change-id="ct94802957314608"/>á<text:change-end text:change-id="ct94802957314608"/> la identificación de la serie (o canal) de TV URJC de la asignatura donde se han publicado<text:change-start text:change-id="ct94802957314880"/>), y una breve justificación de cumplimiento de los criterios de la rúbrica de evaluación<text:change-end text:change-id="ct94802957314880"/>.</text:p>
            </text:list-item>
            <text:list-item>
              <text:p text:style-name="P60"><text:change-start text:change-id="ct94802957343440"/><text:span text:style-name="T37">Declaración responsable </text:span><text:change-end text:change-id="ct94802957343440"/><text:change-start text:change-id="ct94802957343152"/>acreditando el consentimiento del resto de docentes <text:span text:style-name="T37">de la asignatura para que ésta sea presentada </text:span><text:change-end text:change-id="ct94802957343152"/><text:change text:change-id="ct94802957342864"/>a esta convocatoria<text:change-start text:change-id="ct94802957342576"/>, <text:span text:style-name="T37">y el de los docentes de la asignatura que sean autores de materiales haciendo constar que tienen los derechos para poder publicarlos en abierto</text:span><text:change-end text:change-id="ct94802957342576"/><text:change-start text:change-id="ct94802957322576"/><text:span text:style-name="T37"><office:annotation loext:resolved="false"><dc:creator>Jesus Gonzalez-Barahona</dc:creator><dc:date>2022-05-24T16:58:03.946046185</dc:date><text:p text:style-name="P80"><text:span text:style-name="T61">Ver comentario sobre declaración responsable, en la parte dispositiva.</text:span></text:p></office:annotation></text:span><text:change-end text:change-id="ct94802957322576"/>.<text:change-start text:change-id="ct94803155456656"/></text:p>
            </text:list-item>
          </text:list>
        </text:list-item>
      </text:list>
      <text:p text:style-name="P75"><text:change-end text:change-id="ct94803155456656"/><text:change-start text:change-id="ct94803088184768"/>As<text:span text:style-name="T59">í mismo, incluirá la siguiente información relativa al tratamiento de datos personales:</text:span></text:p>
      <text:p text:style-name="P76"><text:span text:style-name="T59">“</text:span>En cumplimiento de la normativa sobre protección de datos se le informa de lo siguiente:</text:p>
      <text:p text:style-name="P76">RESPONSABLE DEL TRATAMIENTO: Universidad Rey Juan Carlos</text:p>
      <text:p text:style-name="P76">FINALIDAD: Gestión de la convocatoria de reconocimiento de publicación de asignaturas en abierto.</text:p>
      <text:p text:style-name="P76">EJERCICIO DE DERECHOS: Puede ejercer sus derechos de acceso, rectificación, supresión, limitación del tratamiento, portabilidad, oposición y demás reconocidos por el Reglamento General de Protección de Datos, mediante solicitud dirigida a la la Universidad Rey Juan Carlos, C/ Tulipán s/n, 28933 Móstoles, por registro o en su sede electrónica o contactando con: protecciondedatos@urjc.es</text:p>
      <text:p text:style-name="P76">MÁS INFORMACIÓN EN LA CONVOCATORIA<text:change-end text:change-id="ct94803088184768"/><text:change-start text:change-id="ct94803149434928"/><text:span text:style-name="T59">”</text:span><text:change-end text:change-id="ct94803149434928"/></text:p>
      <text:p text:style-name="P10"/>
      <text:p text:style-name="Standard"/>
      <text:p text:style-name="P11"/>
      <text:list xml:id="list202620396317970" text:continue-list="list202619936933756" text:style-name="WWNum2">
        <text:list-item>
          <text:h text:style-name="Heading_20_1" text:outline-level="1">ANEXO II<text:change-start text:change-id="ct94803107759168"/>: <text:span text:style-name="T57">R</text:span><text:span text:style-name="T58">úbrica de evaluac</text:span><text:change-end text:change-id="ct94803107759168"/><text:change text:change-id="ct94803076775776"/><text:change-start text:change-id="ct94802954365664"/><text:span text:style-name="T57">ión</text:span><text:change-end text:change-id="ct94802954365664"/><text:change text:change-id="ct94803118279104"/></text:h>
        </text:list-item>
      </text:list>
      <text:p text:style-name="Text_20_body"><text:change-start text:change-id="ct94802957344848"/>Cada categoría de material será evaluada con la rúbrica correspondiente, según se indica a continuación para cada una de las categorías del listado<office:annotation loext:resolved="false"><dc:creator>Jesus Gonzalez-Barahona</dc:creator><dc:date>2022-05-25T21:23:44.988263319</dc:date><text:p text:style-name="P80"><text:span text:style-name="T61">Se ha detallado cómo se realiza la valoración de una asignatura, se han asignado valores numéricos a los items de calificación en las rúbricas, y se han detallado y uniformizado las <text:s/>rúbricas, siguiendo las recomendaciones recibidas</text:span></text:p></office:annotation> especificado en el apartado 2 de esta convocatoria. Para ser evaluada, el material correspondiente a esa categoría habrá de encontrarse correctamente depositado en BURJC Digital o TV URJC, según se indica en la convocatoria, y el enlace a este depósito y la justificación de cumplimiento de criterios de rúbrica habrán sido incluidos correctamente en la solicitud<text:change-end text:change-id="ct94802957344848"/><text:change-start text:change-id="ct94802957345088"/>.<text:change-end text:change-id="ct94802957345088"/><text:change-start text:change-id="ct94802957344608"/></text:p>
      <text:p text:style-name="Text_20_body"><text:change-end text:change-id="ct94802957344608"/><text:change-start text:change-id="ct94802957344368"/>La valoración total de la asignatura se realizará mediante la suma aritmética de los <text:change-end text:change-id="ct94802957344368"/><text:change-start text:change-id="ct94802957341712"/>valores numéricos asignados, según la rúbrica correspondiente, <text:change-end text:change-id="ct94802957341712"/><text:change-start text:change-id="ct94802957342000"/>a las <text:change-end text:change-id="ct94802957342000"/><text:change-start text:change-id="ct94802957342288"/>cuatro categorías con valoración más alta.<text:change-end text:change-id="ct94802957342288"/><text:change-start text:change-id="ct94802957355584"/></text:p>
      <text:p text:style-name="Text_20_body">Rúbrica para la <text:span text:style-name="T57">categor</text:span><text:span text:style-name="T60">ía “</text:span>guía de la asignatura<text:span text:style-name="T59">”</text:span>:<text:change-end text:change-id="ct94802957355584"/><text:change text:change-id="ct94802957367936"/></text:p>
      <table:table table:name="Table2" table:style-name="Table2" table:template-name="Default Style">
        <table:table-column table:style-name="Table2.A" table:number-columns-repeated="5"/>
        <table:table-row table:style-name="TableLine94802957319952">
          <table:table-cell table:style-name="Table2.A1" office:value-type="string">
            <text:p text:style-name="P18"><text:change-start text:change-id="ct94802957381824"/>0<text:change-end text:change-id="ct94802957381824"/></text:p>
          </table:table-cell>
          <table:table-cell table:style-name="Table2.A1" office:value-type="string">
            <text:p text:style-name="P18"><text:change-start text:change-id="ct94802957131360"/>1<text:change-end text:change-id="ct94802957131360"/></text:p>
          </table:table-cell>
          <table:table-cell table:style-name="Table2.A1" office:value-type="string">
            <text:p text:style-name="P28"><text:change-start text:change-id="ct94802957242528"/>2<text:change-end text:change-id="ct94802957242528"/></text:p>
          </table:table-cell>
          <table:table-cell table:style-name="Table2.A1" office:value-type="string">
            <text:p text:style-name="P29"><text:change-start text:change-id="ct94802957219120"/>3<text:change-end text:change-id="ct94802957219120"/></text:p>
          </table:table-cell>
          <table:table-cell table:style-name="Table2.E1" office:value-type="string">
            <text:p text:style-name="P29"><text:change-start text:change-id="ct94802957253344"/>4<text:change-end text:change-id="ct94802957253344"/></text:p>
          </table:table-cell>
        </table:table-row>
        <table:table-row table:style-name="TableLine94802957312048">
          <table:table-cell table:style-name="Table2.A2" office:value-type="string">
            <text:p text:style-name="P19"><text:change-start text:change-id="ct94802957260176"/>No presenta, no cumple los criterios de la convocatoria, o no llega al mínimo para ser puntuado<text:change-end text:change-id="ct94802957260176"/></text:p>
          </table:table-cell>
          <table:table-cell table:style-name="Table2.A2" office:value-type="string">
            <text:p text:style-name="P18"><text:change-start text:change-id="ct94802957263488"/>Incluye un calendario <text:change-end text:change-id="ct94802957263488"/><text:change-start text:change-id="ct94802957275744"/>con el plan docente detallado para todas las sesiones del curso académico, indicando al menos los temas cubiertos cada sesión<text:change-end text:change-id="ct94802957275744"/></text:p>
          </table:table-cell>
          <table:table-cell table:style-name="Table2.A2" office:value-type="string">
            <text:p text:style-name="P18"><text:change-start text:change-id="ct94802957276880"/>Detalla también, para cada sesión, el listado detallado de materiales utilizados, <text:span text:style-name="T44">y </text:span>una brev<text:change-end text:change-id="ct94802957276880"/><text:change-start text:change-id="ct94802957151536"/>e descripción del tema cubierto<text:change-end text:change-id="ct94802957151536"/><text:change-start text:change-id="ct94802957289024"/> <text:span text:style-name="T44">y los objetivos de aprendizaje asociados</text:span><text:change-end text:change-id="ct94802957289024"/></text:p>
          </table:table-cell>
          <table:table-cell table:style-name="Table2.A2" office:value-type="string">
            <text:p text:style-name="P22"><text:change-start text:change-id="ct94802957305248"/>Detalla además, para cada sesión, <text:span text:style-name="T43">el trabajo personal y otras actividades planificadas para los estudiantes</text:span><text:change-end text:change-id="ct94802957305248"/></text:p>
          </table:table-cell>
          <table:table-cell table:style-name="Table2.E2" office:value-type="string">
            <text:p text:style-name="P23"><text:change-start text:change-id="ct94802957305984"/><text:span text:style-name="T45">Incluye</text:span><text:change-end text:change-id="ct94802957305984"/><text:change-start text:change-id="ct94802957307088"/> además otros elementos y detalles que ayu<text:change-end text:change-id="ct94802957307088"/><text:change-start text:change-id="ct94802957309232"/>den al seguimiento de la asignatura.<text:change-end text:change-id="ct94802957309232"/></text:p>
          </table:table-cell>
        </table:table-row>
      </table:table>
      <text:p text:style-name="P36"><text:change-start text:change-id="ct94802957344032"/><text:span text:style-name="Caption_20_characters"/></text:p>
      <text:p text:style-name="Text_20_body"><text:change-end text:change-id="ct94802957344032"/><text:change-start text:change-id="ct94802957382528"/>Rúbrica para <text:span text:style-name="T57">las categor</text:span><text:span text:style-name="T60">ías “</text:span>apuntes<text:span text:style-name="T59">”</text:span> y <text:span text:style-name="T59">“</text:span>presentaciones o transparencias<text:change-end text:change-id="ct94802957382528"/><text:change-start text:change-id="ct94803139412944"/><text:span text:style-name="T59">”</text:span><text:change-end text:change-id="ct94803139412944"/><text:change-start text:change-id="ct94802957386784"/>:<text:change-end text:change-id="ct94802957386784"/><text:change-start text:change-id="ct94802957391136"/><office:annotation loext:resolved="false"><dc:creator>Jesus Gonzalez-Barahona</dc:creator><dc:date>2022-06-08T09:33:17.501071055</dc:date><text:p text:style-name="P80"><text:span text:style-name="T61">Para este tipo de material, y los siguientes, se mantiene una escala de valoración no lineal, siguiendo los consejos de César</text:span></text:p></office:annotation><text:change-end text:change-id="ct94802957391136"/></text:p>
      <table:table table:name="Table3" table:style-name="Table3" table:template-name="Default Style">
        <table:table-column table:style-name="Table3.A" table:number-columns-repeated="5"/>
        <table:table-column table:style-name="Table3.F"/>
        <table:table-row table:style-name="TableLine94802957341376">
          <table:table-cell table:style-name="Table3.A1" office:value-type="string">
            <text:p text:style-name="P24"><text:change-start text:change-id="ct94802957401952"/>0<text:change-end text:change-id="ct94802957401952"/></text:p>
          </table:table-cell>
          <table:table-cell table:style-name="Table3.A1" office:value-type="string">
            <text:p text:style-name="P24"><text:change-start text:change-id="ct94802957403328"/>1<text:change-end text:change-id="ct94802957403328"/></text:p>
          </table:table-cell>
          <table:table-cell table:style-name="Table3.A1" office:value-type="string">
            <text:p text:style-name="P27"><text:change-start text:change-id="ct94802957403968"/>3<text:change-end text:change-id="ct94802957403968"/></text:p>
          </table:table-cell>
          <table:table-cell table:style-name="Table3.A1" office:value-type="string">
            <text:p text:style-name="P27"><text:change-start text:change-id="ct94802957404608"/>5<text:change-end text:change-id="ct94802957404608"/></text:p>
          </table:table-cell>
          <table:table-cell table:style-name="Table3.A1" office:value-type="string">
            <text:p text:style-name="P27"><text:change-start text:change-id="ct94802957405248"/>8<text:change-end text:change-id="ct94802957405248"/></text:p>
          </table:table-cell>
          <table:table-cell table:style-name="Table3.F1" office:value-type="string">
            <text:p text:style-name="P27"><text:change-start text:change-id="ct94802957405888"/>1<text:change-end text:change-id="ct94802957405888"/><text:change-start text:change-id="ct94802957406128"/>4<text:change-end text:change-id="ct94802957406128"/></text:p>
          </table:table-cell>
        </table:table-row>
        <table:table-row table:style-name="TableLine94802957412240">
          <table:table-cell table:style-name="Table3.A2" office:value-type="string">
            <text:p text:style-name="P19"><text:change-start text:change-id="ct94802957406768"/>No presenta, no cumple los criterios de la convocatoria, o no llega al mínimo para ser puntuado<text:change-end text:change-id="ct94802957406768"/></text:p>
          </table:table-cell>
          <table:table-cell table:style-name="Table3.A2" office:value-type="string">
            <text:p text:style-name="P19"><text:change-start text:change-id="ct94802957407488"/>Cubre al menos un 30% del temario de la asignatura<text:change-end text:change-id="ct94802957407488"/></text:p>
          </table:table-cell>
          <table:table-cell table:style-name="Table3.A2" office:value-type="string">
            <text:p text:style-name="P19"><text:change-start text:change-id="ct94802957408512"/>Cubre al menos un 60% del temario de la asignatura, o al menos un 30% con un nivel de detalle alto<text:change-end text:change-id="ct94802957408512"/></text:p>
          </table:table-cell>
          <table:table-cell table:style-name="Table3.A2" office:value-type="string">
            <text:p text:style-name="P19"><text:change-start text:change-id="ct94802957409456"/>Cubre al menos un 90% del temario de la asignatura, o al menos un 60% con un nivel de detalle alto<text:change-end text:change-id="ct94802957409456"/></text:p>
          </table:table-cell>
          <table:table-cell table:style-name="Table3.A2" office:value-type="string">
            <text:p text:style-name="P19"><text:change-start text:change-id="ct94802957410368"/>Cubre al menos un 90% del temario de la asignatura, con un nivel de detalle alto<text:change-end text:change-id="ct94802957410368"/></text:p>
          </table:table-cell>
          <table:table-cell table:style-name="Table3.F2" office:value-type="string">
            <text:p text:style-name="P19"><text:change-start text:change-id="ct94802957411408"/>Material excelente, que destaca en cuanto a cobertura del temario y <text:span text:style-name="T50">n</text:span>ivel de detalle<text:change-end text:change-id="ct94802957411408"/></text:p>
          </table:table-cell>
        </table:table-row>
      </table:table>
      <text:p text:style-name="Table"><text:change-start text:change-id="ct94802957414640"/></text:p>
      <text:p text:style-name="Text_20_body">Rúbrica para <text:span text:style-name="T57">las categor</text:span><text:span text:style-name="T60">ías “</text:span>colecciones de ejercicios, problemas, trabajos o proyectos<text:span text:style-name="T59">”</text:span> y <text:span text:style-name="T59">“</text:span>colecciones de pruebas de evaluación<text:change-end text:change-id="ct94802957414640"/><text:change-start text:change-id="ct94803138987280"/><text:span text:style-name="T59">”</text:span><text:change-end text:change-id="ct94803138987280"/><text:change-start text:change-id="ct94802957414096"/>:<text:change-end text:change-id="ct94802957414096"/></text:p>
      <table:table table:name="Table4" table:style-name="Table4" table:template-name="Default Style">
        <table:table-column table:style-name="Table4.A" table:number-columns-repeated="5"/>
        <table:table-column table:style-name="Table4.F"/>
        <table:table-row table:style-name="TableLine94802957413104">
          <table:table-cell table:style-name="Table4.A1" office:value-type="string">
            <text:p text:style-name="P24"><text:change-start text:change-id="ct94802957414880"/>0<text:change-end text:change-id="ct94802957414880"/></text:p>
          </table:table-cell>
          <table:table-cell table:style-name="Table4.A1" office:value-type="string">
            <text:p text:style-name="P24"><text:change-start text:change-id="ct94802957416496"/>1<text:change-end text:change-id="ct94802957416496"/></text:p>
          </table:table-cell>
          <table:table-cell table:style-name="Table4.A1" office:value-type="string">
            <text:p text:style-name="P27"><text:change-start text:change-id="ct94802957417136"/>3<text:change-end text:change-id="ct94802957417136"/></text:p>
          </table:table-cell>
          <table:table-cell table:style-name="Table4.A1" office:value-type="string">
            <text:p text:style-name="P27"><text:change-start text:change-id="ct94802957417776"/>5<text:change-end text:change-id="ct94802957417776"/></text:p>
          </table:table-cell>
          <table:table-cell table:style-name="Table4.A1" office:value-type="string">
            <text:p text:style-name="P27"><text:change-start text:change-id="ct94802957418416"/>8<text:change-end text:change-id="ct94802957418416"/></text:p>
          </table:table-cell>
          <table:table-cell table:style-name="Table4.F1" office:value-type="string">
            <text:p text:style-name="P27"><text:change-start text:change-id="ct94802957419136"/>1<text:change-end text:change-id="ct94802957419136"/><text:change-start text:change-id="ct94802957419376"/>4<text:change-end text:change-id="ct94802957419376"/></text:p>
          </table:table-cell>
        </table:table-row>
        <table:table-row table:style-name="TableLine94802957427168">
          <table:table-cell table:style-name="Table4.A2" office:value-type="string">
            <text:p text:style-name="P20"><text:change-start text:change-id="ct94802957421104"/>No presenta, no cumple los criterios de la convocatoria, o no llega al mínimo para ser puntuado<text:change-end text:change-id="ct94802957421104"/></text:p>
          </table:table-cell>
          <table:table-cell table:style-name="Table4.A2" office:value-type="string">
            <text:p text:style-name="P20"><text:change-start text:change-id="ct94802957421824"/>Cubre al menos un 30% del temario de la asignatura<text:change-end text:change-id="ct94802957421824"/></text:p>
          </table:table-cell>
          <table:table-cell table:style-name="Table4.A2" office:value-type="string">
            <text:p text:style-name="P20"><text:change-start text:change-id="ct94802957422544"/>Cubre al menos un 60% del temario de la asignatura, o al menos un 30% con <text:change-end text:change-id="ct94802957422544"/><text:change-start text:change-id="ct94802957423120"/><text:span text:style-name="T50">soluciones</text:span><text:change-end text:change-id="ct94802957423120"/></text:p>
          </table:table-cell>
          <table:table-cell table:style-name="Table4.A2" office:value-type="string">
            <text:p text:style-name="P20"><text:change-start text:change-id="ct94802957423760"/>Cubre al menos un 90% del temario de la asignatura, o al menos un 60% con <text:change-end text:change-id="ct94802957423760"/><text:change-start text:change-id="ct94802957424288"/><text:span text:style-name="T50">soluciones</text:span><text:change-end text:change-id="ct94802957424288"/></text:p>
          </table:table-cell>
          <table:table-cell table:style-name="Table4.A2" office:value-type="string">
            <text:p text:style-name="P20"><text:change-start text:change-id="ct94802957424928"/>Cubre al menos un 90% del temario de la asignatura, con <text:change-end text:change-id="ct94802957424928"/><text:change-start text:change-id="ct94802957425408"/><text:span text:style-name="T50">soluciones</text:span><text:change-end text:change-id="ct94802957425408"/></text:p>
          </table:table-cell>
          <table:table-cell table:style-name="Table4.F2" office:value-type="string">
            <text:p text:style-name="P20"><text:change-start text:change-id="ct94802957426528"/>Material excelente, que destaca en cuanto a cobertura del temario y nivel de detalle<text:change-end text:change-id="ct94802957426528"/></text:p>
          </table:table-cell>
        </table:table-row>
      </table:table>
      <text:p text:style-name="Text_20_body"><text:change-start text:change-id="ct94802998482512"/></text:p>
      <text:p text:style-name="Text_20_body"><text:change-end text:change-id="ct94802998482512"/><text:change-start text:change-id="ct94802957429712"/>Rúbrica para <text:span text:style-name="T57">la categor</text:span><text:span text:style-name="T60">ía “</text:span>videos cortos (video-píldoras)<text:span text:style-name="T59">”</text:span>.<text:change-end text:change-id="ct94802957429712"/><text:change-start text:change-id="ct94802957432192"/> Se considerarán como videos cortos los que son de menos de 10 minutos, y están concebidos para explicar un tema concreto relevante para la asignatura<text:change-end text:change-id="ct94802957432192"/><text:change-start text:change-id="ct94802957434048"/>:<text:change-end text:change-id="ct94802957434048"/></text:p>
      <table:table table:name="Table5" table:style-name="Table5" table:template-name="Default Style">
        <table:table-column table:style-name="Table5.A" table:number-columns-repeated="5"/>
        <table:table-column table:style-name="Table5.F"/>
        <text:soft-page-break/>
        <table:table-row table:style-name="TableLine94802957428032">
          <table:table-cell table:style-name="Table5.A1" office:value-type="string">
            <text:p text:style-name="P24"><text:change-start text:change-id="ct94802957436208"/>0<text:change-end text:change-id="ct94802957436208"/></text:p>
          </table:table-cell>
          <table:table-cell table:style-name="Table5.A1" office:value-type="string">
            <text:p text:style-name="P24"><text:change-start text:change-id="ct94802957436848"/>1<text:change-end text:change-id="ct94802957436848"/></text:p>
          </table:table-cell>
          <table:table-cell table:style-name="Table5.A1" office:value-type="string">
            <text:p text:style-name="P27"><text:change-start text:change-id="ct94802957437488"/>3<text:change-end text:change-id="ct94802957437488"/></text:p>
          </table:table-cell>
          <table:table-cell table:style-name="Table5.A1" office:value-type="string">
            <text:p text:style-name="P27"><text:change-start text:change-id="ct94802957438128"/>5<text:change-end text:change-id="ct94802957438128"/></text:p>
          </table:table-cell>
          <table:table-cell table:style-name="Table5.A1" office:value-type="string">
            <text:p text:style-name="P27"><text:change-start text:change-id="ct94802957438768"/>8<text:change-end text:change-id="ct94802957438768"/></text:p>
          </table:table-cell>
          <table:table-cell table:style-name="Table5.F1" office:value-type="string">
            <text:p text:style-name="P27"><text:change-start text:change-id="ct94802957439408"/>14<text:change-end text:change-id="ct94802957439408"/></text:p>
          </table:table-cell>
        </table:table-row>
        <table:table-row table:style-name="TableLine94802957443136">
          <table:table-cell table:style-name="Table5.A2" office:value-type="string">
            <text:p text:style-name="P20"><text:change-start text:change-id="ct94802957440496"/>No presenta, no cumple los criterios de la convocatoria, o no llega al mínimo para ser puntuado<text:change-end text:change-id="ct94802957440496"/></text:p>
          </table:table-cell>
          <table:table-cell table:style-name="Table5.A2" office:value-type="string">
            <text:p text:style-name="P24"><text:change-start text:change-id="ct94802957441136"/>Incluye al menos un video <text:span text:style-name="T51">corto </text:span>de presentaci<text:change-end text:change-id="ct94802957441136"/><text:change-start text:change-id="ct94802957441376"/>ón de la asignatura<text:change-end text:change-id="ct94802957441376"/></text:p>
          </table:table-cell>
          <table:table-cell table:style-name="Table5.A2" office:value-type="string">
            <text:p text:style-name="P26"><text:change-start text:change-id="ct94802957442016"/>Incluye al menos <text:change-end text:change-id="ct94802957442016"/><text:change-start text:change-id="ct94802957442256"/>5<text:change-end text:change-id="ct94802957442256"/><text:change-start text:change-id="ct94802957442496"/> videos cortos de temas diferentes<text:change-end text:change-id="ct94802957442496"/><text:change-start text:change-id="ct94802957442896"/> de la asignatura<text:change-end text:change-id="ct94802957442896"/><text:change-start text:change-id="ct94802957443424"/>, o videos de otros tamaños que cubran al menos el 50% del <text:change-end text:change-id="ct94802957443424"/><text:change-start text:change-id="ct94802957443664"/>temario de la asignatura<text:change-end text:change-id="ct94802957443664"/></text:p>
          </table:table-cell>
          <table:table-cell table:style-name="Table5.A2" office:value-type="string">
            <text:p text:style-name="P26"><text:change-start text:change-id="ct94802957444464"/>Incluye al menos 12 videos cortos, cubriendo temas de al menos <text:change-end text:change-id="ct94802957444464"/><text:change-start text:change-id="ct94802957444704"/>el 50% del temario de la asignatura<text:change-end text:change-id="ct94802957444704"/><text:change-start text:change-id="ct94802957445168"/>, o videos de otros tamaños que cubran al menos el 90% del temario de la asignatura<text:change-end text:change-id="ct94802957445168"/></text:p>
          </table:table-cell>
          <table:table-cell table:style-name="Table5.A2" office:value-type="string">
            <text:p text:style-name="P26"><text:change-start text:change-id="ct94802957445808"/>Incluye al menos <text:change-end text:change-id="ct94802957445808"/><text:change-start text:change-id="ct94802957446048"/>20 videos cortos, <text:change-end text:change-id="ct94802957446048"/><text:change-start text:change-id="ct94802957446288"/>cubriendo temas de <text:change-end text:change-id="ct94802957446288"/><text:change-start text:change-id="ct94802957446528"/>al menos el 90% del temario de la asignatura<text:change-end text:change-id="ct94802957446528"/></text:p>
          </table:table-cell>
          <table:table-cell table:style-name="Table5.F2" office:value-type="string">
            <text:p text:style-name="P20"><text:change-start text:change-id="ct94802957447360"/>Material excelente, que destaca en cuanto a cobertura del temario y nivel de detalle<text:change-end text:change-id="ct94802957447360"/></text:p>
          </table:table-cell>
        </table:table-row>
      </table:table>
      <text:p text:style-name="P37"><text:change-start text:change-id="ct94802957449008"/></text:p>
      <text:p text:style-name="Text_20_body"><text:change-end text:change-id="ct94802957449008"/><text:change-start text:change-id="ct94802957450624"/>Rúbrica para <text:span text:style-name="T57">la categor</text:span><text:span text:style-name="T60">ía “</text:span>otros materiales<text:span text:style-name="T59">”</text:span>. Por las características de esta categoría, la rúbrica de ofrece de forma orientativa, pues se tendrán en cuenta las peculiaridades de los materiales presentados.<text:change-end text:change-id="ct94802957450624"/></text:p>
      <table:table table:name="Table6" table:style-name="Table6" table:template-name="Default Style">
        <table:table-column table:style-name="Table6.A" table:number-columns-repeated="5"/>
        <table:table-column table:style-name="Table6.F"/>
        <table:table-row table:style-name="TableLine94802957448720">
          <table:table-cell table:style-name="Table6.A1" office:value-type="string">
            <text:p text:style-name="P25"><text:change-start text:change-id="ct94802957452320"/>0<text:change-end text:change-id="ct94802957452320"/></text:p>
          </table:table-cell>
          <table:table-cell table:style-name="Table6.A1" office:value-type="string">
            <text:p text:style-name="P25"><text:change-start text:change-id="ct94802956481536"/>1<text:change-end text:change-id="ct94802956481536"/></text:p>
          </table:table-cell>
          <table:table-cell table:style-name="Table6.A1" office:value-type="string">
            <text:p text:style-name="P27"><text:change-start text:change-id="ct94802956482688"/>3<text:change-end text:change-id="ct94802956482688"/></text:p>
          </table:table-cell>
          <table:table-cell table:style-name="Table6.A1" office:value-type="string">
            <text:p text:style-name="P27"><text:change-start text:change-id="ct94802957251680"/>5<text:change-end text:change-id="ct94802957251680"/></text:p>
          </table:table-cell>
          <table:table-cell table:style-name="Table6.A1" office:value-type="string">
            <text:p text:style-name="P27"><text:change-start text:change-id="ct94802957252320"/>8<text:change-end text:change-id="ct94802957252320"/></text:p>
          </table:table-cell>
          <table:table-cell table:style-name="Table6.F1" office:value-type="string">
            <text:p text:style-name="P27"><text:change-start text:change-id="ct94802957252960"/>14<text:change-end text:change-id="ct94802957252960"/></text:p>
          </table:table-cell>
        </table:table-row>
        <table:table-row table:style-name="TableLine94802957461664">
          <table:table-cell table:style-name="Table6.A2" office:value-type="string">
            <text:p text:style-name="P21"><text:change-start text:change-id="ct94802957398976"/>No presenta, no cumple los criterios de la convocatoria, o no llega al mínimo para ser puntuado<text:change-end text:change-id="ct94802957398976"/></text:p>
          </table:table-cell>
          <table:table-cell table:style-name="Table6.A2" office:value-type="string">
            <text:p text:style-name="P21"><text:change-start text:change-id="ct94802957397776"/>Cubre al menos un 30% del temario de la asignatura<text:change-end text:change-id="ct94802957397776"/></text:p>
          </table:table-cell>
          <table:table-cell table:style-name="Table6.A2" office:value-type="string">
            <text:p text:style-name="P21"><text:change-start text:change-id="ct94802957458096"/>Cubre al menos un 60% del temario de la asignatura, o al menos un 30% con un nivel de detalle alto<text:change-end text:change-id="ct94802957458096"/></text:p>
          </table:table-cell>
          <table:table-cell table:style-name="Table6.A2" office:value-type="string">
            <text:p text:style-name="P21"><text:change-start text:change-id="ct94802957458960"/>Cubre al menos un 90% del temario de la asignatura, o al menos un 60% con un nivel de detalle alto<text:change-end text:change-id="ct94802957458960"/></text:p>
          </table:table-cell>
          <table:table-cell table:style-name="Table6.A2" office:value-type="string">
            <text:p text:style-name="P21"><text:change-start text:change-id="ct94802957459600"/>Cubre al menos un 90% del temario de la asignatura, con un nivel de detalle alto<text:change-end text:change-id="ct94802957459600"/></text:p>
          </table:table-cell>
          <table:table-cell table:style-name="Table6.F2" office:value-type="string">
            <text:p text:style-name="P21"><text:change-start text:change-id="ct94802957460880"/>Material excelente, que destaca en cuanto a cobertura del temario y <text:span text:style-name="T50">n</text:span>ivel de detalle<text:change-end text:change-id="ct94802957460880"/></text:p>
          </table:table-cell>
        </table:table-row>
      </table:table>
      <text:p text:style-name="P52"><text:change text:change-id="ct94802957463056"/></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12"><text:change text:change-id="ct94802957465088"/></text:p>
          </table:table-cell>
          <table:table-cell table:style-name="Table1.A1" table:number-columns-spanned="6" office:value-type="string">
            <text:p text:style-name="P12"><text:change text:change-id="ct94802957466080"/></text:p>
          </table:table-cell>
          <table:covered-table-cell/>
          <table:covered-table-cell/>
          <table:covered-table-cell/>
          <table:covered-table-cell/>
          <table:covered-table-cell/>
        </table:table-row>
        <table:table-row table:style-name="Table1.2">
          <table:table-cell table:style-name="Table1.A2" office:value-type="string">
            <text:p text:style-name="P13"><text:change text:change-id="ct94802957467296"/></text:p>
          </table:table-cell>
          <table:table-cell table:style-name="Table1.B2" office:value-type="string">
            <text:p text:style-name="P13"><text:change text:change-id="ct94802957468336"/></text:p>
          </table:table-cell>
          <table:table-cell table:style-name="Table1.C2" office:value-type="string">
            <text:p text:style-name="P48"><text:change text:change-id="ct94802957469152"/></text:p>
          </table:table-cell>
          <table:table-cell table:style-name="Table1.D2" office:value-type="string">
            <text:p text:style-name="P12"><text:change text:change-id="ct94802957469968"/></text:p>
          </table:table-cell>
          <table:table-cell table:style-name="Table1.E2" office:value-type="string">
            <text:p text:style-name="P12"><text:change text:change-id="ct94802957470784"/></text:p>
          </table:table-cell>
          <table:table-cell table:style-name="Table1.F2" office:value-type="string">
            <text:p text:style-name="P12"/>
          </table:table-cell>
          <table:table-cell table:style-name="Table1.G2" office:value-type="string">
            <text:p text:style-name="P12"/>
          </table:table-cell>
        </table:table-row>
        <table:table-row table:style-name="Table1.3">
          <table:table-cell table:style-name="Table1.A3" office:value-type="string">
            <text:p text:style-name="P12"><text:change text:change-id="ct94802957474128"/></text:p>
          </table:table-cell>
          <table:table-cell table:style-name="Table1.B3" table:number-columns-spanned="6" office:value-type="string">
            <text:p text:style-name="P14"/>
          </table:table-cell>
          <table:covered-table-cell/>
          <table:covered-table-cell/>
          <table:covered-table-cell/>
          <table:covered-table-cell/>
          <table:covered-table-cell/>
        </table:table-row>
        <table:table-row table:style-name="Table1.4">
          <table:table-cell table:style-name="Table1.A4" office:value-type="string">
            <text:p text:style-name="P16"><text:change text:change-id="ct94802957476240"/></text:p>
          </table:table-cell>
          <table:table-cell table:style-name="Table1.B4" office:value-type="string">
            <text:p text:style-name="P17"/>
          </table:table-cell>
          <table:table-cell table:style-name="Table1.C4" office:value-type="string">
            <text:p text:style-name="P17"/>
          </table:table-cell>
          <table:table-cell table:style-name="Table1.D4" office:value-type="string">
            <text:p text:style-name="P17"/>
          </table:table-cell>
          <table:table-cell table:style-name="Table1.E4" office:value-type="string">
            <text:p text:style-name="P17"/>
          </table:table-cell>
          <table:table-cell table:style-name="Table1.F4" office:value-type="string">
            <text:p text:style-name="P17"/>
          </table:table-cell>
          <table:table-cell table:style-name="Table1.G4" office:value-type="string">
            <text:p text:style-name="P17"/>
          </table:table-cell>
        </table:table-row>
        <table:table-row table:style-name="Table1.5">
          <table:table-cell table:style-name="Table1.A5" office:value-type="string">
            <text:p text:style-name="P16"><text:change text:change-id="ct94802957481712"/></text:p>
          </table:table-cell>
          <table:table-cell table:style-name="Table1.B5" office:value-type="string">
            <text:p text:style-name="P15"><text:change text:change-id="ct94802957482624"/></text:p>
          </table:table-cell>
          <table:table-cell table:style-name="Table1.C5" office:value-type="string">
            <text:p text:style-name="P15"><text:change text:change-id="ct94802957483344"/><text:change text:change-id="ct94802957483968"/></text:p>
          </table:table-cell>
          <table:table-cell table:style-name="Table1.D5" office:value-type="string">
            <text:p text:style-name="P15"><text:change text:change-id="ct94802957484704"/><text:change text:change-id="ct94802957485104"/><text:change text:change-id="ct94802957485344"/></text:p>
          </table:table-cell>
          <table:table-cell table:style-name="Table1.E5" office:value-type="string">
            <text:p text:style-name="P15"><text:change text:change-id="ct94802957486080"/></text:p>
          </table:table-cell>
          <table:table-cell table:style-name="Table1.F5" office:value-type="string">
            <text:p text:style-name="P15"/>
          </table:table-cell>
          <table:table-cell table:style-name="Table1.G5" office:value-type="string">
            <text:p text:style-name="P15"/>
          </table:table-cell>
        </table:table-row>
        <table:table-row table:style-name="Table1.6">
          <table:table-cell table:style-name="Table1.A6" office:value-type="string">
            <text:p text:style-name="P16"><text:change text:change-id="ct94802957488704"/></text:p>
          </table:table-cell>
          <table:table-cell table:style-name="Table1.B6" office:value-type="string">
            <text:p text:style-name="P15"><text:change text:change-id="ct94802957489616"/></text:p>
          </table:table-cell>
          <table:table-cell table:style-name="Table1.C6" office:value-type="string">
            <text:p text:style-name="P15"><text:change text:change-id="ct94802957490480"/></text:p>
          </table:table-cell>
          <table:table-cell table:style-name="Table1.D6" office:value-type="string">
            <text:p text:style-name="P15"><text:change text:change-id="ct94802957491344"/><text:change text:change-id="ct94802957491584"/></text:p>
          </table:table-cell>
          <table:table-cell table:style-name="Table1.E6" office:value-type="string">
            <text:p text:style-name="P15"><text:change text:change-id="ct94802957492368"/></text:p>
          </table:table-cell>
          <table:table-cell table:style-name="Table1.F6" office:value-type="string">
            <text:p text:style-name="P17"/>
          </table:table-cell>
          <table:table-cell table:style-name="Table1.G6" office:value-type="string">
            <text:p text:style-name="P15"/>
          </table:table-cell>
        </table:table-row>
        <table:table-row table:style-name="Table1.7">
          <table:table-cell table:style-name="Table1.A7" office:value-type="string">
            <text:p text:style-name="P16"><text:change text:change-id="ct94802957495280"/></text:p>
          </table:table-cell>
          <table:table-cell table:style-name="Table1.B7" office:value-type="string">
            <text:p text:style-name="P15"><text:change text:change-id="ct94802957496272"/></text:p>
          </table:table-cell>
          <table:table-cell table:style-name="Table1.C7" office:value-type="string">
            <text:p text:style-name="P15"><text:change text:change-id="ct94802957497056"/></text:p>
          </table:table-cell>
          <table:table-cell table:style-name="Table1.D7" office:value-type="string">
            <text:p text:style-name="P15"><text:change text:change-id="ct94802957497920"/></text:p>
          </table:table-cell>
          <table:table-cell table:style-name="Table1.E7" office:value-type="string">
            <text:p text:style-name="P15"><text:change text:change-id="ct94802957498784"/></text:p>
          </table:table-cell>
          <table:table-cell table:style-name="Table1.F7" office:value-type="string">
            <text:p text:style-name="P15"/>
          </table:table-cell>
          <table:table-cell table:style-name="Table1.G7" office:value-type="string">
            <text:p text:style-name="P15"/>
          </table:table-cell>
        </table:table-row>
        <table:table-row table:style-name="Table1.8">
          <table:table-cell table:style-name="Table1.A8" office:value-type="string">
            <text:p text:style-name="P16"><text:change text:change-id="ct94802957501696"/></text:p>
          </table:table-cell>
          <table:table-cell table:style-name="Table1.B8" office:value-type="string">
            <text:p text:style-name="P15"><text:change text:change-id="ct94802957502608"/></text:p>
          </table:table-cell>
          <table:table-cell table:style-name="Table1.C8" office:value-type="string">
            <text:p text:style-name="P15"><text:change text:change-id="ct94802957503472"/></text:p>
          </table:table-cell>
          <table:table-cell table:style-name="Table1.D8" office:value-type="string">
            <text:p text:style-name="P15"><text:change text:change-id="ct94802957504336"/></text:p>
          </table:table-cell>
          <table:table-cell table:style-name="Table1.E8" office:value-type="string">
            <text:p text:style-name="P15"><text:change text:change-id="ct94802957505200"/></text:p>
          </table:table-cell>
          <table:table-cell table:style-name="Table1.F8" office:value-type="string">
            <text:p text:style-name="P15"/>
          </table:table-cell>
          <table:table-cell table:style-name="Table1.G8" office:value-type="string">
            <text:p text:style-name="P15"/>
          </table:table-cell>
        </table:table-row>
        <table:table-row table:style-name="Table1.9">
          <table:table-cell table:style-name="Table1.A9" office:value-type="string">
            <text:p text:style-name="P16"><text:change text:change-id="ct94802957508032"/></text:p>
          </table:table-cell>
          <table:table-cell table:style-name="Table1.B9" office:value-type="string">
            <text:p text:style-name="P15"><text:change text:change-id="ct94802957508720"/></text:p>
          </table:table-cell>
          <table:table-cell table:style-name="Table1.C9" office:value-type="string">
            <text:p text:style-name="P15"><text:change text:change-id="ct94802957509360"/></text:p>
          </table:table-cell>
          <table:table-cell table:style-name="Table1.D9" office:value-type="string">
            <text:p text:style-name="P15"><text:change text:change-id="ct94802957510000"/></text:p>
          </table:table-cell>
          <table:table-cell table:style-name="Table1.E9" office:value-type="string">
            <text:p text:style-name="P15"><text:change text:change-id="ct94802957510640"/></text:p>
          </table:table-cell>
          <table:table-cell table:style-name="Table1.F9" office:value-type="string">
            <text:p text:style-name="P15"/>
          </table:table-cell>
          <table:table-cell table:style-name="Table1.G9" office:value-type="string">
            <text:p text:style-name="P15"/>
          </table:table-cell>
        </table:table-row>
        <table:table-row table:style-name="Table1.10">
          <table:table-cell table:style-name="Table1.A10" office:value-type="string">
            <text:p text:style-name="P16"><text:change text:change-id="ct94802957513024"/></text:p>
          </table:table-cell>
          <table:table-cell table:style-name="Table1.B10" office:value-type="string">
            <text:p text:style-name="P15"><text:change text:change-id="ct94802957513840"/></text:p>
          </table:table-cell>
          <table:table-cell table:style-name="Table1.C10" office:value-type="string">
            <text:p text:style-name="P15"><text:change text:change-id="ct94802957514656"/></text:p>
          </table:table-cell>
          <table:table-cell table:style-name="Table1.D10" office:value-type="string">
            <text:p text:style-name="P15"><text:change text:change-id="ct94802957515472"/></text:p>
          </table:table-cell>
          <table:table-cell table:style-name="Table1.E10" office:value-type="string">
            <text:p text:style-name="P15"><text:change text:change-id="ct94802957516288"/></text:p>
          </table:table-cell>
          <table:table-cell table:style-name="Table1.F10" office:value-type="string">
            <text:p text:style-name="P15"/>
          </table:table-cell>
          <table:table-cell table:style-name="Table1.G10" office:value-type="string">
            <text:p text:style-name="P15"/>
          </table:table-cell>
        </table:table-row>
        <table:table-row table:style-name="Table1.11">
          <table:table-cell table:style-name="Table1.A11" office:value-type="string">
            <text:p text:style-name="P16"><text:change text:change-id="ct94802957519056"/></text:p>
          </table:table-cell>
          <table:table-cell table:style-name="Table1.B11" office:value-type="string">
            <text:p text:style-name="P15"><text:change text:change-id="ct94802957519872"/></text:p>
          </table:table-cell>
          <table:table-cell table:style-name="Table1.C11" office:value-type="string">
            <text:p text:style-name="P15"><text:change text:change-id="ct94802957520688"/></text:p>
          </table:table-cell>
          <table:table-cell table:style-name="Table1.D11" office:value-type="string">
            <text:p text:style-name="P15"><text:change text:change-id="ct94802957521504"/></text:p>
          </table:table-cell>
          <table:table-cell table:style-name="Table1.E11" office:value-type="string">
            <text:p text:style-name="P15"><text:change text:change-id="ct94802957522416"/></text:p>
          </table:table-cell>
          <table:table-cell table:style-name="Table1.F11" office:value-type="string">
            <text:p text:style-name="P15"/>
          </table:table-cell>
          <table:table-cell table:style-name="Table1.G11" office:value-type="string">
            <text:p text:style-name="P15"/>
          </table:table-cell>
        </table:table-row>
      </table:table>
      <text:p text:style-name="P49"><text:change text:change-id="ct9480295753027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KaitiM GB" svg:font-family="'AR PL KaitiM GB'" style:font-family-generic="system"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AR PL KaitiM GB" style:font-size-asian="12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s" fo:country="ES" style:letter-kerning="true" style:font-name-asian="AR PL KaitiM GB" style:font-size-asian="12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fo:font-size="9pt"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loext:linked-style-name="Texto_20_independiente_20_Car" style:class="text" style:master-page-name="">
      <style:paragraph-properties fo:margin-top="0in" fo:margin-bottom="0.0972in" style:contextual-spacing="false" fo:line-height="115%" fo:text-align="justify" style:justify-single-word="false" style:page-number="auto"/>
      <style:text-properties fo:font-size="11pt"/>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loext:linked-style-name="Título_20_1_20_Car" style:default-outline-level="1" style:list-style-name="WWNum2" style:class="text">
      <style:text-properties fo:font-size="18pt" fo:font-weight="bold" style:font-size-asian="18pt" style:font-weight-asian="bold" style:font-size-complex="18pt" style:font-weight-complex="bold"/>
    </style:style>
    <style:style style:name="caption" style:family="paragraph" style:parent-style-name="Standard">
      <style:paragraph-properties fo:margin-top="0.0835in" fo:margin-bottom="0.0835in" style:contextual-spacing="false" text:number-lines="false" text:line-number="0"/>
      <style:text-properties fo:font-style="italic" style:font-style-asian="italic" style:font-style-complex="italic"/>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nnotation_20_text" style:display-name="annotation text" style:family="paragraph" style:parent-style-name="Standard">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Revision" style:family="paragraph">
      <style:paragraph-properties fo:margin-top="0in" fo:margin-bottom="0in" style:contextual-spacing="false" fo:text-align="start" style:justify-single-word="false" fo:orphans="2" fo:widows="2" fo:hyphenation-ladder-count="no-limit" style:writing-mode="lr-tb"/>
      <style:text-properties style:font-name-complex="Mangal" style:font-family-complex="Mangal" style:font-family-generic-complex="system" style:font-pitch-complex="variable" style:font-size-complex="10.5pt" fo:hyphenate="tru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3.25in" style:type="center"/>
          <style:tab-stop style:position="6.5in"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loext:linked-style-name="Pie_20_de_20_página_20_Car" style:class="extra">
      <style:paragraph-properties>
        <style:tab-stops>
          <style:tab-stop style:position="3.25in" style:type="center"/>
          <style:tab-stop style:position="6.5in" style:type="right"/>
        </style:tab-stops>
      </style:paragraph-properties>
      <style:text-properties style:font-name-complex="Mangal" style:font-family-complex="Mangal" style:font-family-generic-complex="system" style:font-pitch-complex="variable" style:font-size-complex="10.5pt"/>
    </style:style>
    <style:style style:name="Normal_20__28_Web_29_" style:display-name="Normal (Web)" style:family="paragraph" style:parent-style-name="Standard">
      <style:paragraph-properties fo:margin-top="0.1945in" fo:margin-bottom="0.1945in" style:contextual-spacing="false" fo:hyphenation-ladder-count="no-limit"/>
      <style:text-properties style:font-name="Times New Roman" fo:font-family="'Times New Roman'" style:font-family-generic="roman" style:font-pitch="variable" style:letter-kerning="false" style:font-name-asian="Times New Roman1" style:font-family-asian="'Times New Roman'" style:font-family-generic-asian="system" style:font-pitch-asian="variable" style:rfc-language-tag-asian="es-ES-u-co-trad" style:language-asian="es" style:country-asian="ES"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Endnote_20_anchor" style:display-name="Endnote anchor" style:family="text">
      <style:text-properties style:text-position="super 58%"/>
    </style:style>
    <style:style style:name="Endnote_20_Symbol" style:display-name="Endnote Symbol" style:family="text"/>
    <style:style style:name="Texto_20_comentario_20_Car" style:display-name="Texto comentario C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Texto_20_independiente_20_Car" style:display-name="Texto independiente Car" style:family="text" style:parent-style-name="Default_20_Paragraph_20_Font"/>
    <style:style style:name="Título_20_1_20_Car" style:display-name="Título 1 Car" style:family="text" style:parent-style-name="Default_20_Paragraph_20_Font" loext:linked-style-name="Heading_20_1">
      <style:text-properties style:font-name="Liberation Sans" fo:font-family="'Liberation Sans'" style:font-family-generic="roman" style:font-pitch="variable" fo:font-size="18pt" fo:font-weight="bold" style:font-size-asian="18pt" style:font-weight-asian="bold" style:font-size-complex="18pt" style:font-weight-complex="bold"/>
    </style:style>
    <style:style style:name="Encabezado_20_Car" style:display-name="Encabezado Car" style:family="text" style:parent-style-name="Default_20_Paragraph_20_Font" loext:linked-style-name="Header">
      <style:text-properties style:font-name-complex="Mangal" style:font-family-complex="Mangal" style:font-family-generic-complex="system" style:font-pitch-complex="variable" style:font-size-complex="10.5pt"/>
    </style:style>
    <style:style style:name="Pie_20_de_20_página_20_Car" style:display-name="Pie de página Car" style:family="text" style:parent-style-name="Default_20_Paragraph_20_Font" loext:linked-style-name="Footer">
      <style:text-properties style:font-name-complex="Mangal" style:font-family-complex="Mangal" style:font-family-generic-complex="system" style:font-pitch-complex="variable" style:font-size-complex="10.5pt"/>
    </style:style>
    <style:style style:name="Line_20_numbering" style:display-name="Line numbering"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sian="AR PL KaitiM GB" style:font-family-asian="'AR PL KaitiM GB'" style:font-family-generic-asian="system" style:font-pitch-asian="variable" style:font-name-complex="FreeSans1" style:font-family-complex="FreeSans"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417in" fo:text-indent="-0.25in" fo:margin-left="0.5417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917in" fo:text-indent="-0.25in" fo:margin-left="0.7917in"/>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917in" fo:text-indent="-0.25in" fo:margin-left="1.2917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417in" fo:text-indent="-0.25in" fo:margin-left="1.5417in"/>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917in" fo:text-indent="-0.25in" fo:margin-left="1.7917in"/>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0417in" fo:text-indent="-0.25in" fo:margin-left="2.0417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917in" fo:text-indent="-0.25in" fo:margin-left="2.2917in"/>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417in" fo:text-indent="-0.25in" fo:margin-left="2.5417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format="">
        <style:list-level-properties text:list-level-position-and-space-mode="label-alignment">
          <style:list-level-label-alignment text:label-followed-by="nothing"/>
        </style:list-level-properties>
      </text:list-level-style-number>
      <text:list-level-style-number text:level="2" text:style-name="ListLabel_20_47" loext:num-list-format="%2%" style:num-format="">
        <style:list-level-properties text:list-level-position-and-space-mode="label-alignment">
          <style:list-level-label-alignment text:label-followed-by="nothing"/>
        </style:list-level-properties>
      </text:list-level-style-number>
      <text:list-level-style-number text:level="3" text:style-name="ListLabel_20_48" loext:num-list-format="%3%" style:num-format="">
        <style:list-level-properties text:list-level-position-and-space-mode="label-alignment">
          <style:list-level-label-alignment text:label-followed-by="nothing"/>
        </style:list-level-properties>
      </text:list-level-style-number>
      <text:list-level-style-number text:level="4" text:style-name="ListLabel_20_49" loext:num-list-format="%4%" style:num-format="">
        <style:list-level-properties text:list-level-position-and-space-mode="label-alignment">
          <style:list-level-label-alignment text:label-followed-by="nothing"/>
        </style:list-level-properties>
      </text:list-level-style-number>
      <text:list-level-style-number text:level="5" text:style-name="ListLabel_20_50" loext:num-list-format="%5%" style:num-format="">
        <style:list-level-properties text:list-level-position-and-space-mode="label-alignment">
          <style:list-level-label-alignment text:label-followed-by="nothing"/>
        </style:list-level-properties>
      </text:list-level-style-number>
      <text:list-level-style-number text:level="6" text:style-name="ListLabel_20_51" loext:num-list-format="%6%" style:num-format="">
        <style:list-level-properties text:list-level-position-and-space-mode="label-alignment">
          <style:list-level-label-alignment text:label-followed-by="nothing"/>
        </style:list-level-properties>
      </text:list-level-style-number>
      <text:list-level-style-number text:level="7" text:style-name="ListLabel_20_52" loext:num-list-format="%7%" style:num-format="">
        <style:list-level-properties text:list-level-position-and-space-mode="label-alignment">
          <style:list-level-label-alignment text:label-followed-by="nothing"/>
        </style:list-level-properties>
      </text:list-level-style-number>
      <text:list-level-style-number text:level="8" text:style-name="ListLabel_20_53" loext:num-list-format="%8%" style:num-format="">
        <style:list-level-properties text:list-level-position-and-space-mode="label-alignment">
          <style:list-level-label-alignment text:label-followed-by="nothing"/>
        </style:list-level-properties>
      </text:list-level-style-number>
      <text:list-level-style-number text:level="9" text:style-name="ListLabel_20_5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4862in" fo:margin-left="0.7362in"/>
        </style:list-level-properties>
        <style:text-properties fo:font-family="'Liberation Serif'"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3"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header-footer-properties fo:min-height="0.3882in" fo:margin-left="0in" fo:margin-right="0in" fo:margin-bottom="0.3484in" style:dynamic-spacing="tru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esus Gonzalez-Barahona</meta:initial-creator>
    <dc:creator>Jesus Gonzalez-Barahona</dc:creator>
    <meta:editing-cycles>29</meta:editing-cycles>
    <meta:creation-date>2022-04-19T10:12:00</meta:creation-date>
    <dc:date>2022-06-08T20:26:18.626704793</dc:date>
    <dc:language>es-ES</dc:language>
    <meta:editing-duration>PT7H4M14S</meta:editing-duration>
    <meta:generator>LibreOffice/7.3.4.1$Linux_X86_64 LibreOffice_project/30$Build-1</meta:generator>
    <meta:document-statistic meta:table-count="6" meta:image-count="2" meta:object-count="0" meta:page-count="11" meta:paragraph-count="193" meta:word-count="5266" meta:character-count="34339" meta:non-whitespace-character-count="29264"/>
    <meta:user-defined meta:name="AppVersion">16.0000</meta:user-defined>
    <meta:user-defined meta:name="Company">Universidad Rey Juan Carllos</meta:user-defined>
    <meta:user-defined meta:name="ContentTypeId">0x010100615B3FE6BEC05A42851C2D24585DC6FE</meta:user-defined>
    <meta:template xlink:type="simple" xlink:actuate="onRequest" xlink:title="Normal.dotm" xlink:href=""/>
  </office:meta>
</office:document-meta>
</file>