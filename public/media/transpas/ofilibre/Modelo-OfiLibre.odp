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EC0000025EAD151A53.png" manifest:media-type="image/png"/>
  <manifest:file-entry manifest:full-path="Pictures/100000000000014A0000014A4CEF0255.png" manifest:media-type="image/png"/>
  <manifest:file-entry manifest:full-path="Pictures/100000010000014000000071C893EDEA.png" manifest:media-type="image/png"/>
  <manifest:file-entry manifest:full-path="Pictures/1000000100000333000000C8C39BB24A.png" manifest:media-type="image/png"/>
  <manifest:file-entry manifest:full-path="Pictures/1000000100000224000000D0F767D6AC.png" manifest:media-type="image/png"/>
  <manifest:file-entry manifest:full-path="Pictures/10006070000038A6000015883DB32451.emf" manifest:media-type="image/x-emf"/>
  <manifest:file-entry manifest:full-path="Pictures/100000000000078000000387F062883B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KaitiM GB" svg:font-family="'AR PL KaitiM GB'" style:font-family-generic="system" style:font-pitch="variable"/>
    <style:font-face style:name="Arial" svg:font-family="Arial"/>
    <style:font-face style:name="Arial Black" svg:font-family="'Arial Black'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libri (Body)" svg:font-family="'Calibri (Body)'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ill Sans" svg:font-family="'Gill Sans'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ＭＳ Ｐゴシック" svg:font-family="'ＭＳ Ｐゴシック'" style:font-family-generic="swiss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 style:writing-mode="lr-tb" loext:decorative="false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033cm" fo:padding-top="0.127cm" fo:padding-bottom="0.127cm" fo:padding-left="0.254cm" fo:padding-right="0.254cm" fo:wrap-option="wrap" loext:decorative="false"/>
      <style:paragraph-properties style:writing-mode="lr-tb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gr6" style:family="graphic" style:parent-style-name="Graphics">
      <style:graphic-properties draw:stroke="none" draw:fill="none" fo:clip="rect(0cm, 0cm, 0cm, 0cm)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>
      <style:graphic-properties style:protect="size" loext:decorative="false"/>
    </style:style>
    <style:style style:name="gr9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9.198cm" loext:decorative="false"/>
      <style:paragraph-properties style:writing-mode="lr-tb"/>
    </style:style>
    <style:style style:name="gr12" style:family="graphic" style:parent-style-name="standard" style:list-style-name="L3">
      <style:graphic-properties svg:stroke-color="#ffffff" draw:fill="solid" draw:fill-color="#ffffff" fo:min-height="12.661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001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2.152cm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11.033cm" fo:min-width="11.633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 loext:decorative="false"/>
      <style:paragraph-properties style:writing-mode="lr-tb"/>
    </style:style>
    <style:style style:name="pr1" style:family="presentation" style:parent-style-name="Master1-Layout2-obj-Título-y-objetos_5f__5f_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5" style:family="presentation" style:parent-style-name="Default2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2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2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  <style:text-properties fo:language="es" fo:country="ES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style:font-name="Liberation Sans" fo:font-size="14pt" fo:language="es" fo:country="ES" fo:font-weight="bold" style:font-size-asian="16pt" style:font-weight-asian="bold" style:font-size-complex="16pt" style:font-weight-complex="bold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loext:tab-stop-distance="0cm" style:writing-mode="lr-tb">
        <style:tab-stops/>
      </style:paragraph-properties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loext:tab-stop-distance="0cm" style:font-independent-line-spacing="true">
        <style:tab-stops/>
      </style:paragraph-properties>
      <style:text-properties style:font-name="Liberation Sans" fo:font-size="16pt" fo:language="es" fo:country="ES" fo:font-weight="bold" style:font-size-asian="16pt" style:font-weight-asian="bold" style:font-size-complex="16pt" style:font-weight-complex="bold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loext:tab-stop-distance="0cm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loext:tab-stop-distance="0cm" style:font-independent-line-spacing="true">
        <style:tab-stops/>
      </style:paragraph-properties>
      <style:text-properties fo:font-size="18pt" fo:language="es" fo:country="ES"/>
    </style:style>
    <style:style style:name="P8" style:family="paragraph">
      <style:paragraph-properties fo:margin-left="0cm" fo:margin-right="0cm" fo:margin-top="0cm" fo:margin-bottom="0.334cm" fo:line-height="0.567cm" fo:text-align="start" fo:text-indent="0cm" style:text-autospace="ideograph-alpha" style:punctuation-wrap="hanging" loext:tab-stop-distance="0cm" style:writing-mode="lr-tb">
        <style:tab-stops/>
      </style:paragraph-properties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0.567cm" fo:text-align="start" fo:text-indent="0cm" style:text-autospace="ideograph-alpha" style:punctuation-wrap="hanging" loext:tab-stop-distance="0c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s" fo:country="ES" fo:font-style="normal" fo:text-shadow="none" style:text-underline-style="none" fo:font-weight="bold" style:letter-kerning="true" style:font-name-asian="AR PL KaitiM GB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none"/>
      <style:text-properties fo:language="es" fo:country="ES"/>
    </style:style>
    <style:style style:name="P11" style:family="paragraph">
      <loext:graphic-properties draw:fill="none"/>
      <style:paragraph-properties fo:text-align="center"/>
      <style:text-properties fo:language="es" fo:country="ES"/>
    </style:style>
    <style:style style:name="P12" style:family="paragraph">
      <loext:graphic-properties draw:fill-color="#ffffff"/>
      <style:text-properties fo:language="es" fo:country="ES"/>
    </style:style>
    <style:style style:name="P13" style:family="paragraph">
      <style:paragraph-properties style:writing-mode="lr-tb"/>
    </style:style>
    <style:style style:name="P14" style:family="paragraph">
      <loext:graphic-properties draw:fill="none"/>
      <style:paragraph-properties style:font-independent-line-spacing="true"/>
      <style:text-properties fo:language="es" fo:country="ES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fo:language="es" fo:country="ES"/>
    </style:style>
    <style:style style:name="P16" style:family="paragraph">
      <style:paragraph-properties fo:text-align="end"/>
    </style:style>
    <style:style style:name="P17" style:family="paragraph">
      <loext:graphic-properties draw:fill-color="#ffffff"/>
      <style:text-properties fo:font-size="20pt" fo:language="es" fo:country="ES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fo:font-size="18pt" fo:language="es" fo:country="ES"/>
    </style:style>
    <style:style style:name="P19" style:family="paragraph">
      <loext:graphic-properties draw:fill="none" draw:fill-color="#ffffff"/>
      <style:text-properties style:font-name="Liberation Sans" fo:font-size="22pt" fo:language="es" fo:country="ES" fo:font-weight="bold" style:font-size-asian="22pt" style:font-weight-asian="bold" style:font-size-complex="22pt" style:font-weight-complex="bold"/>
    </style:style>
    <style:style style:name="P20" style:family="paragraph">
      <style:paragraph-properties fo:margin-top="0.5cm" fo:margin-bottom="0cm"/>
    </style:style>
    <style:style style:name="P21" style:family="paragraph">
      <style:paragraph-properties fo:margin-top="0.5cm" fo:margin-bottom="0cm" fo:text-align="end"/>
    </style:style>
    <style:style style:name="P22" style:family="paragraph">
      <loext:graphic-properties draw:fill="none"/>
      <style:paragraph-properties fo:margin-top="0.5cm" fo:margin-bottom="0cm"/>
      <style:text-properties style:font-name="Liberation Sans" fo:font-size="32pt" fo:language="es" fo:country="ES" style:font-size-asian="32pt" style:font-size-complex="32pt"/>
    </style:style>
    <style:style style:name="P23" style:family="paragraph">
      <loext:graphic-properties draw:fill="none"/>
      <style:paragraph-properties fo:margin-left="0cm" fo:margin-right="0cm" fo:margin-top="0.508cm" fo:margin-bottom="0cm" fo:text-align="start" fo:text-indent="0cm" style:font-independent-line-spacing="true"/>
      <style:text-properties fo:language="es" fo:country="ES"/>
    </style:style>
    <style:style style:name="P24" style:family="paragraph">
      <loext:graphic-properties draw:fill="solid" draw:fill-color="#ffffff"/>
      <style:text-properties style:font-name="Liberation Sans" fo:font-size="32pt" fo:language="es" fo:country="ES" fo:font-weight="normal" style:font-size-asian="32pt" style:font-weight-asian="normal" style:font-size-complex="32pt" style:font-weight-complex="normal"/>
    </style:style>
    <style:style style:name="P25" style:family="paragraph">
      <style:paragraph-properties fo:margin-left="0cm" fo:margin-right="0cm" fo:margin-top="0cm" fo:margin-bottom="0cm" fo:line-height="100%" fo:text-align="justify" fo:text-indent="0cm" style:punctuation-wrap="hanging" loext:tab-stop-distance="0cm" style:writing-mode="lr-tb">
        <style:tab-stops/>
      </style:paragraph-properties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none"/>
      <style:paragraph-properties style:font-independent-line-spacing="true"/>
      <style:text-properties fo:language="es" fo:country="ES" fo:font-style="italic" style:font-style-asian="italic" style:font-style-complex="italic"/>
    </style:style>
    <style:style style:name="P28" style:family="paragraph">
      <style:paragraph-properties fo:text-align="end" style:writing-mode="lr-tb"/>
    </style:style>
    <style:style style:name="P29" style:family="paragraph">
      <style:paragraph-properties fo:text-align="center" style:writing-mode="lr-tb"/>
    </style:style>
    <style:style style:name="P30" style:family="paragraph">
      <style:paragraph-properties fo:margin-left="0cm" fo:margin-right="0cm" fo:margin-top="0.499cm" fo:margin-bottom="0cm" fo:text-indent="0cm" style:writing-mode="lr-tb"/>
    </style:style>
    <style:style style:name="P31" style:family="paragraph">
      <style:paragraph-properties fo:text-align="start" style:writing-mode="lr-tb"/>
    </style:style>
    <style:style style:name="P32" style:family="paragraph">
      <style:paragraph-properties fo:margin-left="0cm" fo:margin-right="0cm" fo:margin-top="0.5cm" fo:margin-bottom="0cm" fo:line-height="100%" fo:text-indent="0cm" style:writing-mode="lr-tb"/>
    </style:style>
    <style:style style:name="P33" style:family="paragraph">
      <loext:graphic-properties draw:fill="none" draw:fill-color="#ffffff"/>
      <style:paragraph-properties fo:margin-left="0cm" fo:margin-right="0cm" fo:margin-top="0.5cm" fo:margin-bottom="0cm" fo:line-height="100%" fo:text-indent="0cm"/>
      <style:text-properties fo:language="es" fo:country="ES"/>
    </style:style>
    <style:style style:name="P34" style:family="paragraph">
      <loext:graphic-properties draw:fill-color="#ffffff"/>
      <style:text-properties fo:font-size="26.3999996185303pt" fo:language="es" fo:country="ES"/>
    </style:style>
    <style:style style:name="P35" style:family="paragraph">
      <style:paragraph-properties fo:margin-left="0cm" fo:margin-right="0cm" fo:margin-top="0.499cm" fo:margin-bottom="0cm" fo:text-align="center" fo:text-indent="0cm" style:writing-mode="lr-tb"/>
    </style:style>
    <style:style style:name="P36" style:family="paragraph">
      <loext:graphic-properties draw:fill="none"/>
      <style:paragraph-properties fo:margin-left="0cm" fo:margin-right="0cm" fo:margin-top="0.499cm" fo:margin-bottom="0cm" fo:text-align="center" fo:text-indent="0cm" style:font-independent-line-spacing="true"/>
      <style:text-properties fo:language="es" fo:country="ES" fo:font-style="italic" style:font-style-asian="italic" style:font-style-complex="italic"/>
    </style:style>
    <style:style style:name="P37" style:family="paragraph">
      <style:paragraph-properties fo:text-align="center"/>
    </style:style>
    <style:style style:name="P38" style:family="paragraph">
      <loext:graphic-properties draw:fill="none"/>
      <style:paragraph-properties fo:text-align="end" style:font-independent-line-spacing="true"/>
      <style:text-properties fo:color="#000000" loext:opacity="100%" style:font-name="Liberation Sans" fo:font-size="26pt" fo:language="es" fo:country="ES" style:font-size-asian="26pt" style:font-size-complex="26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f2f2f2" loext:opacity="100%" style:text-line-through-style="none" style:text-line-through-type="none" style:text-position="0% 100%" style:font-name="Liberation Sans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name-complex="Gill Sans" style:font-size-complex="16pt" style:font-style-complex="normal" style:font-weight-complex="bold"/>
    </style:style>
    <style:style style:name="T3" style:family="text">
      <style:text-properties fo:font-variant="normal" fo:text-transform="none" fo:color="#d1282e" loext:opacity="100%" style:text-line-through-style="none" style:text-line-through-type="none" style:text-position="0% 100%" style:font-name="Gill Sans" fo:font-size="1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d0d0d" loext:opacity="100%" style:text-line-through-style="none" style:text-line-through-type="none" style:text-position="0% 100%" style:font-name="Liberation Sans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24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FreeSans1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116.199996948242pt" fo:language="es" fo:country="ES" style:font-size-asian="116.199996948242pt" style:font-size-complex="116.199996948242pt"/>
    </style:style>
    <style:style style:name="T7" style:family="text">
      <style:text-properties fo:font-size="40pt" fo:language="es" fo:country="ES" style:font-size-asian="40pt" style:font-size-complex="40pt"/>
    </style:style>
    <style:style style:name="T8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fo:language="es" fo:country="ES" fo:font-style="italic" style:font-style-asian="italic" style:font-style-complex="italic"/>
    </style:style>
    <style:style style:name="T10" style:family="text">
      <style:text-properties fo:language="es" fo:country="ES" fo:font-style="italic" fo:background-color="#fff200" style:font-style-asian="italic" style:font-style-complex="italic"/>
    </style:style>
    <style:style style:name="T11" style:family="text">
      <style:text-properties fo:font-size="28pt" fo:language="es" fo:country="ES" style:font-size-asian="28pt" style:font-size-complex="28pt"/>
    </style:style>
    <style:style style:name="T12" style:family="text">
      <style:text-properties fo:font-variant="normal" fo:text-transform="none" fo:color="#d1282e" loext:opacity="100%" style:text-line-through-style="none" style:text-line-through-type="none" style:text-position="0% 100%" style:font-name="Liberation Sans" fo:font-size="60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13" style:family="text">
      <style:text-properties fo:text-transform="uppercase" fo:color="#000000" loext:opacity="100%" style:text-line-through-style="none" style:text-line-through-type="none" style:text-position="0% 100%" style:font-name="Arial Black" fo:font-size="32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style:font-name="Liberation Sans" fo:font-size="22pt" fo:language="es" fo:country="ES" fo:font-weight="bold" style:font-size-asian="22pt" style:font-weight-asian="bold" style:font-size-complex="22pt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es" fo:country="ES" fo:font-style="italic" fo:text-shadow="none" style:text-underline-style="none" fo:font-weight="normal" style:letter-kerning="true" style:font-name-asian="AR PL KaitiM GB" style:font-size-asian="32pt" style:font-style-asian="italic" style:font-weight-asian="normal" style:font-name-complex="Free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language="es" fo:country="ES" fo:font-style="italic" fo:text-shadow="none" style:text-underline-style="none" fo:font-weight="normal" style:letter-kerning="true" style:font-name-asian="AR PL KaitiM GB" style:font-size-asian="28pt" style:font-style-asian="italic" style:font-weight-asian="normal" style:font-name-complex="FreeSan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d1282e" loext:opacity="100%" style:text-line-through-style="none" style:text-line-through-type="none" style:text-position="0% 100%" style:font-name="Liberation Sans" fo:font-size="36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18" style:family="text">
      <style:text-properties style:font-name="Liberation Sans" fo:font-size="32pt" fo:language="es" fo:country="ES" fo:font-weight="normal" style:font-size-asian="32pt" style:font-weight-asian="normal" style:font-size-complex="32pt" style:font-weight-complex="normal"/>
    </style:style>
    <style:style style:name="T19" style:family="text">
      <style:text-properties fo:color="#000000" loext:opacity="100%" style:text-line-through-style="none" style:text-line-through-type="none" style:text-position="0% 100%" style:font-name="Arial1" fo:font-size="3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36pt" style:font-style-asian="normal" style:font-weight-asian="normal" style:font-size-complex="36pt" style:font-style-complex="normal" style:font-weight-complex="normal"/>
    </style:style>
    <style:style style:name="T20" style:family="text">
      <style:text-properties fo:font-size="54pt" fo:language="es" fo:country="ES" style:font-size-asian="54pt" style:font-size-complex="54pt"/>
    </style:style>
    <style:style style:name="T21" style:family="text">
      <style:text-properties fo:font-variant="normal" fo:text-transform="none" fo:color="#d1282e" loext:opacity="100%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22" style:family="text">
      <style:text-properties fo:font-size="40pt" fo:language="es" fo:country="ES" fo:font-style="italic" style:font-size-asian="40pt" style:font-style-asian="italic" style:font-size-complex="40pt" style:font-style-complex="italic"/>
    </style:style>
    <style:style style:name="T23" style:family="text">
      <style:text-properties fo:font-size="48pt" fo:language="es" fo:country="ES" fo:font-style="italic" style:font-size-asian="48pt" style:font-style-asian="italic" style:font-size-complex="48pt" style:font-style-complex="italic"/>
    </style:style>
    <style:style style:name="T24" style:family="text">
      <style:text-properties fo:font-size="32pt" fo:language="es" fo:country="ES" fo:font-style="italic" style:font-size-asian="32pt" style:font-style-asian="italic" style:font-size-complex="32pt" style:font-style-complex="italic"/>
    </style:style>
    <style:style style:name="T25" style:family="text">
      <style:text-properties fo:font-size="28pt" fo:language="es" fo:country="ES" fo:font-style="italic" style:font-size-asian="28pt" style:font-style-asian="italic" style:font-size-complex="28pt" style:font-style-complex="italic"/>
    </style:style>
    <style:style style:name="T26" style:family="text">
      <style:text-properties fo:font-size="60pt" fo:language="es" fo:country="ES" fo:font-style="italic" style:font-size-asian="60pt" style:font-style-asian="italic" style:font-size-complex="60pt" style:font-style-complex="italic"/>
    </style:style>
    <style:style style:name="T27" style:family="text">
      <style:text-properties fo:font-size="40pt" fo:language="es" fo:country="ES" fo:font-style="normal" style:font-size-asian="40pt" style:font-style-asian="normal" style:font-size-complex="40pt" style:font-style-complex="normal"/>
    </style:style>
    <style:style style:name="T28" style:family="text">
      <style:text-properties fo:font-size="24pt" fo:language="es" fo:country="ES" fo:font-style="normal" style:font-size-asian="24pt" style:font-style-asian="normal" style:font-size-complex="24pt" style:font-style-complex="normal"/>
    </style:style>
    <style:style style:name="T29" style:family="text">
      <style:text-properties fo:font-variant="normal" fo:text-transform="none" fo:color="#d1282e" loext:opacity="100%" style:text-line-through-style="none" style:text-line-through-type="none" style:text-position="0% 100%" style:font-name="Arial Black" fo:font-size="48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48pt" style:font-style-asian="normal" style:font-weight-asian="bold" style:font-size-complex="48pt" style:font-style-complex="normal" style:font-weight-complex="bold"/>
    </style:style>
    <style:style style:name="T30" style:family="text">
      <style:text-properties fo:font-variant="normal" fo:text-transform="none" fo:color="#d1282e" loext:opacity="100%" style:text-line-through-style="none" style:text-line-through-type="none" style:text-position="0% 100%" style:font-name="Arial Black" fo:font-size="44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31" style:family="text">
      <style:text-properties fo:font-size="18pt" fo:language="es" fo:country="ES" fo:font-style="normal" style:font-size-asian="18pt" style:font-style-asian="normal" style:font-size-complex="18pt" style:font-style-complex="normal"/>
    </style:style>
    <style:style style:name="T32" style:family="text">
      <style:text-properties fo:font-size="36pt" fo:language="es" fo:country="ES" fo:font-style="italic" style:font-size-asian="36pt" style:font-style-asian="italic" style:font-size-complex="36pt" style:font-style-complex="italic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6pt" fo:language="es" fo:country="ES" fo:font-style="italic" fo:text-shadow="none" style:text-underline-style="none" fo:font-weight="normal" style:letter-kerning="true" style:font-name-asian="AR PL KaitiM GB" style:font-size-asian="36pt" style:font-style-asian="italic" style:font-weight-asian="normal" style:font-name-complex="Free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d1282e" loext:opacity="100%" style:text-line-through-style="none" style:text-line-through-type="none" style:text-position="0% 100%" style:font-name="Arial Black" fo:font-size="40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T35" style:family="text">
      <style:text-properties fo:font-size="96pt" fo:language="es" fo:country="ES" fo:font-style="italic" style:font-size-asian="96pt" style:font-style-asian="italic" style:font-size-complex="96pt" style:font-style-complex="italic"/>
    </style:style>
    <style:style style:name="T36" style:family="text">
      <style:text-properties fo:font-size="24pt" style:font-size-asian="24pt" style:font-size-complex="24pt"/>
    </style:style>
    <style:style style:name="T37" style:family="text">
      <style:text-properties fo:color="#000000" loext:opacity="100%" style:font-name="Liberation Sans" fo:font-size="26pt" fo:language="es" fo:country="ES" style:font-size-asian="26pt" style:font-size-complex="26pt"/>
    </style:style>
    <style:style style:name="T38" style:family="text">
      <style:text-properties fo:color="#000000" loext:opacity="100%" style:font-name="Liberation Sans" fo:font-size="24pt" fo:language="es" fo:country="ES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ítulo-y-objetos_5f__5f_" presentation:presentation-page-layout-name="AL1T18">
        <draw:custom-shape draw:name="Rectángulo 17_0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_1" draw:style-name="gr2" draw:text-style-name="P3" draw:layer="layout" svg:width="10.504cm" svg:height="3.287cm" svg:x="13.97cm" svg:y="14.732cm">
          <draw:text-box>
            <text:p text:style-name="P2"><text:span text:style-name="T1">Oficina de Conocimiento y Cultura Libres</text:span></text:p>
            <text:p text:style-name="P2"><text:span text:style-name="T1">Despacho 011 – Rectorado (Móstoles)</text:span></text:p>
            <text:p text:style-name="P2"><text:span text:style-name="T1"><text:a xlink:href="https://ofilibre.urjc.es/" xlink:type="simple">https://ofilibre.urjc.es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</text:span></text:p>
          </draw:text-box>
        </draw:frame>
        <draw:frame draw:name="Subtítulo 2_2" draw:style-name="gr3" draw:text-style-name="P5" draw:layer="layout" svg:width="10.163cm" svg:height="2.982cm" svg:x="2.726cm" svg:y="11.242cm">
          <draw:text-box>
            <text:p text:style-name="P4"><text:span text:style-name="T2">Jesús M. González Barahona</text:span></text:p>
            <text:p text:style-name="P4"><text:span text:style-name="T2">Florencia Claes</text:span></text:p>
            <text:p text:style-name="P4"><text:span text:style-name="T2">Tomás Zarza</text:span></text:p>
          </draw:text-box>
        </draw:frame>
        <draw:frame draw:name="Título 1_1" draw:style-name="gr4" draw:text-style-name="P7" draw:layer="layout" svg:width="20.858cm" svg:height="4.572cm" svg:x="2.51cm" svg:y="3.302cm">
          <draw:text-box>
            <text:p text:style-name="P6"><text:span text:style-name="T3"><text:line-break/></text:span><text:span text:style-name="T4">La OfiLibre de la URJC:</text:span></text:p>
            <text:p text:style-name="P6"><text:span text:style-name="T4">un modelo para fomentar</text:span></text:p>
            <text:p text:style-name="P6"><text:span text:style-name="T4">ciencia abierta y cultura libre</text:span></text:p>
          </draw:text-box>
        </draw:frame>
        <draw:frame draw:name="Subtítulo 2_3" draw:style-name="gr5" draw:text-style-name="P9" draw:layer="layout" svg:width="18.081cm" svg:height="2.794cm" svg:x="2.747cm" svg:y="8.128cm">
          <draw:text-box>
            <text:p text:style-name="P8"><text:span text:style-name="T5">Jornada de Recursos Educativos Abiertos:</text:span></text:p>
            <text:p text:style-name="P8"><text:span text:style-name="T5">Innovación y colaboración</text:span></text:p>
            <text:p text:style-name="P8"><text:span text:style-name="T5">Barcelona, 22 de enero de 2026</text:span></text:p>
          </draw:text-box>
        </draw:frame>
        <draw:frame draw:name="Imagen 1_1" draw:style-name="gr6" draw:text-style-name="P10" draw:layer="layout" svg:width="5.009cm" svg:height="1.914cm" svg:x="3.06cm" svg:y="16.084cm">
          <draw:image xlink:href="Pictures/10006070000038A6000015883DB32451.emf" xlink:type="simple" xlink:show="embed" xlink:actuate="onLoad" draw:mime-type="image/x-emf">
            <text:p/>
          </draw:image>
          <draw:image xlink:href="Pictures/1000000100000224000000D0F767D6AC.png" xlink:type="simple" xlink:show="embed" xlink:actuate="onLoad" draw:mime-type="image/png"/>
          <svg:desc>logoURJC.eps</svg:desc>
        </draw:frame>
        <draw:frame draw:style-name="gr7" draw:text-style-name="P11" draw:layer="layout" svg:width="5.14cm" svg:height="1.814cm" svg:x="19.304cm" svg:y="16.728cm">
          <draw:image xlink:href="Pictures/100000010000014000000071C893EDEA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0.001cm" svg:height="0.001cm" svg:x="0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8">
        <draw:frame draw:name="Marcador de contenido 4" presentation:style-name="pr2" draw:text-style-name="P14" draw:layer="layout" svg:width="23.042cm" svg:height="9.53cm" svg:x="1.342cm" svg:y="4.948cm" presentation:class="outline" presentation:user-transformed="true">
          <draw:text-box>
            <text:list text:style-name="L3">
              <text:list-header>
                <text:p text:style-name="P13"><text:span text:style-name="T6">Acceso Abierto</text:span></text:p>
                <text:p text:style-name="P13"><text:span text:style-name="T7">¿Qué es la publicación en acceso abierto?</text:span></text:p>
              </text:list-header>
            </text:list>
          </draw:text-box>
        </draw:frame>
        <draw:frame draw:name="Título 6" presentation:style-name="pr3" draw:text-style-name="P15" draw:layer="layout" svg:width="22.859cm" svg:height="2.656cm" svg:x="1.27cm" svg:y="0.254cm" presentation:class="title">
          <draw:text-box>
            <text:p text:style-name="P2"><text:span text:style-name="T8"><text:s/></text:span></text:p>
          </draw:text-box>
        </draw:frame>
        <draw:frame draw:name="Título 7" draw:style-name="gr9" draw:text-style-name="P15" draw:layer="layout" svg:width="22.437cm" svg:height="2.487cm" svg:x="0cm" svg:y="0.423cm">
          <draw:text-box>
            <text:p text:style-name="P2"><text:span text:style-name="T8"><text:tab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8">
        <draw:frame draw:name="Marcador de contenido 3" presentation:style-name="pr2" draw:text-style-name="P14" draw:layer="layout" svg:width="24.336cm" svg:height="15.284cm" svg:x="0.556cm" svg:y="0.718cm" presentation:class="outline" presentation:user-transformed="true">
          <draw:text-box>
            <text:p><text:span text:style-name="T9">Qualquier omen, que lo oya, si bien trovar sopiere,</text:span></text:p>
            <text:p><text:span text:style-name="T9">puede </text:span><text:span text:style-name="T10">más y añadir et emendar</text:span><text:span text:style-name="T9"> si quisiere,</text:span></text:p>
            <text:p><text:span text:style-name="T10">ande de mano en mano</text:span><text:span text:style-name="T9"> a quienquier quel' pidiere,</text:span></text:p>
            <text:p><text:span text:style-name="T9">como pella a las dueñas </text:span><text:span text:style-name="T10">tómelo quien podiere</text:span><text:span text:style-name="T9">.</text:span></text:p>
            <text:p><text:span text:style-name="T9">Pues es de buen amor, emprestadlo de grado,</text:span></text:p>
            <text:p><text:span text:style-name="T9">non desmintades su nombre, nin dedes refertado,</text:span></text:p>
            <text:p><text:span text:style-name="T9">non le dedes por dineros vendido nin alquilado,</text:span></text:p>
            <text:p><text:span text:style-name="T9">ca non ha grado, nin graçias, nin buen amor complado.</text:span></text:p>
            <text:p text:style-name="P16"><text:span text:style-name="T11">Juan Ruiz, Arcipreste de Hita.</text:span></text:p>
            <text:p text:style-name="P16"><text:span text:style-name="T11"><text:a xlink:href="http://www.cervantesvirtual.com/obra-visor/el-libro-de-buen-amor--0/html/" xlink:type="simple">Libro de Buen Amor</text:a></text:span><text:span text:style-name="T11">, siglo XIV</text:span></text:p>
          </draw:text-box>
        </draw:frame>
        <draw:frame draw:name="Título 4" presentation:style-name="pr3" draw:text-style-name="P15" draw:layer="layout" svg:width="22.859cm" svg:height="2.656cm" svg:x="1.27cm" svg:y="0.254cm" presentation:class="title">
          <draw:text-box>
            <text:p text:style-name="P2"><text:span text:style-name="T8">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8">
        <draw:frame draw:name="Título 23" presentation:style-name="pr3" draw:text-style-name="P15" draw:layer="layout" svg:width="22.859cm" svg:height="2.656cm" svg:x="1.27cm" svg:y="0.254cm" presentation:class="title">
          <draw:text-box>
            <text:p text:style-name="P2"><text:span text:style-name="T8"><text:s/></text:span></text:p>
          </draw:text-box>
        </draw:frame>
        <draw:frame draw:name="Título 8" draw:style-name="gr9" draw:text-style-name="P18" draw:layer="layout" svg:width="22.437cm" svg:height="2.487cm" svg:x="0cm" svg:y="0.423cm">
          <draw:text-box>
            <text:p text:style-name="P2"><text:span text:style-name="T8"><text:tab/></text:span><text:span text:style-name="T12">Berlin Declaration on Open Access</text:span><text:span text:style-name="T8"> <text:s/></text:span><text:span text:style-name="T13"><text:s/></text:span></text:p>
          </draw:text-box>
        </draw:frame>
        <draw:frame draw:style-name="gr10" draw:text-style-name="P19" draw:layer="layout" svg:width="17.526cm" svg:height="1.145cm" svg:x="6.858cm" svg:y="15.111cm">
          <draw:text-box>
            <text:p><text:span text:style-name="T14"><text:a xlink:href="https://openaccess.mpg.de/Berlin-Declaration" xlink:type="simple">https://openaccess.mpg.de/Berlin-Declaration</text:a></text:span></text:p>
          </draw:text-box>
        </draw:frame>
        <draw:frame draw:style-name="gr11" draw:text-style-name="P22" draw:layer="layout" svg:width="23.622cm" svg:height="9.448cm" svg:x="0.512cm" svg:y="4.525cm">
          <draw:text-box>
            <text:p text:style-name="P20"><text:span text:style-name="T15">“El (los) autor(es) [...] deben garantizar el derecho gratuito, irrevocable y mundial de acceder al <text:s/>trabajo, y licencia para copiarlo, usarlo, distribuirlo, transmitirlo y exhibirlo públicamente, y para hacer y distribuir trabajos derivados […]''</text:span></text:p>
            <text:p text:style-name="P21"><text:span text:style-name="T16">22 de octubre de 2003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8">
        <draw:frame draw:name="Marcador de contenido 11" presentation:style-name="pr2" draw:text-style-name="P23" draw:layer="layout" svg:width="22.304cm" svg:height="10.486cm" svg:x="1.596cm" svg:y="4.948cm" presentation:class="outline" presentation:user-transformed="true">
          <draw:text-box>
            <text:p/>
          </draw:text-box>
        </draw:frame>
        <draw:frame draw:name="Título 9" presentation:style-name="pr3" draw:text-style-name="P15" draw:layer="layout" svg:width="22.859cm" svg:height="2.656cm" svg:x="1.27cm" svg:y="0.254cm" presentation:class="title">
          <draw:text-box>
            <text:p text:style-name="P2"><text:span text:style-name="T8"><text:s/></text:span></text:p>
          </draw:text-box>
        </draw:frame>
        <draw:frame draw:name="Título 10" draw:style-name="gr9" draw:text-style-name="P18" draw:layer="layout" svg:width="22.437cm" svg:height="2.487cm" svg:x="0cm" svg:y="0.423cm">
          <draw:text-box>
            <text:p text:style-name="P2"><text:span text:style-name="T8"><text:tab/></text:span><text:span text:style-name="T17">Condiciones</text:span></text:p>
          </draw:text-box>
        </draw:frame>
        <draw:frame draw:style-name="gr12" draw:text-style-name="P24" draw:layer="layout" svg:width="20.6cm" svg:height="12.911cm" svg:x="1.752cm" svg:y="3.691cm">
          <draw:text-box>
            <text:list text:style-name="L3">
              <text:list-item>
                <text:p><text:span text:style-name="T18">Derecho de acceso (consulta)</text:span></text:p>
              </text:list-item>
              <text:list-item>
                <text:p><text:span text:style-name="T18">Derecho de copia</text:span></text:p>
              </text:list-item>
              <text:list-item>
                <text:p><text:span text:style-name="T18">Derecho de trabajos derivados</text:span></text:p>
              </text:list-item>
              <text:list-item>
                <text:p><text:span text:style-name="T18">Obra y materiales en formatos electrónicos “adecuados”</text:span></text:p>
              </text:list-item>
              <text:list-item>
                <text:p><text:span text:style-name="T18">Depósito de la obra y materiales complementarios en un archivo abierto</text:span></text:p>
              </text:list-item>
            </text:list>
            <text:p><text:span text:style-name="T18"/></text:p>
            <text:p><text:span text:style-name="T18">Todo con atribución de autoría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8">
        <draw:frame draw:name="Marcador de contenido 10" presentation:style-name="pr2" draw:text-style-name="P14" draw:layer="layout" svg:width="23.042cm" svg:height="9.53cm" svg:x="1.342cm" svg:y="4.948cm" presentation:class="outline" presentation:user-transformed="true">
          <draw:text-box>
            <text:list text:style-name="L3">
              <text:list-header>
                <text:p text:style-name="P13"><text:span text:style-name="T6">La OfiLibre</text:span></text:p>
                <text:p text:style-name="P13"><text:span text:style-name="T7">Oficina de Conocimiento y Cultura Libres de la URJC</text:span></text:p>
              </text:list-header>
            </text:list>
          </draw:text-box>
        </draw:frame>
        <draw:frame draw:name="Título 11" presentation:style-name="pr3" draw:text-style-name="P15" draw:layer="layout" svg:width="22.859cm" svg:height="2.656cm" svg:x="1.27cm" svg:y="0.254cm" presentation:class="title">
          <draw:text-box>
            <text:p text:style-name="P2"><text:span text:style-name="T8"><text:s/></text:span></text:p>
          </draw:text-box>
        </draw:frame>
        <draw:frame draw:name="Título 12" draw:style-name="gr9" draw:text-style-name="P15" draw:layer="layout" svg:width="22.437cm" svg:height="2.487cm" svg:x="0cm" svg:y="0.423cm">
          <draw:text-box>
            <text:p text:style-name="P2"><text:span text:style-name="T8"><text:tab/></text:span></text:p>
          </draw:text-box>
        </draw:frame>
        <draw:frame draw:style-name="gr13" draw:text-style-name="P26" draw:layer="layout" svg:width="12.501cm" svg:height="1.673cm" svg:x="11.43cm" svg:y="14.583cm">
          <draw:text-box>
            <text:p text:style-name="P25"><text:span text:style-name="T19"><text:a xlink:href="https://ofilibre.urjc.es/" xlink:type="simple">https://ofilibre.urjc.es/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8">
        <draw:frame draw:name="Marcador de contenido 5" presentation:style-name="pr2" draw:text-style-name="P14" draw:layer="layout" svg:width="22.304cm" svg:height="10.486cm" svg:x="1.596cm" svg:y="4.948cm" presentation:class="outline" presentation:user-transformed="true">
          <draw:text-box>
            <text:list text:style-name="L3">
              <text:list-item>
                <text:p text:style-name="P13"><text:span text:style-name="T20">Publicación abierta</text:span></text:p>
              </text:list-item>
              <text:list-item>
                <text:p text:style-name="P13"><text:span text:style-name="T20">Datos abiertos</text:span></text:p>
              </text:list-item>
              <text:list-item>
                <text:p text:style-name="P13"><text:span text:style-name="T20">Cultura libre</text:span></text:p>
              </text:list-item>
              <text:list-item>
                <text:p text:style-name="P13"><text:span text:style-name="T20">Software libre</text:span></text:p>
              </text:list-item>
            </text:list>
          </draw:text-box>
        </draw:frame>
        <draw:frame draw:name="Título 14" presentation:style-name="pr3" draw:text-style-name="P15" draw:layer="layout" svg:width="22.859cm" svg:height="2.656cm" svg:x="1.27cm" svg:y="0.254cm" presentation:class="title">
          <draw:text-box>
            <text:p text:style-name="P2"><text:span text:style-name="T8"><text:s/></text:span></text:p>
          </draw:text-box>
        </draw:frame>
        <draw:frame draw:name="Título 15" draw:style-name="gr9" draw:text-style-name="P15" draw:layer="layout" svg:width="22.437cm" svg:height="2.487cm" svg:x="0cm" svg:y="0.423cm">
          <draw:text-box>
            <text:p text:style-name="P2"><text:span text:style-name="T8"><text:tab/></text:span><text:span text:style-name="T17">Ámbitos de actuación</text:span><text:span text:style-name="T21">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7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8">
        <draw:frame draw:name="Marcador de contenido 7" presentation:style-name="pr2" draw:text-style-name="P27" draw:layer="layout" svg:width="24.13cm" svg:height="10.922cm" svg:x="0.254cm" svg:y="7.112cm" presentation:class="outline" presentation:user-transformed="true">
          <draw:text-box>
            <text:list text:style-name="L3">
              <text:list-header>
                <text:p text:style-name="P13"><text:span text:style-name="T22">Realizar tareas de información, promoción, coordinación y facilitación, en colaboración con todos los agentes de la </text:span><text:span text:style-name="T22">Universidad</text:span></text:p>
              </text:list-header>
            </text:list>
          </draw:text-box>
        </draw:frame>
        <draw:frame draw:name="Título 16" presentation:style-name="pr3" draw:text-style-name="P15" draw:layer="layout" svg:width="22.859cm" svg:height="2.656cm" svg:x="1.27cm" svg:y="0.254cm" presentation:class="title">
          <draw:text-box>
            <text:p text:style-name="P2"><text:span text:style-name="T8"><text:s/></text:span></text:p>
          </draw:text-box>
        </draw:frame>
        <draw:frame draw:name="Título 17" draw:style-name="gr9" draw:text-style-name="P15" draw:layer="layout" svg:width="22.437cm" svg:height="2.487cm" svg:x="0cm" svg:y="0.423cm">
          <draw:text-box>
            <text:p text:style-name="P2"><text:span text:style-name="T8"><text:tab/></text:span><text:span text:style-name="T17">Mandato</text:span><text:span text:style-name="T21">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8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8">
        <draw:frame draw:name="Marcador de contenido 8" presentation:style-name="pr2" draw:text-style-name="P27" draw:layer="layout" svg:width="21.59cm" svg:height="10.922cm" svg:x="2.286cm" svg:y="4.572cm" presentation:class="outline" presentation:user-transformed="true">
          <draw:text-box>
            <text:p text:style-name="P13"><text:span text:style-name="T22">Open Access: Definición de Berlín</text:span></text:p>
            <text:list text:style-name="L3">
              <text:list-item>
                <text:p text:style-name="P13"><text:span text:style-name="T22">resultados de investigación</text:span></text:p>
              </text:list-item>
              <text:list-item>
                <text:p text:style-name="P13"><text:span text:style-name="T22">materiales docentes</text:span></text:p>
              </text:list-item>
              <text:list-item>
                <text:p text:style-name="P13"><text:span text:style-name="T22">documentos de gestión</text:span></text:p>
              </text:list-item>
            </text:list>
            <text:p text:style-name="P13"><text:span text:style-name="T23">“Plantéate si podría ser abierto...”</text:span></text:p>
            <text:p text:style-name="P28"><text:span text:style-name="T24"><text:a xlink:href="https://openaccess.mpg.de/Berlin-Declaration" xlink:type="simple">https://openaccess.mpg.de/Berlin-Declaration</text:a></text:span></text:p>
            <text:list text:continue-numbering="true" text:style-name="L3">
              <text:list-header>
                <text:p text:style-name="P13"><text:span text:style-name="T22"/></text:p>
              </text:list-header>
            </text:list>
          </draw:text-box>
        </draw:frame>
        <draw:frame draw:name="Título 18" presentation:style-name="pr3" draw:text-style-name="P15" draw:layer="layout" svg:width="22.859cm" svg:height="2.656cm" svg:x="1.27cm" svg:y="0.254cm" presentation:class="title">
          <draw:text-box>
            <text:p text:style-name="P2"><text:span text:style-name="T8"><text:s/></text:span></text:p>
          </draw:text-box>
        </draw:frame>
        <draw:frame draw:name="Título 19" draw:style-name="gr9" draw:text-style-name="P15" draw:layer="layout" svg:width="22.437cm" svg:height="2.487cm" svg:x="0cm" svg:y="0.423cm">
          <draw:text-box>
            <text:p text:style-name="P2"><text:span text:style-name="T8"><text:tab/></text:span><text:span text:style-name="T17">Publicación abierta</text:span><text:span text:style-name="T21">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9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8">
        <draw:frame draw:name="Marcador de contenido 9" presentation:style-name="pr2" draw:text-style-name="P27" draw:layer="layout" svg:width="21.082cm" svg:height="11.684cm" svg:x="1.778cm" svg:y="4.572cm" presentation:class="outline" presentation:user-transformed="true">
          <draw:text-box>
            <text:p text:style-name="P13"><text:span text:style-name="T22">Definición según Open Data Handbook </text:span></text:p>
            <text:list text:style-name="L3">
              <text:list-item>
                <text:p text:style-name="P13"><text:span text:style-name="T22">Conocimiento y uso</text:span></text:p>
              </text:list-item>
              <text:list-item>
                <text:p text:style-name="P13"><text:span text:style-name="T22">Publicación</text:span></text:p>
              </text:list-item>
              <text:list-item>
                <text:p text:style-name="P13"><text:span text:style-name="T22">Apoyo a iniciativas</text:span></text:p>
              </text:list-item>
            </text:list>
            <text:p text:style-name="P13"><text:span text:style-name="T22">“Los datos abiertos son más útiles”</text:span></text:p>
            <text:p text:style-name="P28"><text:span text:style-name="T25"><text:a xlink:href="http://opendatahandbook.org/" xlink:type="simple">http://opendatahandbook.org/</text:a></text:span></text:p>
            <text:p text:style-name="P28"><text:span text:style-name="T25"/></text:p>
            <text:list text:continue-numbering="true" text:style-name="L3">
              <text:list-header>
                <text:p text:style-name="P28"><text:span text:style-name="T22"/></text:p>
              </text:list-header>
            </text:list>
          </draw:text-box>
        </draw:frame>
        <draw:frame draw:name="Título 20" presentation:style-name="pr3" draw:text-style-name="P15" draw:layer="layout" svg:width="22.859cm" svg:height="2.656cm" svg:x="1.27cm" svg:y="0.254cm" presentation:class="title">
          <draw:text-box>
            <text:p text:style-name="P2"><text:span text:style-name="T8"><text:s/></text:span></text:p>
          </draw:text-box>
        </draw:frame>
        <draw:frame draw:name="Título 21" draw:style-name="gr9" draw:text-style-name="P18" draw:layer="layout" svg:width="22.437cm" svg:height="2.487cm" svg:x="0cm" svg:y="0.423cm">
          <draw:text-box>
            <text:p text:style-name="P2"><text:span text:style-name="T8"><text:tab/></text:span><text:span text:style-name="T17">Datos abiertos</text:span><text:span text:style-name="T21">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0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8">
        <draw:frame draw:name="Marcador de contenido 12" presentation:style-name="pr2" draw:text-style-name="P27" draw:layer="layout" svg:width="20.939cm" svg:height="11.684cm" svg:x="3.048cm" svg:y="4.572cm" presentation:class="outline" presentation:user-transformed="true">
          <draw:text-box>
            <text:p text:style-name="P13"><text:span text:style-name="T22">Definición de “obras culturales libres”</text:span></text:p>
            <text:list text:style-name="L3">
              <text:list-item>
                <text:p text:style-name="P13"><text:span text:style-name="T22">Promoción y acercamiento</text:span></text:p>
              </text:list-item>
              <text:list-item>
                <text:p text:style-name="P13"><text:span text:style-name="T22">Fomento de la producción</text:span></text:p>
              </text:list-item>
              <text:list-item>
                <text:p text:style-name="P13"><text:span text:style-name="T22">Puesta en contacto de interesados</text:span></text:p>
              </text:list-item>
            </text:list>
            <text:p text:style-name="P13"><text:span text:style-name="T23">“La cultura libre es una opción”</text:span></text:p>
            <text:p text:style-name="P28"><text:span text:style-name="T25"><text:a xlink:href="https://freedomdefined.org/Definition/Es" xlink:type="simple">https://freedomdefined.org/Definition/Es</text:a></text:span></text:p>
            <text:p text:style-name="P28"><text:span text:style-name="T25"/></text:p>
            <text:list text:continue-numbering="true" text:style-name="L3">
              <text:list-header>
                <text:p text:style-name="P28"><text:span text:style-name="T22"/></text:p>
              </text:list-header>
            </text:list>
          </draw:text-box>
        </draw:frame>
        <draw:frame draw:name="Título 22" presentation:style-name="pr3" draw:text-style-name="P15" draw:layer="layout" svg:width="22.859cm" svg:height="2.656cm" svg:x="1.27cm" svg:y="0.254cm" presentation:class="title">
          <draw:text-box>
            <text:p text:style-name="P2"><text:span text:style-name="T8"><text:s/></text:span></text:p>
          </draw:text-box>
        </draw:frame>
        <draw:frame draw:name="Título 24" draw:style-name="gr9" draw:text-style-name="P15" draw:layer="layout" svg:width="22.437cm" svg:height="2.487cm" svg:x="0cm" svg:y="0.423cm">
          <draw:text-box>
            <text:p text:style-name="P2"><text:span text:style-name="T8"><text:tab/></text:span><text:span text:style-name="T17">Cultura libre</text:span><text:span text:style-name="T21">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1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8">
        <draw:frame draw:name="Marcador de contenido 13" presentation:style-name="pr2" draw:text-style-name="P27" draw:layer="layout" svg:width="18.542cm" svg:height="11.684cm" svg:x="3.048cm" svg:y="4.572cm" presentation:class="outline" presentation:user-transformed="true">
          <draw:text-box>
            <text:p text:style-name="P13"><text:span text:style-name="T22">Definiciones de OSI y FSF</text:span></text:p>
            <text:list text:style-name="L3">
              <text:list-item>
                <text:p text:style-name="P13"><text:span text:style-name="T22">Conocimiento de opciones</text:span></text:p>
              </text:list-item>
              <text:list-item>
                <text:p text:style-name="P13"><text:span text:style-name="T22">Apoyo a usuarios</text:span></text:p>
              </text:list-item>
              <text:list-item>
                <text:p text:style-name="P13"><text:span text:style-name="T22">Fomento de liberaciones</text:span></text:p>
              </text:list-item>
              <text:list-item>
                <text:p text:style-name="P13"><text:span text:style-name="T22">Explicación de implicaciones</text:span></text:p>
              </text:list-item>
            </text:list>
            <text:p text:style-name="P13"><text:span text:style-name="T23">“El software libre tiene ventajas”</text:span></text:p>
            <text:p text:style-name="P28"><text:span text:style-name="T25"><text:a xlink:href="https://www.gnu.org/philosophy/free-sw.es.html" xlink:type="simple">https://www.gnu.org/philosophy/free-sw.es.html</text:a></text:span></text:p>
            <text:p text:style-name="P28"><text:span text:style-name="T25"><text:a xlink:href="https://opensource.com/resources/what-open-source" xlink:type="simple">https://opensource.com/resources/what-open-source</text:a></text:span></text:p>
            <text:list text:continue-numbering="true" text:style-name="L3">
              <text:list-header>
                <text:p text:style-name="P28"><text:span text:style-name="T22"/></text:p>
              </text:list-header>
            </text:list>
          </draw:text-box>
        </draw:frame>
        <draw:frame draw:name="Título 25" presentation:style-name="pr3" draw:text-style-name="P15" draw:layer="layout" svg:width="22.859cm" svg:height="2.656cm" svg:x="1.27cm" svg:y="0.254cm" presentation:class="title">
          <draw:text-box>
            <text:p text:style-name="P2"><text:span text:style-name="T8"><text:s/></text:span></text:p>
          </draw:text-box>
        </draw:frame>
        <draw:frame draw:name="Título 26" draw:style-name="gr9" draw:text-style-name="P18" draw:layer="layout" svg:width="22.437cm" svg:height="2.487cm" svg:x="0cm" svg:y="0.423cm">
          <draw:text-box>
            <text:p text:style-name="P2"><text:span text:style-name="T8"><text:tab/></text:span><text:span text:style-name="T17">Software libre</text:span><text:span text:style-name="T21">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2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8">
        <draw:frame draw:name="Marcador de contenido 14" presentation:style-name="pr2" draw:text-style-name="P27" draw:layer="layout" svg:width="21.082cm" svg:height="11.684cm" svg:x="1.778cm" svg:y="4.572cm" presentation:class="outline" presentation:user-transformed="true">
          <draw:text-box>
            <text:list text:style-name="L3">
              <text:list-item>
                <text:p text:style-name="P13"><text:span text:style-name="T22">Identificación y apoyo a iniciativas</text:span></text:p>
              </text:list-item>
              <text:list-item>
                <text:p text:style-name="P13"><text:span text:style-name="T22">Estímulo de nuevas iniciativas</text:span></text:p>
              </text:list-item>
              <text:list-item>
                <text:p text:style-name="P13"><text:span text:style-name="T22">Colaboración con comunidades</text:span></text:p>
              </text:list-item>
              <text:list-item>
                <text:p text:style-name="P13"><text:span text:style-name="T22">Formación y asesoramiento</text:span></text:p>
              </text:list-item>
              <text:list-item>
                <text:p text:style-name="P13"><text:span text:style-name="T22">Actividades de promoción y acercamiento</text:span></text:p>
              </text:list-item>
            </text:list>
            <text:p text:style-name="P13"><text:span text:style-name="T22"/></text:p>
            <text:p text:style-name="P29"><text:span text:style-name="T26">“OfiLibre: un agente útil”</text:span></text:p>
            <text:p text:style-name="P28"><text:span text:style-name="T25"/></text:p>
            <text:list text:continue-numbering="true" text:style-name="L3">
              <text:list-header>
                <text:p text:style-name="P28"><text:span text:style-name="T22"/></text:p>
              </text:list-header>
            </text:list>
          </draw:text-box>
        </draw:frame>
        <draw:frame draw:name="Título 27" presentation:style-name="pr3" draw:text-style-name="P15" draw:layer="layout" svg:width="22.859cm" svg:height="2.656cm" svg:x="1.27cm" svg:y="0.254cm" presentation:class="title">
          <draw:text-box>
            <text:p text:style-name="P2"><text:span text:style-name="T8"><text:s/></text:span></text:p>
          </draw:text-box>
        </draw:frame>
        <draw:frame draw:name="Título 28" draw:style-name="gr9" draw:text-style-name="P15" draw:layer="layout" svg:width="22.437cm" svg:height="2.487cm" svg:x="0cm" svg:y="0.423cm">
          <draw:text-box>
            <text:p text:style-name="P2"><text:span text:style-name="T8"><text:tab/></text:span><text:span text:style-name="T17">En todos los ámbitos</text:span><text:span text:style-name="T21">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3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8">
        <draw:frame draw:name="Marcador de contenido 15" presentation:style-name="pr2" draw:text-style-name="P27" draw:layer="layout" svg:width="21.082cm" svg:height="11.684cm" svg:x="1.778cm" svg:y="4.572cm" presentation:class="outline" presentation:user-transformed="true">
          <draw:text-box>
            <text:list text:style-name="L3">
              <text:list-item>
                <text:p text:style-name="P30"><text:span text:style-name="T27">Convocatoria de Asignaturas en Abierto</text:span></text:p>
              </text:list-item>
              <text:list-item>
                <text:p text:style-name="P30"><text:span text:style-name="T27">Jornadas de Cultura Libre</text:span></text:p>
              </text:list-item>
              <text:list-item>
                <text:p text:style-name="P30"><text:span text:style-name="T27">Café con OfiLibre</text:span></text:p>
              </text:list-item>
              <text:list-item>
                <text:p text:style-name="P30"><text:span text:style-name="T27">Apoyo a Editorial Academia Abierta</text:span></text:p>
                <text:list>
                  <text:list-item>
                    <text:p text:style-name="P13"><text:span text:style-name="T27">Monografías en acceso abierto</text:span></text:p>
                  </text:list-item>
                  <text:list-item>
                    <text:p text:style-name="P13"><text:span text:style-name="T27">Revistas en acceso abierto</text:span></text:p>
                  </text:list-item>
                </text:list>
              </text:list-item>
              <text:list-item>
                <text:p text:style-name="P13"><text:span text:style-name="T27">Apoyo a publicación de TFGs, TFMs y tesis en acceso abierto</text:span></text:p>
              </text:list-item>
              <text:list-item>
                <text:p text:style-name="P13"><text:span text:style-name="T27">Programa de formación para PDI, PTGAS y alumnado</text:span></text:p>
                <text:p text:style-name="P13"><text:span text:style-name="T27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3"><text:span text:style-name="T2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8"><text:span text:style-name="T25"/></text:p>
            <text:list text:continue-numbering="true" text:style-name="L3">
              <text:list-header>
                <text:p text:style-name="P28"><text:span text:style-name="T22"/></text:p>
              </text:list-header>
            </text:list>
          </draw:text-box>
        </draw:frame>
        <draw:frame draw:name="Título 29" presentation:style-name="pr3" draw:text-style-name="P15" draw:layer="layout" svg:width="22.859cm" svg:height="2.656cm" svg:x="1.27cm" svg:y="0.254cm" presentation:class="title">
          <draw:text-box>
            <text:p text:style-name="P2"><text:span text:style-name="T8"><text:s/></text:span></text:p>
          </draw:text-box>
        </draw:frame>
        <draw:frame draw:name="Título 30" draw:style-name="gr9" draw:text-style-name="P15" draw:layer="layout" svg:width="22.437cm" svg:height="2.487cm" svg:x="0cm" svg:y="0.423cm">
          <draw:text-box>
            <text:p text:style-name="P2"><text:span text:style-name="T8"><text:tab/></text:span><text:span text:style-name="T17">Principales acciones en marcha</text:span><text:span text:style-name="T21">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4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8">
        <draw:frame draw:name="Marcador de contenido 16" presentation:style-name="pr2" draw:text-style-name="P27" draw:layer="layout" svg:width="25.146cm" svg:height="11.684cm" svg:x="0.254cm" svg:y="4.572cm" presentation:class="outline" presentation:user-transformed="true">
          <draw:text-box>
            <text:list text:style-name="L3">
              <text:list-item>
                <text:p text:style-name="P30"><text:span text:style-name="T27">Curso 2025-2026: cuarta convocatoria</text:span></text:p>
              </text:list-item>
              <text:list-item>
                <text:p text:style-name="P13"><text:span text:style-name="T27">Incentivos para docentes autores</text:span></text:p>
              </text:list-item>
              <text:list-item>
                <text:p text:style-name="P13"><text:span text:style-name="T27">Materiales en abierto en repositorios</text:span></text:p>
              </text:list-item>
              <text:list-item>
                <text:p text:style-name="P13"><text:span text:style-name="T27">Asignaturas en abierto en aula virtual</text:span></text:p>
              </text:list-item>
            </text:list>
            <text:p text:style-name="P13"><text:span text:style-name="T28"><text:a xlink:href="https://online.urjc.es/es/para-futuros-estudiantes/asignaturas-en-abierto" xlink:type="simple">https://online.urjc.es/es/para-futuros-estudiantes/asignaturas-en-abierto</text:a></text:span></text:p>
            <text:p text:style-name="P13"><text:span text:style-name="T28"><text:a xlink:href="https://ofilibre.urjc.es/guias/convocatoria-asignaturas-abierto/" xlink:type="simple">https://ofilibre.urjc.es/guias/convocatoria-asignaturas-abierto/</text:a></text:span></text:p>
            <text:p text:style-name="P13"><text:span text:style-name="T28"/></text:p>
            <text:p text:style-name="P13"><text:span text:style-name="T28"/></text:p>
            <text:list text:continue-numbering="true" text:style-name="L3">
              <text:list-header>
                <text:p text:style-name="P13"><text:span text:style-name="T27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3"><text:span text:style-name="T2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p text:style-name="P28"><text:span text:style-name="T25"/></text:p>
            <text:list text:continue-numbering="true" text:style-name="L3">
              <text:list-header>
                <text:p text:style-name="P28"><text:span text:style-name="T22"/></text:p>
              </text:list-header>
            </text:list>
          </draw:text-box>
        </draw:frame>
        <draw:frame draw:name="Título 31" presentation:style-name="pr3" draw:text-style-name="P15" draw:layer="layout" svg:width="22.859cm" svg:height="2.656cm" svg:x="1.27cm" svg:y="0.254cm" presentation:class="title">
          <draw:text-box>
            <text:p text:style-name="P2"><text:span text:style-name="T8"><text:s/></text:span></text:p>
          </draw:text-box>
        </draw:frame>
        <draw:frame draw:name="Título 32" draw:style-name="gr9" draw:text-style-name="P15" draw:layer="layout" svg:width="24.129cm" svg:height="2.487cm" svg:x="0cm" svg:y="0.423cm">
          <draw:text-box>
            <text:p text:style-name="P2"><text:span text:style-name="T8"><text:tab/></text:span><text:span text:style-name="T29">Convocatoria de Asignaturas en Abierto </text:span><text:span text:style-name="T30">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5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8">
        <draw:frame draw:name="Marcador de contenido 17" presentation:style-name="pr2" draw:text-style-name="P27" draw:layer="layout" svg:width="22.098cm" svg:height="11.684cm" svg:x="1.778cm" svg:y="4.572cm" presentation:class="outline" presentation:user-transformed="true">
          <draw:text-box>
            <text:list text:style-name="L3">
              <text:list-item>
                <text:p text:style-name="P13"><text:span text:style-name="T27">Revistas de investigación, docencia, etc.</text:span></text:p>
              </text:list-item>
              <text:list-item>
                <text:p text:style-name="P13"><text:span text:style-name="T27">Plataforma de revistas digitales de la URJC (basada en OJS)</text:span></text:p>
              </text:list-item>
              <text:list-item>
                <text:p text:style-name="P13"><text:span text:style-name="T27">Varios tipos de ayuda en el proceso editorial</text:span></text:p>
              </text:list-item>
            </text:list>
            <text:p text:style-name="P28"><text:span text:style-name="T27"><text:a xlink:href="https://revistas.urjc.es/" xlink:type="simple">https://revistas.urjc.es/</text:a></text:span></text:p>
          </draw:text-box>
        </draw:frame>
        <draw:frame draw:name="Título 33" presentation:style-name="pr3" draw:text-style-name="P15" draw:layer="layout" svg:width="22.859cm" svg:height="2.656cm" svg:x="1.27cm" svg:y="0.254cm" presentation:class="title">
          <draw:text-box>
            <text:p text:style-name="P2"><text:span text:style-name="T8"><text:s/></text:span></text:p>
          </draw:text-box>
        </draw:frame>
        <draw:frame draw:name="Título 34" draw:style-name="gr9" draw:text-style-name="P15" draw:layer="layout" svg:width="24.129cm" svg:height="2.487cm" svg:x="0cm" svg:y="0.423cm">
          <draw:text-box>
            <text:p text:style-name="P2"><text:span text:style-name="T8"><text:tab/></text:span><text:span text:style-name="T29">Revistas en Abierto </text:span><text:span text:style-name="T30">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6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8">
        <draw:frame draw:name="Marcador de contenido 18" presentation:style-name="pr2" draw:text-style-name="P27" draw:layer="layout" svg:width="23.876cm" svg:height="11.176cm" svg:x="0.762cm" svg:y="4.572cm" presentation:class="outline" presentation:user-transformed="true">
          <draw:text-box>
            <text:list text:style-name="L3">
              <text:list-item>
                <text:p text:style-name="P31"><text:span text:style-name="T27">Monografías y colecciones de monografías</text:span></text:p>
              </text:list-item>
              <text:list-item>
                <text:p text:style-name="P31"><text:span text:style-name="T27">Plataforma de monografías de la URJC (basada en OMP)</text:span></text:p>
              </text:list-item>
              <text:list-item>
                <text:p text:style-name="P31"><text:span text:style-name="T27">Tipos: docentes, de investigación, institucionales…</text:span></text:p>
              </text:list-item>
            </text:list>
            <text:p text:style-name="P28"><text:span text:style-name="T27"><text:a xlink:href="http://monografias.urjc.es/" xlink:type="simple">http://monografias.urjc.es</text:a></text:span></text:p>
            <text:p text:style-name="P13"><text:span text:style-name="T31"/></text:p>
          </draw:text-box>
        </draw:frame>
        <draw:frame draw:name="Título 35" presentation:style-name="pr3" draw:text-style-name="P15" draw:layer="layout" svg:width="22.859cm" svg:height="2.656cm" svg:x="1.27cm" svg:y="0.254cm" presentation:class="title">
          <draw:text-box>
            <text:p text:style-name="P2"><text:span text:style-name="T8"><text:s/></text:span></text:p>
          </draw:text-box>
        </draw:frame>
        <draw:frame draw:name="Título 36" draw:style-name="gr9" draw:text-style-name="P15" draw:layer="layout" svg:width="24.129cm" svg:height="2.487cm" svg:x="0cm" svg:y="0.423cm">
          <draw:text-box>
            <text:p text:style-name="P2"><text:span text:style-name="T8"><text:tab/></text:span><text:span text:style-name="T29">Monografías en Abierto </text:span><text:span text:style-name="T30">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7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8">
        <draw:frame draw:name="Marcador de contenido 19" presentation:style-name="pr2" draw:text-style-name="P27" draw:layer="layout" svg:width="22.098cm" svg:height="11.684cm" svg:x="1.778cm" svg:y="4.572cm" presentation:class="outline" presentation:user-transformed="true">
          <draw:text-box>
            <text:list text:style-name="L3">
              <text:list-item>
                <text:p text:style-name="P13"><text:span text:style-name="T27">Normativa: estudiantes pueden publicar la </text:span><text:span text:style-name="T27">memoria en acceso abierto</text:span></text:p>
              </text:list-item>
              <text:list-item>
                <text:p text:style-name="P13"><text:span text:style-name="T27">Gestión vía plataforma de depósito</text:span></text:p>
              </text:list-item>
              <text:list-item>
                <text:p text:style-name="P13"><text:span text:style-name="T27">Actualmente, el tutor ha de dar permiso (cuando </text:span><text:span text:style-name="T27">acepta la presentación de la memoria)</text:span></text:p>
                <text:p text:style-name="P13"><text:span text:style-name="T27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3"><text:span text:style-name="T2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8"><text:span text:style-name="T25"/></text:p>
            <text:list text:continue-numbering="true" text:style-name="L3">
              <text:list-header>
                <text:p text:style-name="P28"><text:span text:style-name="T22"/></text:p>
              </text:list-header>
            </text:list>
          </draw:text-box>
        </draw:frame>
        <draw:frame draw:name="Título 37" presentation:style-name="pr3" draw:text-style-name="P15" draw:layer="layout" svg:width="22.859cm" svg:height="2.656cm" svg:x="1.27cm" svg:y="0.254cm" presentation:class="title">
          <draw:text-box>
            <text:p text:style-name="P2"><text:span text:style-name="T8"><text:s/></text:span></text:p>
          </draw:text-box>
        </draw:frame>
        <draw:frame draw:name="Título 38" draw:style-name="gr9" draw:text-style-name="P15" draw:layer="layout" svg:width="24.129cm" svg:height="2.487cm" svg:x="0cm" svg:y="0.423cm">
          <draw:text-box>
            <text:p text:style-name="P2"><text:span text:style-name="T8"><text:tab/></text:span><text:span text:style-name="T29">Publicación de TFGs en acceso abierto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8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8">
        <draw:frame draw:name="Marcador de contenido 20" presentation:style-name="pr2" draw:text-style-name="P27" draw:layer="layout" svg:width="22.098cm" svg:height="11.684cm" svg:x="1.778cm" svg:y="4.572cm" presentation:class="outline" presentation:user-transformed="true">
          <draw:text-box>
            <text:list text:style-name="L3">
              <text:list-item>
                <text:p text:style-name="P13"><text:span text:style-name="T27">Cursos en el plan de formación de PDI</text:span></text:p>
              </text:list-item>
              <text:list-item>
                <text:p text:style-name="P13"><text:span text:style-name="T27">Colaboración en cursos de la Escuela de </text:span><text:span text:style-name="T27">Doctorado</text:span></text:p>
              </text:list-item>
              <text:list-item>
                <text:p text:style-name="P13"><text:span text:style-name="T27">Varias actividades específicas, en colaboración </text:span><text:span text:style-name="T27">con centros, vicerrectorados</text:span></text:p>
              </text:list-item>
            </text:list>
            <text:p text:style-name="P13"><text:span text:style-name="T28"/></text:p>
            <text:list text:continue-numbering="true" text:style-name="L3">
              <text:list-header>
                <text:p text:style-name="P13"><text:span text:style-name="T27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3"><text:span text:style-name="T2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p text:style-name="P28"><text:span text:style-name="T25"/></text:p>
            <text:list text:continue-numbering="true" text:style-name="L3">
              <text:list-header>
                <text:p text:style-name="P28"><text:span text:style-name="T22"/></text:p>
              </text:list-header>
            </text:list>
          </draw:text-box>
        </draw:frame>
        <draw:frame draw:name="Título 39" presentation:style-name="pr3" draw:text-style-name="P15" draw:layer="layout" svg:width="22.859cm" svg:height="2.656cm" svg:x="1.27cm" svg:y="0.254cm" presentation:class="title">
          <draw:text-box>
            <text:p text:style-name="P2"><text:span text:style-name="T8"><text:s/></text:span></text:p>
          </draw:text-box>
        </draw:frame>
        <draw:frame draw:name="Título 40" draw:style-name="gr9" draw:text-style-name="P15" draw:layer="layout" svg:width="24.129cm" svg:height="2.487cm" svg:x="0cm" svg:y="0.423cm">
          <draw:text-box>
            <text:p text:style-name="P2"><text:span text:style-name="T8"><text:tab/></text:span><text:span text:style-name="T29">Plan de formación y promoción</text:span><text:span text:style-name="T30"> 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9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8">
        <draw:frame draw:name="Marcador de contenido 21" presentation:style-name="pr2" draw:text-style-name="P27" draw:layer="layout" svg:width="22.098cm" svg:height="11.684cm" svg:x="1.778cm" svg:y="4.572cm" presentation:class="outline" presentation:user-transformed="true">
          <draw:text-box>
            <text:list text:style-name="L3">
              <text:list-item>
                <text:p text:style-name="P13"><text:span text:style-name="T27">Cada año, en marzo</text:span></text:p>
              </text:list-item>
              <text:list-item>
                <text:p text:style-name="P13"><text:span text:style-name="T27">Presentaciones, talleres, mesas redondas, </text:span><text:span text:style-name="T27">exposiciones, feria</text:span></text:p>
              </text:list-item>
              <text:list-item>
                <text:p text:style-name="P13"><text:span text:style-name="T27">Convocatoria abierta de contribuciones</text:span></text:p>
              </text:list-item>
            </text:list>
          </draw:text-box>
        </draw:frame>
        <draw:frame draw:name="Título 41" presentation:style-name="pr3" draw:text-style-name="P15" draw:layer="layout" svg:width="22.859cm" svg:height="2.656cm" svg:x="1.27cm" svg:y="0.254cm" presentation:class="title">
          <draw:text-box>
            <text:p text:style-name="P2"><text:span text:style-name="T8"><text:s/></text:span></text:p>
          </draw:text-box>
        </draw:frame>
        <draw:frame draw:name="Título 42" draw:style-name="gr9" draw:text-style-name="P15" draw:layer="layout" svg:width="24.129cm" svg:height="2.487cm" svg:x="0cm" svg:y="0.423cm">
          <draw:text-box>
            <text:p text:style-name="P2"><text:span text:style-name="T8"><text:tab/></text:span><text:span text:style-name="T29">Jornadas de Cultura Libre</text:span><text:span text:style-name="T30"> 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0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8">
        <draw:frame draw:name="Marcador de contenido 22" presentation:style-name="pr2" draw:text-style-name="P27" draw:layer="layout" svg:width="23.622cm" svg:height="11.684cm" svg:x="0.254cm" svg:y="4.572cm" presentation:class="outline" presentation:user-transformed="true">
          <draw:text-box>
            <text:list text:style-name="L3">
              <text:list-item>
                <text:p text:style-name="P13"><text:span text:style-name="T27">Directo, miércoles a las 10:00</text:span></text:p>
              </text:list-item>
              <text:list-item>
                <text:p text:style-name="P13"><text:span text:style-name="T27">Temas variados, relacionados con las competencias de </text:span><text:span text:style-name="T27">OfiLibre</text:span></text:p>
              </text:list-item>
              <text:list-item>
                <text:p text:style-name="P13"><text:span text:style-name="T27">En directo, o grabados, vía TV URJC</text:span></text:p>
              </text:list-item>
            </text:list>
            <text:p text:style-name="P13"><text:span text:style-name="T27"><text:a xlink:href="https://ofilibre.urjc.es/acciones/cafes/" xlink:type="simple">https://ofilibre.urjc.es/acciones/cafes/</text:a></text:span></text:p>
          </draw:text-box>
        </draw:frame>
        <draw:frame draw:name="Título 43" presentation:style-name="pr3" draw:text-style-name="P15" draw:layer="layout" svg:width="22.859cm" svg:height="2.656cm" svg:x="1.27cm" svg:y="0.254cm" presentation:class="title">
          <draw:text-box>
            <text:p text:style-name="P2"><text:span text:style-name="T8"><text:s/></text:span></text:p>
          </draw:text-box>
        </draw:frame>
        <draw:frame draw:name="Título 44" draw:style-name="gr9" draw:text-style-name="P15" draw:layer="layout" svg:width="24.129cm" svg:height="2.487cm" svg:x="0cm" svg:y="0.423cm">
          <draw:text-box>
            <text:p text:style-name="P2"><text:span text:style-name="T8"><text:tab/></text:span><text:span text:style-name="T29">Cafés con OfiLibre</text:span><text:span text:style-name="T30"> 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1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8">
        <draw:frame draw:name="Marcador de contenido 23" presentation:style-name="pr2" draw:text-style-name="P27" draw:layer="layout" svg:width="22.098cm" svg:height="11.684cm" svg:x="1.778cm" svg:y="4.572cm" presentation:class="outline" presentation:user-transformed="true">
          <draw:text-box>
            <text:list text:style-name="L3">
              <text:list-item>
                <text:p text:style-name="P13"><text:span text:style-name="T27">Órgano consultivo</text:span></text:p>
              </text:list-item>
              <text:list-item>
                <text:p text:style-name="P13"><text:span text:style-name="T27">Normativa relacionada con la </text:span><text:span text:style-name="T27">publicación en acceso abierto</text:span></text:p>
              </text:list-item>
              <text:list-item>
                <text:p text:style-name="P13"><text:span text:style-name="T27">Representantes de todos los centros</text:span></text:p>
              </text:list-item>
            </text:list>
            <text:p text:style-name="P13"><text:span text:style-name="T28"/></text:p>
            <text:list text:continue-numbering="true" text:style-name="L3">
              <text:list-header>
                <text:p text:style-name="P13"><text:span text:style-name="T27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3"><text:span text:style-name="T2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p text:style-name="P28"><text:span text:style-name="T25"/></text:p>
            <text:list text:continue-numbering="true" text:style-name="L3">
              <text:list-header>
                <text:p text:style-name="P28"><text:span text:style-name="T22"/></text:p>
              </text:list-header>
            </text:list>
          </draw:text-box>
        </draw:frame>
        <draw:frame draw:name="Título 45" presentation:style-name="pr3" draw:text-style-name="P15" draw:layer="layout" svg:width="22.859cm" svg:height="2.656cm" svg:x="1.27cm" svg:y="0.254cm" presentation:class="title">
          <draw:text-box>
            <text:p text:style-name="P2"><text:span text:style-name="T8"><text:s/></text:span></text:p>
          </draw:text-box>
        </draw:frame>
        <draw:frame draw:name="Título 46" draw:style-name="gr9" draw:text-style-name="P15" draw:layer="layout" svg:width="24.129cm" svg:height="2.487cm" svg:x="0cm" svg:y="0.423cm">
          <draw:text-box>
            <text:p text:style-name="P2"><text:span text:style-name="T8"><text:tab/></text:span><text:span text:style-name="T29">Consejo de publicación abierta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2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2" presentation:presentation-page-layout-name="AL1T18">
        <draw:frame draw:name="Marcador de contenido 1" presentation:style-name="pr5" draw:text-style-name="P27" draw:layer="layout" svg:width="11.684cm" svg:height="10.922cm" svg:x="0.254cm" svg:y="4.572cm" presentation:class="outline" presentation:user-transformed="true">
          <draw:text-box>
            <text:list text:style-name="L3">
              <text:list-item>
                <text:p text:style-name="P13"><text:span text:style-name="T32">con Biblioteca</text:span></text:p>
              </text:list-item>
              <text:list-item>
                <text:p text:style-name="P13"><text:span text:style-name="T32">con Publicaciones</text:span></text:p>
              </text:list-item>
              <text:list-item>
                <text:p text:style-name="P13"><text:span text:style-name="T32">con Investigación</text:span></text:p>
              </text:list-item>
              <text:list-item>
                <text:p text:style-name="P13"><text:span text:style-name="T32">con Digitalización</text:span></text:p>
              </text:list-item>
              <text:list-item>
                <text:p text:style-name="P13"><text:span text:style-name="T32">con Formación</text:span></text:p>
              </text:list-item>
              <text:list-item>
                <text:p text:style-name="P13"><text:span text:style-name="T32">...</text:span></text:p>
              </text:list-item>
            </text:list>
          </draw:text-box>
        </draw:frame>
        <draw:frame draw:name="Título 1" presentation:style-name="pr6" draw:text-style-name="P15" draw:layer="layout" svg:width="22.859cm" svg:height="3.18cm" svg:x="1.27cm" svg:y="0.122cm" presentation:class="title">
          <draw:text-box>
            <text:p text:style-name="P2"><text:span text:style-name="T8"><text:s/></text:span></text:p>
          </draw:text-box>
        </draw:frame>
        <draw:frame draw:name="Título 2" draw:style-name="gr9" draw:text-style-name="P18" draw:layer="layout" svg:width="22.437cm" svg:height="2.487cm" svg:x="0cm" svg:y="0.423cm">
          <draw:text-box>
            <text:p text:style-name="P2"><text:span text:style-name="T21"><text:s text:c="2"/></text:span></text:p>
          </draw:text-box>
        </draw:frame>
        <draw:frame draw:style-name="gr14" draw:text-style-name="P10" draw:layer="layout" svg:width="23.909cm" svg:height="2.402cm" svg:x="0.729cm" svg:y="0.508cm">
          <draw:text-box>
            <text:p><text:span text:style-name="T30">Colaboración, coordinación</text:span></text:p>
          </draw:text-box>
        </draw:frame>
        <draw:frame draw:style-name="gr15" draw:text-style-name="P33" draw:layer="layout" svg:width="12.133cm" svg:height="11.283cm" svg:x="12.063cm" svg:y="4.974cm">
          <draw:text-box>
            <text:list text:style-name="L3">
              <text:list-item>
                <text:p text:style-name="P32"><text:span text:style-name="T32">con Alumnos</text:span></text:p>
              </text:list-item>
              <text:list-item>
                <text:p text:style-name="P32"><text:span text:style-name="T32">con Calidad</text:span></text:p>
              </text:list-item>
              <text:list-item>
                <text:p text:style-name="P32"><text:span text:style-name="T32">con Extensión</text:span></text:p>
              </text:list-item>
              <text:list-item>
                <text:p text:style-name="P32"><text:span text:style-name="T33">con </text:span><text:span text:style-name="T32">los centros</text:span></text:p>
              </text:list-item>
              <text:list-item>
                <text:p text:style-name="P32"><text:span text:style-name="T32">con Transparencia</text:span></text:p>
              </text:list-item>
              <text:list-item>
                <text:p text:style-name="P32"><text:span text:style-name="T32">...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3" presentation:class="page"/>
          <draw:frame presentation:style-name="pr7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2" presentation:presentation-page-layout-name="AL1T18">
        <draw:frame draw:name="Marcador de contenido 6" presentation:style-name="pr5" draw:text-style-name="P27" draw:layer="layout" svg:width="21.082cm" svg:height="11.684cm" svg:x="1.778cm" svg:y="4.572cm" presentation:class="outline" presentation:user-transformed="true">
          <draw:text-box>
            <text:list text:style-name="L3">
              <text:list-item>
                <text:p text:style-name="P13"><text:span text:style-name="T22">Identificación y apoyo a iniciativas</text:span></text:p>
              </text:list-item>
              <text:list-item>
                <text:p text:style-name="P13"><text:span text:style-name="T22">Estímulo de nuevas iniciativas</text:span></text:p>
              </text:list-item>
              <text:list-item>
                <text:p text:style-name="P13"><text:span text:style-name="T22">Colaboración con comunidades</text:span></text:p>
              </text:list-item>
              <text:list-item>
                <text:p text:style-name="P13"><text:span text:style-name="T22">Formación y asesoramiento</text:span></text:p>
              </text:list-item>
              <text:list-item>
                <text:p text:style-name="P13"><text:span text:style-name="T22">Actividades de promoción y acercamiento</text:span></text:p>
              </text:list-item>
              <text:list-item>
                <text:p text:style-name="P13"><text:span text:style-name="T22">Eliminación de barreras</text:span></text:p>
                <text:p text:style-name="P13"><text:span text:style-name="T22"/></text:p>
              </text:list-item>
            </text:list>
            <text:p text:style-name="P13"><text:span text:style-name="T22"/></text:p>
            <text:p text:style-name="P29"><text:span text:style-name="T26"/></text:p>
            <text:p text:style-name="P28"><text:span text:style-name="T25"/></text:p>
            <text:list text:continue-numbering="true" text:style-name="L3">
              <text:list-header>
                <text:p text:style-name="P28"><text:span text:style-name="T22"/></text:p>
              </text:list-header>
            </text:list>
          </draw:text-box>
        </draw:frame>
        <draw:frame draw:name="Título 13" presentation:style-name="pr6" draw:text-style-name="P15" draw:layer="layout" svg:width="22.859cm" svg:height="3.18cm" svg:x="1.27cm" svg:y="0.122cm" presentation:class="title">
          <draw:text-box>
            <text:p text:style-name="P2"><text:span text:style-name="T8"><text:s/></text:span></text:p>
          </draw:text-box>
        </draw:frame>
        <draw:frame draw:name="Título 5" draw:style-name="gr9" draw:text-style-name="P18" draw:layer="layout" svg:width="22.437cm" svg:height="2.487cm" svg:x="0cm" svg:y="0.423cm">
          <draw:text-box>
            <text:p text:style-name="P2"><text:span text:style-name="T34">En todos los ámbitos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4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2" presentation:presentation-page-layout-name="AL1T18">
        <draw:frame draw:name="Marcador de contenido 6_5" presentation:style-name="pr5" draw:text-style-name="P36" draw:layer="layout" svg:width="21.082cm" svg:height="5.334cm" svg:x="3.048cm" svg:y="7.62cm" presentation:class="outline" presentation:user-transformed="true">
          <draw:text-box>
            <text:p text:style-name="P35"><text:span text:style-name="T35">“un agente útil”</text:span></text:p>
            <text:p text:style-name="P29"><text:span text:style-name="T26"/></text:p>
            <text:p text:style-name="P28"><text:span text:style-name="T25"/></text:p>
            <text:list text:style-name="L3">
              <text:list-header>
                <text:p text:style-name="P28"><text:span text:style-name="T22"/></text:p>
              </text:list-header>
            </text:list>
          </draw:text-box>
        </draw:frame>
        <draw:frame draw:name="Título 13_6" presentation:style-name="pr6" draw:text-style-name="P15" draw:layer="layout" svg:width="22.859cm" svg:height="3.18cm" svg:x="1.27cm" svg:y="0.122cm" presentation:class="title">
          <draw:text-box>
            <text:p text:style-name="P2"><text:span text:style-name="T8"><text:s/></text:span></text:p>
          </draw:text-box>
        </draw:frame>
        <draw:frame draw:name="Título 5_6" draw:style-name="gr9" draw:text-style-name="P18" draw:layer="layout" svg:width="24.892cm" svg:height="2.487cm" svg:x="0cm" svg:y="0.423cm">
          <draw:text-box>
            <text:p text:style-name="P2"><text:span text:style-name="T34">Oficina de conocimiento y cultura libre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5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2" presentation:presentation-page-layout-name="AL1T18">
        <draw:frame draw:name="Título 13_ 1" presentation:style-name="pr6" draw:text-style-name="P15" draw:layer="layout" svg:width="22.859cm" svg:height="3.18cm" svg:x="1.27cm" svg:y="0.122cm" presentation:class="title">
          <draw:text-box>
            <text:p text:style-name="P2"><text:span text:style-name="T8"><text:s/></text:span></text:p>
          </draw:text-box>
        </draw:frame>
        <draw:frame draw:name="Título 5_ 1" draw:style-name="gr9" draw:text-style-name="P18" draw:layer="layout" svg:width="24.892cm" svg:height="2.487cm" svg:x="0cm" svg:y="0.423cm">
          <draw:text-box>
            <text:p text:style-name="P2"><text:span text:style-name="T34">Un poquito de publicidad</text:span></text:p>
          </draw:text-box>
        </draw:frame>
        <draw:frame draw:style-name="gr16" draw:text-style-name="P37" draw:layer="layout" svg:width="8.73cm" svg:height="8.73cm" svg:x="16.162cm" svg:y="3.208cm">
          <draw:image xlink:href="Pictures/100000000000014A0000014A4CEF0255.png" xlink:type="simple" xlink:show="embed" xlink:actuate="onLoad" draw:mime-type="image/png">
            <text:p/>
          </draw:image>
        </draw:frame>
        <draw:frame draw:style-name="gr16" draw:text-style-name="P37" draw:layer="layout" svg:width="16.546cm" svg:height="13.405cm" svg:x="0cm" svg:y="3.105cm">
          <draw:image xlink:href="Pictures/10000001000002EC0000025EAD151A53.png" xlink:type="simple" xlink:show="embed" xlink:actuate="onLoad" draw:mime-type="image/png">
            <text:p/>
          </draw:image>
        </draw:frame>
        <draw:frame draw:style-name="gr17" draw:text-style-name="P26" draw:layer="layout" svg:width="8.89cm" svg:height="1.524cm" svg:x="16.51cm" svg:y="11.938cm">
          <draw:text-box>
            <text:p><text:span text:style-name="T36"><text:a xlink:href="https://jnca26.gitlab.io/" xlink:type="simple">https://jnca26.gitlab.io</text:a></text:span></text:p>
          </draw:text-box>
        </draw:frame>
        <presentation:notes draw:style-name="dp4">
          <draw:page-thumbnail draw:style-name="gr8" draw:layer="layout" svg:width="13.968cm" svg:height="10.476cm" svg:x="3.81cm" svg:y="2.123cm" draw:page-number="26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2" presentation:presentation-page-layout-name="AL1T18">
        <draw:frame draw:name="Marcador de contenido 2" presentation:style-name="pr5" draw:text-style-name="P38" draw:layer="layout" svg:width="23.114cm" svg:height="8.576cm" svg:x="0.254cm" svg:y="6.858cm" presentation:class="outline" presentation:user-transformed="true">
          <draw:text-box>
            <text:p text:style-name="P16"><text:span text:style-name="T37">©2021-2026 OfiLibre URJC</text:span></text:p>
            <text:p text:style-name="P16"><text:span text:style-name="T37">Algunos derechos reservados.</text:span></text:p>
            <text:p text:style-name="P16"><text:span text:style-name="T37">Este documento se distribuye bajo la licencia “Atribución-CompartirIgual 4.0 Internacional” de Creative Commons, disponible en</text:span></text:p>
            <text:p><text:span text:style-name="T38"><text:a xlink:href="https://creativecommons.org/licenses/by-sa/4.0/deed.es" xlink:type="simple">https://creativecommons.org/licenses/by-sa/4.0/deed.es</text:a></text:span></text:p>
            <text:p text:style-name="P16"><text:span text:style-name="T37"/></text:p>
          </draw:text-box>
        </draw:frame>
        <draw:frame draw:name="Título 3" presentation:style-name="pr6" draw:text-style-name="P15" draw:layer="layout" svg:width="22.859cm" svg:height="3.18cm" svg:x="1.27cm" svg:y="0.122cm" presentation:class="title">
          <draw:text-box>
            <text:p text:style-name="P2"><text:span text:style-name="T8">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7" presentation:class="page"/>
          <draw:frame presentation:style-name="pr7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KaitiM GB" svg:font-family="'AR PL KaitiM GB'" style:font-family-generic="system" style:font-pitch="variable"/>
    <style:font-face style:name="Arial" svg:font-family="Arial"/>
    <style:font-face style:name="Arial Black" svg:font-family="'Arial Black'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libri (Body)" svg:font-family="'Calibri (Body)'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ill Sans" svg:font-family="'Gill Sans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ＭＳ Ｐゴシック" svg:font-family="'ＭＳ Ｐゴシック'" style:font-family-generic="swiss" style:font-pitch="variable"/>
    <style:font-face style:name="ＭＳ Ｐゴシック1" svg:font-family="'ＭＳ Ｐゴシック'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ook" xlink:href="Pictures/100000000000078000000387F062883B.jpg" xlink:type="simple" xlink:show="embed" xlink:actuate="onLoad"/>
    <draw:marker draw:name="Arrow" svg:viewBox="0 0 20 30" svg:d="M10 0l-10 30h20z"/>
    <style:default-style style:family="graphic">
      <style:graphic-properties draw:stroke="solid" svg:stroke-width="0.079cm" svg:stroke-color="#585858" svg:stroke-linecap="butt" draw:fill-color="#7a7a7a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alloon_20_Text" style:display-name="Balloon Text" style:family="graphic">
      <style:paragraph-properties fo:text-align="start" style:text-autospace="none"/>
      <style:text-properties style:font-name="Times New Roman" fo:font-family="'Times New Roman'" style:font-family-generic="roman" style:font-pitch="variable" fo:font-size="9pt" style:font-name-asian="Times New Roman1" style:font-family-asian="'Times New Roman'" style:font-pitch-asian="variable" style:font-size-asian="9pt"/>
    </style:style>
    <style:style style:name="Balloon_20_Text_20_Char" style:display-name="Balloon Text Char" style:family="graphic">
      <style:paragraph-properties style:text-autospace="none"/>
      <style:text-properties style:font-name="Times New Roman" fo:font-family="'Times New Roman'" style:font-family-generic="roman" style:font-pitch="variable" fo:font-size="9pt" style:font-name-asian="Times New Roman1" style:font-family-asian="'Times New Roman'" style:font-pitch-asian="variable" style:font-size-asian="9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" style:font-family-asian="FreeSans" style:font-family-generic-asian="swiss" style:font-pitch-asian="variable" style:font-size-asian="12pt" style:font-style-asian="italic" style:font-style-complex="italic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Contents_20_1" style:display-name="Contents 1" style:family="graphic">
      <style:paragraph-properties fo:margin-top="0.374cm" fo:margin-bottom="0cm" fo:text-align="start" style:text-autospace="none"/>
      <style:text-properties style:font-name-asian="Calibri1" style:font-family-asian="Calibri" style:font-pitch-asian="variable" style:font-size-asian="11pt" style:font-style-asian="italic" style:font-weight-asian="bold"/>
    </style:style>
    <style:style style:name="Contents_20_2" style:display-name="Contents 2" style:family="graphic">
      <style:paragraph-properties fo:margin-left="0.746cm" fo:margin-right="0cm" fo:margin-top="0.374cm" fo:margin-bottom="0cm" fo:text-align="start" fo:text-indent="0cm" style:text-autospace="none"/>
      <style:text-properties fo:font-weight="bold" style:font-name-asian="Calibri1" style:font-family-asian="Calibri" style:font-pitch-asian="variable" style:font-size-asian="11pt" style:font-weight-asian="bold" style:font-weight-complex="bold"/>
    </style:style>
    <style:style style:name="Contents_20_3" style:display-name="Contents 3" style:family="graphic">
      <style:paragraph-properties fo:margin-left="1.49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4" style:display-name="Contents 4" style:family="graphic">
      <style:paragraph-properties fo:margin-left="2.2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5" style:display-name="Contents 5" style:family="graphic">
      <style:paragraph-properties fo:margin-left="2.986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6" style:display-name="Contents 6" style:family="graphic">
      <style:paragraph-properties fo:margin-left="3.73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7" style:display-name="Contents 7" style:family="graphic">
      <style:paragraph-properties fo:margin-left="4.48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8" style:display-name="Contents 8" style:family="graphic">
      <style:paragraph-properties fo:margin-left="5.226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9" style:display-name="Contents 9" style:family="graphic">
      <style:paragraph-properties fo:margin-left="5.97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Default_20_Paragraph_20_Font" style:display-name="Default Paragraph Font" style:family="graphic">
      <style:paragraph-properties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ollowedHyperlink" style:family="graphic">
      <style:paragraph-properties style:text-autospace="none"/>
      <style:text-properties fo:color="#b26b02" loext:opacity="100%" style:text-underline-style="solid" style:text-underline-width="auto" style:text-underline-color="font-color"/>
    </style:style>
    <style:style style:name="Footer" style:family="graphic">
      <style:paragraph-properties fo:text-align="start" style:text-autospace="none" loext:tab-stop-distance="0cm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Footer_20_Char" style:display-name="Footer Char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/>
    </style:style>
    <style:style style:name="Graphics" style:family="graphic"/>
    <style:style style:name="Header" style:family="graphic">
      <style:paragraph-properties fo:text-align="start" style:text-autospace="none" loext:tab-stop-distance="0cm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Header_20_Char" style:display-name="Header Char" style:family="graphic">
      <style:paragraph-properties style:text-autospace="none"/>
    </style:style>
    <style:style style:name="Heading_20_1" style:display-name="Heading 1" style:family="graphic">
      <style:paragraph-properties fo:margin-top="1.494cm" fo:margin-bottom="0.746cm" fo:text-align="start" style:text-autospace="none"/>
      <style:text-properties fo:text-transform="uppercase" fo:color="#000000" loext:opacity="100%" fo:font-weight="bold" style:font-name-asian="Calibri (Body)" style:font-family-asian="'Calibri (Body)'" style:font-pitch-asian="variable" style:font-size-asian="16pt" style:font-weight-asian="bold" style:font-weight-complex="bold"/>
    </style:style>
    <style:style style:name="Heading_20_1_20_Char" style:display-name="Heading 1 Char" style:family="graphic">
      <style:paragraph-properties style:text-autospace="none"/>
      <style:text-properties fo:text-transform="uppercase" fo:color="#000000" loext:opacity="100%" fo:font-weight="bold" style:font-name-asian="Calibri (Body)" style:font-family-asian="'Calibri (Body)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fo:text-align="start" style:text-autospace="none"/>
      <style:text-properties fo:color="#000000" loext:opacity="100%" fo:font-weight="bold" style:font-name-asian="Calibri1" style:font-family-asian="Calibri" style:font-pitch-asian="variable" style:font-size-asian="13pt" style:font-weight-asian="bold" style:font-weight-complex="bold"/>
    </style:style>
    <style:style style:name="Heading_20_2_20_Char" style:display-name="Heading 2 Char" style:family="graphic">
      <style:paragraph-properties style:text-autospace="none"/>
      <style:text-properties fo:color="#000000" loext:opacity="100%" fo:font-weight="bold" style:font-name-asian="Calibri1" style:font-family-asian="Calibri" style:font-pitch-asian="variable" style:font-size-asian="13pt" style:font-weight-asian="bold" style:font-weight-complex="bold"/>
    </style:style>
    <style:style style:name="Heading_20_3" style:display-name="Heading 3" style:family="graphic">
      <style:paragraph-properties fo:margin-top="1.12cm" fo:margin-bottom="0.746cm" fo:text-align="start" style:text-autospace="none"/>
      <style:text-properties fo:color="#000000" loext:opacity="100%" fo:font-style="italic" fo:font-weight="bold" style:font-name-asian="Calibri1" style:font-family-asian="Calibri" style:font-pitch-asian="variable" style:font-size-asian="13pt" style:font-style-asian="italic" style:font-weight-asian="bold" style:font-style-complex="italic" style:font-weight-complex="bold"/>
    </style:style>
    <style:style style:name="Heading_20_3_20_Char" style:display-name="Heading 3 Char" style:family="graphic">
      <style:paragraph-properties style:text-autospace="none"/>
      <style:text-properties fo:color="#000000" loext:opacity="100%" fo:font-style="italic" fo:font-weight="bold" style:font-name-asian="Calibri1" style:font-family-asian="Calibri" style:font-pitch-asian="variable" style:font-size-asian="13pt" style:font-style-asian="italic" style:font-weight-asian="bold" style:font-style-complex="italic" style:font-weight-complex="bold"/>
    </style:style>
    <style:style style:name="Heading_20_4" style:display-name="Heading 4" style:family="graphic">
      <style:paragraph-properties fo:margin-top="0.746cm" fo:margin-bottom="0.374cm" fo:text-align="start" style:text-autospace="none"/>
      <style:text-properties fo:color="#000000" loext:opacity="100%" fo:font-weight="bold" style:font-name-asian="Calibri1" style:font-family-asian="Calibri" style:font-pitch-asian="variable" style:font-style-asian="italic" style:font-weight-asian="bold" style:font-weight-complex="bold"/>
    </style:style>
    <style:style style:name="Heading_20_4_20_Char" style:display-name="Heading 4 Char" style:family="graphic">
      <style:paragraph-properties style:text-autospace="none"/>
      <style:text-properties fo:color="#000000" loext:opacity="100%" fo:font-weight="bold" style:font-name-asian="Calibri1" style:font-family-asian="Calibri" style:font-pitch-asian="variable" style:font-style-asian="italic" style:font-weight-asian="bold" style:font-weight-complex="bold"/>
    </style:style>
    <style:style style:name="Index" style:family="graphic">
      <style:paragraph-properties fo:text-align="start" style:text-autospace="none"/>
      <style:text-properties style:font-name-asian="FreeSans" style:font-family-asian="FreeSans" style:font-family-generic-asian="swiss" style:font-pitch-asian="variable"/>
    </style:style>
    <style:style style:name="Internet_20_Link" style:display-name="Internet Link" style:family="graphic">
      <style:paragraph-properties style:text-autospace="none"/>
      <style:text-properties fo:color="#c00000" loext:opacity="100%" style:text-underline-style="solid" style:text-underline-width="auto" style:text-underline-color="font-color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FreeSans" style:font-family-asian="FreeSans" style:font-family-generic-asian="swiss" style:font-pitch-asian="variable"/>
    </style:style>
    <style:style style:name="List_20_Bullet" style:display-name="List Bullet" style:family="graphic">
      <style:paragraph-properties fo:margin-left="1.995cm" fo:margin-right="0cm" fo:margin-top="0.187cm" fo:margin-bottom="0.187cm" fo:line-height="0.564cm" fo:text-align="justify" fo:text-indent="-1.111cm" style:text-autospace="none"/>
    </style:style>
    <style:style style:name="List_20_Bullet_20_2" style:display-name="List Bullet 2" style:family="graphic">
      <style:paragraph-properties fo:margin-top="0cm" fo:margin-bottom="0cm" fo:text-align="justify"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fo:language="en" fo:country="GB" style:font-name-asian="Calibri1" style:font-family-asian="Calibri" style:font-pitch-asian="variable" style:font-size-asian="11pt" style:language-asian="en" style:country-asian="US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1" style:display-name="ListLabel 11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  <style:text-properties fo:font-style="italic" style:font-style-asian="italic" style:font-style-complex="italic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use-window-font-color="true" loext:opacity="0%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Normal" style:family="graphic">
      <style:paragraph-properties fo:text-align="start" style:text-autospace="none"/>
      <style:text-properties style:use-window-font-color="true" loext:opacity="0%" style:font-name="Calibri" fo:font-family="Calibri" style:font-family-generic="roman" style:font-pitch="variable" fo:language="es" fo:country="ES" style:font-name-asian="DejaVu Sans" style:font-family-asian="'DejaVu Sans'" style:font-family-generic-asian="roman" style:font-pitch-asian="variable" style:language-asian="ar" style:country-asian="SA" style:font-name-complex="Calibri" style:font-family-complex="Calibri" style:font-family-generic-complex="roman" style:font-pitch-complex="variable" style:font-size-complex="12pt"/>
    </style:style>
    <style:style style:name="Parrafo_20_de_20_texto" style:display-name="Parrafo de texto" style:family="graphic">
      <style:paragraph-properties fo:margin-top="0.374cm" fo:margin-bottom="0cm" fo:line-height="0.564cm" fo:text-align="justify" style:text-autospace="none"/>
      <style:text-properties style:rfc-language-tag="es-ES-u-co-trad" fo:language="es" fo:country="ES"/>
    </style:style>
    <style:style style:name="Subtle_20_Emphasis" style:display-name="Subtle Emphasis" style:family="graphic">
      <style:paragraph-properties style:text-autospace="none"/>
      <style:text-properties fo:color="#404040" loext:opacity="100%" fo:font-style="italic" style:font-style-asian="italic" style:font-style-complex="italic"/>
    </style:style>
    <style:style style:name="Subtle_20_Reference" style:display-name="Subtle Reference" style:family="graphic">
      <style:paragraph-properties style:text-autospace="none"/>
      <style:text-properties fo:font-variant="small-caps" fo:color="#5a5a5a" loext:opacity="100%"/>
    </style:style>
    <style:style style:name="TOC_20_Heading" style:display-name="TOC Heading" style:family="graphic">
      <style:paragraph-properties fo:margin-top="1.494cm" fo:margin-bottom="0.746cm" fo:line-height="115%" fo:text-align="start" style:text-autospace="none"/>
      <style:text-properties fo:text-transform="uppercase" fo:color="#000000" loext:opacity="100%" fo:language="en" fo:country="US" fo:font-weight="normal" style:font-name-asian="Calibri (Body)" style:font-family-asian="'Calibri (Body)'" style:font-pitch-asian="variable" style:font-size-asian="14pt" style:language-asian="en" style:country-asian="US" style:font-weight-asian="bold" style:font-weight-complex="normal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Texto-parrafo" style:family="graphic">
      <style:paragraph-properties fo:margin-top="0.374cm" fo:margin-bottom="0cm" fo:line-height="0.564cm" fo:text-align="justify" style:text-autospace="none"/>
    </style:style>
    <style:style style:name="Texto-version" style:family="graphic">
      <style:paragraph-properties fo:margin-top="0.374cm" fo:margin-bottom="0cm" fo:line-height="0.564cm" fo:text-align="justify" style:text-autospace="none"/>
      <style:text-properties fo:font-size="11pt" style:font-size-asian="11pt" style:font-size-complex="11pt"/>
    </style:style>
    <style:style style:name="Title_20_Char" style:display-name="Title Char" style:family="graphic">
      <style:paragraph-properties style:text-autospace="none"/>
      <style:text-properties style:font-name="Calibri Light" fo:font-family="'Calibri Light'" style:font-family-generic="roman" style:font-pitch="variable" fo:font-size="28pt" fo:letter-spacing="-0.018cm" style:letter-kerning="true" style:font-name-asian="DejaVu Sans" style:font-family-asian="'DejaVu Sans'" style:font-family-generic-asian="roman" style:font-pitch-asian="variable" style:font-size-asian="28pt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annotation_20_subject" style:display-name="annotation subject" style:family="graphic">
      <style:paragraph-properties fo:text-align="start" style:text-autospace="none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text-align="start" style:text-autospace="none"/>
      <style:text-properties fo:font-size="10pt" style:font-size-asian="10pt" style:font-size-complex="10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page_20_number" style:display-name="page number" style:family="graphic">
      <style:paragraph-properties style:text-autospace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false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false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false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background" style:display-name="Master1-Layout2-obj-Título-y-objetos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_5f_-backgroundobjects" style:display-name="Master1-Layout2-obj-Título-y-objetos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-notes" style:display-name="Master1-Layout2-obj-Título-y-objetos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1" style:display-name="Master1-Layout2-obj-Título-y-objetos__-outline1" style:family="presentation">
      <style:graphic-properties draw:stroke="none" draw:fill="none" draw:auto-grow-height="false" draw:fit-to-size="false" style:shrink-to-fit="true">
        <text:list-style style:name="Master1-Layout2-obj-Título-y-objetos_5f__5f_-outline1" style:display-name="Master1-Layout2-obj-Título-y-objetos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2" style:display-name="Master1-Layout2-obj-Título-y-objetos__-outline2" style:family="presentation" style:parent-style-name="Master1-Layout2-obj-Título-y-objetos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_5f_-outline3" style:display-name="Master1-Layout2-obj-Título-y-objetos__-outline3" style:family="presentation" style:parent-style-name="Master1-Layout2-obj-Título-y-objetos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_5f_-outline4" style:display-name="Master1-Layout2-obj-Título-y-objetos__-outline4" style:family="presentation" style:parent-style-name="Master1-Layout2-obj-Título-y-objetos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_5f_-outline5" style:display-name="Master1-Layout2-obj-Título-y-objetos__-outline5" style:family="presentation" style:parent-style-name="Master1-Layout2-obj-Título-y-objetos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6" style:display-name="Master1-Layout2-obj-Título-y-objetos__-outline6" style:family="presentation" style:parent-style-name="Master1-Layout2-obj-Título-y-objetos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7" style:display-name="Master1-Layout2-obj-Título-y-objetos__-outline7" style:family="presentation" style:parent-style-name="Master1-Layout2-obj-Título-y-objetos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8" style:display-name="Master1-Layout2-obj-Título-y-objetos__-outline8" style:family="presentation" style:parent-style-name="Master1-Layout2-obj-Título-y-objetos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9" style:display-name="Master1-Layout2-obj-Título-y-objetos__-outline9" style:family="presentation" style:parent-style-name="Master1-Layout2-obj-Título-y-objetos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subtitle" style:display-name="Master1-Layout2-obj-Título-y-objetos__-subtitle" style:family="presentation">
      <style:graphic-properties draw:stroke="none" draw:fill="none" draw:textarea-vertical-align="middle">
        <text:list-style style:name="Master1-Layout2-obj-Título-y-objetos_5f__5f_-subtitle" style:display-name="Master1-Layout2-obj-Título-y-objetos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title" style:display-name="Master1-Layout2-obj-Título-y-objetos__-title" style:family="presentation">
      <style:graphic-properties draw:stroke="none" draw:fill="none" draw:textarea-vertical-align="middle">
        <text:list-style style:name="Master1-Layout2-obj-Título-y-objetos_5f__5f_-title" style:display-name="Master1-Layout2-obj-Título-y-objetos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false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9211e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0000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none" style:repeat="stretch" draw:fill-image-ref-point-x="0%" draw:fill-image-ref-point-y="0%" draw:fill-image-ref-point="center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false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c2300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none" style:repeat="stretch" draw:fill-image-ref-point-x="0%" draw:fill-image-ref-point-y="0%" draw:fill-image-ref-point="center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</style:style>
    <style:style style:name="Mgr5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 style:writing-mode="lr-tb" loext:decorative="false"/>
    </style:style>
    <style:style style:name="Mgr6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 style:writing-mode="lr-tb" loext:decorative="false"/>
    </style:style>
    <style:style style:name="Mgr7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 style:writing-mode="lr-tb" loext:decorative="false"/>
    </style:style>
    <style:style style:name="Mgr8" style:family="graphic" style:parent-style-name="Graphics">
      <style:graphic-properties draw:stroke="none" draw:fill="none" fo:clip="rect(0cm, 0cm, 0cm, 0cm)" style:mirror="none" loext:decorative="false"/>
    </style:style>
    <style:style style:name="Mgr9" style:family="graphic" style:parent-style-name="standard">
      <style:graphic-properties draw:stroke="none" draw:fill="none" draw:textarea-horizontal-align="left" draw:textarea-vertical-align="top" draw:auto-grow-height="true" draw:auto-grow-width="false" fo:min-height="3.213cm" fo:padding-top="0.127cm" fo:padding-bottom="0.127cm" fo:padding-left="0.254cm" fo:padding-right="0.254cm" fo:wrap-option="wrap" loext:decorative="false"/>
      <style:paragraph-properties style:writing-mode="lr-tb"/>
    </style:style>
    <style:style style:name="Mgr10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</style:style>
    <style:style style:name="Mgr11" style:family="graphic" style:parent-style-name="standard">
      <style:graphic-properties draw:stroke="none" draw:fill="none" draw:textarea-horizontal-align="left" draw:textarea-vertical-align="top" draw:auto-grow-height="true" draw:auto-grow-width="false" fo:min-height="1.524cm" fo:padding-top="0.127cm" fo:padding-bottom="0.127cm" fo:padding-left="0.254cm" fo:padding-right="0.254cm" fo:wrap-option="wrap" loext:decorative="false"/>
      <style:paragraph-properties style:writing-mode="lr-tb"/>
    </style:style>
    <style:style style:name="M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13" style:family="graphic" style:parent-style-name="standard">
      <style:graphic-properties draw:stroke="none" draw:fill="none" draw:fill-color="#ffffff" fo:min-height="10.798cm" loext:decorative="false"/>
    </style:style>
    <style:style style:name="Mgr14" style:family="graphic" style:parent-style-name="standard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Master1-Esencial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" style:family="presentation" style:parent-style-name="Master1-Esencial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Master1-Layout1-title-Diapositiva-de-títu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Master1-Layout1-title-Diapositiva-de-títu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2-obj-Título-y-objeto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1" style:family="presentation" style:parent-style-name="Master1-Layout2-obj-Título-y-objeto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2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3-secHead-Encabezado-de-secció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8" style:family="presentation" style:parent-style-name="Master1-Layout3-secHead-Encabezado-de-secció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9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4-twoObj-Dos-objeto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Master1-Layout4-twoObj-Dos-objeto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Master1-Layout5-twoTxTwoObj-Comparació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3" style:family="presentation" style:parent-style-name="Master1-Layout5-twoTxTwoObj-Comparació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4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4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6-titleOnly-Sólo-el-títu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9" style:family="presentation" style:parent-style-name="Master1-Layout6-titleOnly-Sólo-el-títu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0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Master1-Layout7-blank-En-blanc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4" style:family="presentation" style:parent-style-name="Master1-Layout7-blank-En-blanc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5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Master1-Layout8-objTx-Contenido-con-títu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2" style:family="presentation" style:parent-style-name="Master1-Layout8-objTx-Contenido-con-títu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6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Master1-Layout9-picTx-Imagen-con-títu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0" style:family="presentation" style:parent-style-name="Master1-Layout9-picTx-Imagen-con-títu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1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2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tb-rl"/>
    </style:style>
    <style:style style:name="Mpr73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74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5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6" style:family="presentation" style:parent-style-name="Master1-Layout10-vertTx-Título-y-texto-vertical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7" style:family="presentation" style:parent-style-name="Master1-Layout10-vertTx-Título-y-texto-vertical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8" style:family="presentation" style:parent-style-name="Master1-Layout11-vertTitleAndTx-Título-vertical-y-texto-title">
      <style:graphic-properties draw:stroke="none" draw:fill="none" draw:textarea-horizontal-align="right" draw:textarea-vertical-align="bottom" draw:auto-grow-height="false" draw:auto-grow-width="false" draw:fit-to-size="false" style:shrink-to-fit="true" fo:min-width="22.86cm" fo:padding-top="0.127cm" fo:padding-bottom="0.127cm" fo:padding-left="0.254cm" fo:padding-right="0.254cm" fo:wrap-option="wrap" loext:decorative="false"/>
      <style:paragraph-properties style:writing-mode="tb-rl"/>
    </style:style>
    <style:style style:name="Mpr79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tb-rl"/>
    </style:style>
    <style:style style:name="Mpr80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81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2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3" style:family="presentation" style:parent-style-name="Master1-Layout11-vertTitleAndTx-Título-vertical-y-text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4" style:family="presentation" style:parent-style-name="Master1-Layout11-vertTitleAndTx-Título-vertical-y-text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5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6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7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88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9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0" style:family="presentation" style:parent-style-name="Master1-Layout2-obj-Título-y-objetos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1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2" style:family="presentation" style:parent-style-name="Master1-Layout2-obj-Título-y-objetos_5f_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3" style:family="presentation" style:parent-style-name="Master1-Layout2-obj-Título-y-objetos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4" style:family="presentation" style:parent-style-name="Master1-Layout2-obj-Título-y-objetos_5f_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95" style:family="presentation" style:parent-style-name="Master1-Layout2-obj-Título-y-objetos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6" style:family="presentation" style:parent-style-name="Master1-Layout2-obj-Título-y-objetos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7" style:family="presentation" style:parent-style-name="Master1-Layout2-obj-Título-y-objetos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8" style:family="presentation" style:parent-style-name="Master1-Layout2-obj-Título-y-objetos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9" style:family="presentation" style:parent-style-name="Default1-title">
      <style:graphic-properties draw:auto-grow-height="false" fo:min-height="3.181cm" loext:decorative="false"/>
      <style:paragraph-properties style:writing-mode="lr-tb"/>
    </style:style>
    <style:style style:name="Mpr100" style:family="presentation" style:parent-style-name="Default1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101" style:family="presentation" style:parent-style-name="Default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2" style:family="presentation" style:parent-style-name="Default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3" style:family="presentation" style:parent-style-name="Default-title">
      <style:graphic-properties draw:auto-grow-height="false" fo:min-height="3.181cm" loext:decorative="false"/>
      <style:paragraph-properties style:writing-mode="lr-tb"/>
    </style:style>
    <style:style style:name="Mpr104" style:family="presentation" style:parent-style-name="Default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105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6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7" style:family="presentation" style:parent-style-name="Default2-title">
      <style:graphic-properties draw:auto-grow-height="false" fo:min-height="3.181cm" loext:decorative="false"/>
      <style:paragraph-properties style:writing-mode="lr-tb"/>
    </style:style>
    <style:style style:name="Mpr108" style:family="presentation" style:parent-style-name="Default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9" style:family="presentation" style:parent-style-name="Default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cm" fo:margin-right="0cm" fo:margin-top="0.176cm" fo:margin-bottom="0.212cm" fo:line-height="100%" fo:text-align="start" fo:text-indent="0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27cm" fo:margin-right="0cm" fo:margin-top="0.176cm" fo:margin-bottom="0cm" fo:line-height="100%" fo:text-align="start" fo:text-indent="-0.507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175cm" fo:margin-right="0cm" fo:margin-top="0cm" fo:margin-bottom="0cm" fo:line-height="10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445cm" fo:margin-right="0cm" fo:margin-top="0cm" fo:margin-bottom="0cm" fo:line-height="10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5.715cm" fo:margin-right="0cm" fo:margin-top="0cm" fo:margin-bottom="0cm" fo:line-height="10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13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14" style:family="paragraph">
      <style:paragraph-properties fo:margin-left="0cm" fo:margin-right="0cm" fo:margin-top="0.247cm" fo:margin-bottom="0.212cm" fo:line-height="100%" fo:text-align="start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0cm" fo:margin-right="0cm" fo:margin-top="0.141cm" fo:margin-bottom="0.212cm" fo:line-height="100%" fo:text-align="start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0cm" fo:margin-right="0cm" fo:margin-top="0.212cm" fo:margin-bottom="0.212cm" fo:line-height="100%" fo:text-align="start" fo:text-indent="0cm" style:punctuation-wrap="hanging" loext:tab-stop-distance="0cm" style:writing-mode="lr-tb">
        <style:tab-stops/>
      </style:paragraph-properties>
    </style:style>
    <style:style style:name="MP17" style:family="paragraph">
      <style:paragraph-properties fo:margin-left="0cm" fo:margin-right="0cm" fo:margin-top="0.282cm" fo:margin-bottom="0.212cm" fo:line-height="100%" fo:text-align="start" fo:text-indent="0cm" style:punctuation-wrap="hanging" loext:tab-stop-distance="0cm" style:writing-mode="lr-tb">
        <style:tab-stops/>
      </style:paragraph-properties>
    </style:style>
    <style:style style:name="MP18" style:family="paragraph">
      <loext:graphic-properties draw:fill="solid" draw:fill-color="#bfbfbf" draw:opacity="100%"/>
      <style:paragraph-properties style:font-independent-line-spacing="true"/>
    </style:style>
    <style:style style:name="MP19" style:family="paragraph">
      <loext:graphic-properties draw:fill="none"/>
    </style:style>
    <style:style style:name="M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fo:font-size="18pt"/>
    </style:style>
    <style:style style:name="MP21" style:family="paragraph">
      <loext:graphic-properties draw:fill="solid" draw:fill-color="#d9d9d9" draw:opacity="100%"/>
      <style:paragraph-properties style:font-independent-line-spacing="true"/>
      <style:text-properties fo:language="es" fo:country="ES"/>
    </style:style>
    <style:style style:name="MP22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23" style:family="paragraph">
      <style:paragraph-properties fo:text-align="end"/>
    </style:style>
    <style:style style:name="MP24" style:family="paragraph">
      <loext:graphic-properties draw:fill="none"/>
      <style:paragraph-properties fo:text-align="center"/>
    </style:style>
    <style:style style:name="MP25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MP26" style:family="paragraph">
      <loext:graphic-properties draw:fill="solid" draw:fill-color="#000000" draw:opacity="100%"/>
      <style:paragraph-properties style:writing-mode="lr-tb" style:font-independent-line-spacing="true"/>
      <style:text-properties fo:language="es" fo:country="ES"/>
    </style:style>
    <style:style style:name="MP2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d1282e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8" style:family="text">
      <style:text-properties fo:text-transform="uppercase" fo:color="#000000" loext:opacity="100%" style:text-line-through-style="none" style:text-line-through-type="none" style:text-position="0% 100%" style:font-name="Arial Black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88pt" style:font-style-asian="normal" style:font-weight-asian="normal" style:font-size-complex="88pt" style:font-style-complex="normal" style:font-weight-complex="normal"/>
    </style:style>
    <style:style style:name="MT9" style:family="text">
      <style:text-properties fo:text-transform="uppercase" fo:color="#d1282e" loext:opacity="100%" style:text-line-through-style="none" style:text-line-through-type="none" style:text-position="0% 100%" style:font-name="Arial Black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8pt" style:font-style-asian="normal" style:font-weight-asian="bold" style:font-size-complex="28pt" style:font-style-complex="normal" style:font-weight-complex="bold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MT19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8pt" style:font-style-asian="normal" style:font-weight-asian="normal" style:font-size-complex="28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23" style:family="text">
      <style:text-properties fo:text-transform="uppercase" fo:color="#d1282e" loext:opacity="100%" style:text-line-through-style="none" style:text-line-through-type="none" style:text-position="0% 100%" style:font-name="Arial Black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MT24" style:family="text">
      <style:text-properties fo:font-variant="normal" fo:text-transform="none" fo:color="#ff0000" loext:opacity="100%" style:text-line-through-style="none" style:text-line-through-type="none" style:text-position="0% 100%" style:font-name="Gill Sans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25" style:family="text">
      <style:text-properties fo:font-variant="normal" fo:text-transform="none" fo:color="#d1282e" loext:opacity="100%" style:text-line-through-style="none" style:text-line-through-type="none" style:text-position="0% 100%" style:font-name="Gill Sans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MT26" style:family="text">
      <style:text-properties fo:color="#ff0000" loext:opacity="100%" fo:font-size="20pt" fo:font-weight="bold" style:font-size-asian="20pt" style:font-weight-asian="bold" style:font-size-complex="20pt" style:font-weight-complex="bold"/>
    </style:style>
    <style:style style:name="MT27" style:family="text">
      <style:text-properties fo:color="#ff0000" loext:opacity="100%" fo:font-size="18pt" fo:font-weight="bold" style:font-size-asian="18pt" style:font-weight-asian="bold" style:font-size-complex="18pt" style:font-weight-complex="bold"/>
    </style:style>
    <style:style style:name="MT28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aster1-Esencia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6" draw:layer="backgroundobjects" svg:width="16.087cm" svg:height="3.81cm" svg:x="1.27cm" svg:y="0.423cm" presentation:class="title">
        <draw:text-box>
          <text:p text:style-name="MP5"><text:span text:style-name="MT2">Clic para editar título</text:span></text:p>
        </draw:text-box>
      </draw:frame>
      <draw:frame draw:name="Text Placeholder 2" presentation:style-name="Mpr2" draw:text-style-name="MP6" draw:layer="backgroundobjects" svg:width="21.167cm" svg:height="12.149cm" svg:x="1.27cm" svg:y="4.868cm" presentation:class="outline">
        <draw:text-box>
          <text:list text:style-name="ML2">
            <text:list-item>
              <text:p text:style-name="MP7"><text:span text:style-name="MT3">Haga clic para modificar el estilo de texto del patrón</text:span></text:p>
              <text:list>
                <text:list-item>
                  <text:p text:style-name="MP8"><text:span text:style-name="MT4">Segundo nivel</text:span></text:p>
                  <text:list>
                    <text:list-item>
                      <text:p text:style-name="MP9"><text:span text:style-name="MT5">Tercer nivel</text:span></text:p>
                      <text:list>
                        <text:list-item>
                          <text:p text:style-name="MP10"><text:span text:style-name="MT5">Cuarto nivel</text:span></text:p>
                          <text:list>
                            <text:list-item>
                              <text:p text:style-name="MP11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6-01-21">1/21/26</text:date></text:span></text:p>
        </draw:text-box>
      </draw:frame>
      <draw:frame draw:name="Footer Placeholder 4" presentation:style-name="Mpr4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custom-shape draw:name="Rectangle 6" draw:style-name="Mgr3" draw:text-style-name="MP12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Esencial-title" draw:layer="backgroundobjects" svg:width="18.624cm" svg:height="10.476cm" svg:x="1.482cm" svg:y="2.123cm" presentation:class="page"/>
        <draw:frame presentation:style-name="Master1-Esencial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8" draw:style-name="Mgr3" draw:text-style-name="MP12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8" draw:text-style-name="MP6" draw:layer="backgroundobjects" svg:width="21.59cm" svg:height="12.7cm" svg:x="1.27cm" svg:y="0.635cm" presentation:class="title">
        <draw:text-box>
          <text:p text:style-name="MP5"><text:span text:style-name="MT8">Click to edit Master title style</text:span></text:p>
        </draw:text-box>
      </draw:frame>
      <draw:frame draw:name="Subtitle 2" presentation:style-name="Mpr9" draw:text-style-name="MP6" draw:layer="backgroundobjects" svg:width="19.05cm" svg:height="2.54cm" svg:x="1.27cm" svg:y="13.335cm" presentation:class="subtitle">
        <draw:text-box>
          <text:p text:style-name="MP7"><text:span text:style-name="MT9">Click to edit Master subtitle style</text:span></text:p>
        </draw:text-box>
      </draw:frame>
      <draw:frame draw:name="Date Placeholder 3" presentation:style-name="Mpr1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6-01-21">1/21/26</text:date></text:span></text:p>
        </draw:text-box>
      </draw:frame>
      <draw:frame draw:name="Footer Placeholder 4" presentation:style-name="Mpr1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10"><text:page-number>&lt;number&gt;</text:page-number></text:span></text:p>
        </draw:text-box>
      </draw:frame>
      <draw:frame presentation:style-name="Master1-Layout1-title-Diapositiva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1-title-Diapositiva-de-título-title" draw:layer="backgroundobjects" svg:width="0.001cm" svg:height="0.001cm" svg:x="0cm" svg:y="2.123cm" presentation:class="page"/>
        <draw:frame presentation:style-name="Master1-Layout1-title-Diapositiva-de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5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16" draw:text-style-name="MP6" draw:layer="backgroundobjects" svg:width="21.167cm" svg:height="12.149cm" svg:x="1.27cm" svg:y="4.868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17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6-01-21">1/21/26</text:date></text:span></text:p>
        </draw:text-box>
      </draw:frame>
      <draw:frame draw:name="Footer Placeholder 4" presentation:style-name="Mpr18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9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-title" draw:layer="backgroundobjects" svg:width="0.001cm" svg:height="0.001cm" svg:x="0cm" svg:y="2.123cm" presentation:class="page"/>
        <draw:frame presentation:style-name="Master1-Layout2-obj-Título-y-objetos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2" draw:text-style-name="MP6" draw:layer="backgroundobjects" svg:width="21.59cm" svg:height="12.003cm" svg:x="1.27cm" svg:y="4.022cm" presentation:class="title">
        <draw:text-box>
          <text:p text:style-name="MP5"><text:span text:style-name="MT8">Click to edit Master title style</text:span></text:p>
        </draw:text-box>
      </draw:frame>
      <draw:frame draw:name="Text Placeholder 2" presentation:style-name="Mpr23" draw:text-style-name="MP6" draw:layer="backgroundobjects" svg:width="21.59cm" svg:height="2.963cm" svg:x="1.27cm" svg:y="0.635cm" presentation:class="outline">
        <draw:text-box>
          <text:list text:style-name="ML2">
            <text:list-item>
              <text:p text:style-name="MP7"><text:span text:style-name="MT9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6-01-21">1/21/26</text:date></text:span></text:p>
        </draw:text-box>
      </draw:frame>
      <draw:frame draw:name="Footer Placeholder 4" presentation:style-name="Mpr25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6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Encabezado-de-sección-title" draw:layer="backgroundobjects" svg:width="0.001cm" svg:height="0.001cm" svg:x="0cm" svg:y="2.123cm" presentation:class="page"/>
        <draw:frame presentation:style-name="Master1-Layout3-secHead-Encabezado-de-sección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7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8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9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30" draw:text-style-name="MP6" draw:layer="backgroundobjects" svg:width="9.144cm" svg:height="12.572cm" svg:x="4.53cm" svg:y="4.374cm" presentation:class="title">
        <draw:text-box>
          <text:p text:style-name="MP14"><text:span text:style-name="MT15">Edit Master text styles</text:span><text:span text:style-name="MT15"><text:line-break/></text:span><text:span text:style-name="MT16">Second level</text:span><text:span text:style-name="MT16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0" draw:text-style-name="MP6" draw:layer="backgroundobjects" svg:width="9.144cm" svg:height="12.572cm" svg:x="14.139cm" svg:y="4.374cm" presentation:class="title">
        <draw:text-box>
          <text:p text:style-name="MP14"><text:span text:style-name="MT15">Edit Master text styles</text:span><text:span text:style-name="MT15"><text:line-break/></text:span><text:span text:style-name="MT16">Second level</text:span><text:span text:style-name="MT16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1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6-01-21">1/21/26</text:date></text:span></text:p>
        </draw:text-box>
      </draw:frame>
      <draw:frame draw:name="Footer Placeholder 4" presentation:style-name="Mpr32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3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4-twoObj-Dos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4-twoObj-Dos-objetos-title" draw:layer="backgroundobjects" svg:width="0.001cm" svg:height="0.001cm" svg:x="0cm" svg:y="2.123cm" presentation:class="page"/>
        <draw:frame presentation:style-name="Master1-Layout4-twoObj-Dos-objetos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9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10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6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Text Placeholder 2" presentation:style-name="Mpr37" draw:text-style-name="MP6" draw:layer="backgroundobjects" svg:width="9.144cm" svg:height="1.777cm" svg:x="4.521cm" svg:y="4.369cm" presentation:class="outline">
        <draw:text-box>
          <text:list text:style-name="ML2">
            <text:list-item>
              <text:p text:style-name="MP15"><text:span text:style-name="MT17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9.144cm" svg:height="10.668cm" svg:x="4.521cm" svg:y="6.276cm" presentation:class="title">
        <draw:text-box>
          <text:p text:style-name="MP16"><text:span text:style-name="MT10">Edit Master text styles</text:span><text:span text:style-name="MT10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4" presentation:style-name="Mpr37" draw:text-style-name="MP6" draw:layer="backgroundobjects" svg:width="9.144cm" svg:height="1.777cm" svg:x="14.148cm" svg:y="4.369cm" presentation:class="outline">
        <draw:text-box>
          <text:list text:style-name="ML4">
            <text:list-item>
              <text:p text:style-name="MP15"><text:span text:style-name="MT19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9.144cm" svg:height="10.668cm" svg:x="14.148cm" svg:y="6.276cm" presentation:class="title">
        <draw:text-box>
          <text:p text:style-name="MP16"><text:span text:style-name="MT10">Edit Master text styles</text:span><text:span text:style-name="MT10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Date Placeholder 3" presentation:style-name="Mpr39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6-01-21">1/21/26</text:date></text:span></text:p>
        </draw:text-box>
      </draw:frame>
      <draw:frame draw:name="Footer Placeholder 4" presentation:style-name="Mpr40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1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ación-title" draw:layer="backgroundobjects" svg:width="0.001cm" svg:height="0.001cm" svg:x="0cm" svg:y="2.123cm" presentation:class="page"/>
        <draw:frame presentation:style-name="Master1-Layout5-twoTxTwoObj-Comparación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5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6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4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Date Placeholder 3" presentation:style-name="Mpr45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6-01-21">1/21/26</text:date></text:span></text:p>
        </draw:text-box>
      </draw:frame>
      <draw:frame draw:name="Footer Placeholder 4" presentation:style-name="Mpr46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6-titleOnly-Sólo-el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6-titleOnly-Sólo-el-título-title" draw:layer="backgroundobjects" svg:width="0.001cm" svg:height="0.001cm" svg:x="0cm" svg:y="2.123cm" presentation:class="page"/>
        <draw:frame presentation:style-name="Master1-Layout6-titleOnly-Sólo-el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4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4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5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6-01-21">1/21/26</text:date></text:span></text:p>
        </draw:text-box>
      </draw:frame>
      <draw:frame draw:name="Footer Placeholder 4" presentation:style-name="Mpr5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7-blank-En-blanco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En-bl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7-blank-En-blanco-title" draw:layer="backgroundobjects" svg:width="0.001cm" svg:height="0.001cm" svg:x="0cm" svg:y="2.123cm" presentation:class="page"/>
        <draw:frame presentation:style-name="Master1-Layout7-blank-En-blanco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8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55" draw:text-style-name="MP6" draw:layer="backgroundobjects" svg:width="14.199cm" svg:height="12.446cm" svg:x="9.931cm" svg:y="4.445cm" presentation:class="title">
        <draw:text-box>
          <text:p text:style-name="MP17"><text:span text:style-name="MT20">Edit Master text styles</text:span><text:span text:style-name="MT20"><text:line-break/></text:span><text:span text:style-name="MT21">Second level</text:span><text:span text:style-name="MT21"><text:line-break/></text:span><text:span text:style-name="MT16">Third level</text:span><text:span text:style-name="MT16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Text Placeholder 3" presentation:style-name="Mpr56" draw:text-style-name="MP6" draw:layer="backgroundobjects" svg:width="8.356cm" svg:height="12.446cm" svg:x="1.27cm" svg:y="4.445cm" presentation:class="outline">
        <draw:text-box>
          <text:list text:style-name="ML2">
            <text:list-item>
              <text:p text:style-name="MP15"><text:span text:style-name="MT22">Edit Master text styles</text:span></text:p>
            </text:list-item>
          </text:list>
        </draw:text-box>
      </draw:frame>
      <draw:frame draw:name="Title 7" presentation:style-name="Mpr57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Date Placeholder 3" presentation:style-name="Mpr58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6-01-21">1/21/26</text:date></text:span></text:p>
        </draw:text-box>
      </draw:frame>
      <draw:frame draw:name="Footer Placeholder 4" presentation:style-name="Mpr59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ido-con-título-title" draw:layer="backgroundobjects" svg:width="0.001cm" svg:height="0.001cm" svg:x="0cm" svg:y="2.123cm" presentation:class="page"/>
        <draw:frame presentation:style-name="Master1-Layout8-objTx-Contenido-con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6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8" draw:style-name="Mgr3" draw:text-style-name="MP12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63" draw:text-style-name="MP18" draw:layer="backgroundobjects" svg:width="25.002cm" svg:height="13.462cm" svg:x="0cm" svg:y="0cm" presentation:class="title">
        <draw:text-box>
          <text:p text:style-name="MP17"><text:span text:style-name="MT20">Click icon to add picture</text:span></text:p>
        </draw:text-box>
      </draw:frame>
      <draw:frame draw:name="Text Placeholder 3" presentation:style-name="Mpr64" draw:text-style-name="MP6" draw:layer="backgroundobjects" svg:width="22.648cm" svg:height="1.27cm" svg:x="1.27cm" svg:y="15.875cm" presentation:class="outline">
        <draw:text-box>
          <text:list text:style-name="ML2">
            <text:list-item>
              <text:p text:style-name="MP15"><text:span text:style-name="MT22">Edit Master text styles</text:span></text:p>
            </text:list-item>
          </text:list>
        </draw:text-box>
      </draw:frame>
      <draw:frame draw:name="Title 7" presentation:style-name="Mpr65" draw:text-style-name="MP6" draw:layer="backgroundobjects" svg:width="22.648cm" svg:height="2.117cm" svg:x="1.27cm" svg:y="13.758cm" presentation:class="title">
        <draw:text-box>
          <text:p text:style-name="MP5"><text:span text:style-name="MT23">Click to edit Master title style</text:span></text:p>
        </draw:text-box>
      </draw:frame>
      <draw:frame draw:name="Date Placeholder 4" presentation:style-name="Mpr66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6-01-21">1/21/26</text:date></text:span></text:p>
        </draw:text-box>
      </draw:frame>
      <draw:frame draw:name="Footer Placeholder 5" presentation:style-name="Mpr67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68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10"><text:page-number>&lt;number&gt;</text:page-number></text:span></text:p>
        </draw:text-box>
      </draw:frame>
      <presentation:notes style:page-layout-name="PM0">
        <draw:page-thumbnail presentation:style-name="Master1-Layout9-picTx-Imagen-con-título-title" draw:layer="backgroundobjects" svg:width="0.001cm" svg:height="0.001cm" svg:x="0cm" svg:y="2.123cm" presentation:class="page"/>
        <draw:frame presentation:style-name="Master1-Layout9-picTx-Imagen-con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6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71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Vertical Text Placeholder 2" presentation:style-name="Mpr72" draw:text-style-name="MP6" draw:layer="backgroundobjects" svg:width="21.167cm" svg:height="12.149cm" svg:x="1.27cm" svg:y="4.868cm" presentation:class="outline">
        <draw:text-box>
          <text:list text:style-name="ML2">
            <text:list-item>
              <text:p text:style-name="MP7"><text:span text:style-name="MT12">Edit Master text styles</text:span></text:p>
              <text:list>
                <text:list-item>
                  <text:p text:style-name="MP8"><text:span text:style-name="MT13">Second level</text:span></text:p>
                  <text:list>
                    <text:list-item>
                      <text:p text:style-name="MP9"><text:span text:style-name="MT14">T</text:span><text:span text:style-name="MT14">h</text:span><text:span text:style-name="MT14">i</text:span><text:span text:style-name="MT14">r</text:span><text:span text:style-name="MT14">d</text:span><text:span text:style-name="MT14"> </text:span><text:span text:style-name="MT14">l</text:span><text:span text:style-name="MT14">e</text:span><text:span text:style-name="MT14">v</text:span><text:span text:style-name="MT14">e</text:span><text:span text:style-name="MT14">l</text:span></text:p>
                      <text:list>
                        <text:list-item>
                          <text:p text:style-name="MP10"><text:span text:style-name="MT14">F</text:span><text:span text:style-name="MT14">o</text:span><text:span text:style-name="MT14">u</text:span><text:span text:style-name="MT14">r</text:span><text:span text:style-name="MT14">t</text:span><text:span text:style-name="MT14">h</text:span><text:span text:style-name="MT14"> </text:span><text:span text:style-name="MT14">l</text:span><text:span text:style-name="MT14">e</text:span><text:span text:style-name="MT14">v</text:span><text:span text:style-name="MT14">e</text:span><text:span text:style-name="MT14">l</text:span></text:p>
                          <text:list>
                            <text:list-item>
                              <text:p text:style-name="MP11"><text:span text:style-name="MT14">F</text:span><text:span text:style-name="MT14">i</text:span><text:span text:style-name="MT14">f</text:span><text:span text:style-name="MT14">t</text:span><text:span text:style-name="MT14">h</text:span><text:span text:style-name="MT14"> </text:span><text:span text:style-name="MT14">l</text:span><text:span text:style-name="MT14">e</text:span><text:span text:style-name="MT14">v</text:span><text:span text:style-name="MT14">e</text:span><text:span text:style-name="MT14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6-01-21">1/21/26</text:date></text:span></text:p>
        </draw:text-box>
      </draw:frame>
      <draw:frame draw:name="Footer Placeholder 4" presentation:style-name="Mpr74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75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ítulo-y-texto-vertical-title" draw:layer="backgroundobjects" svg:width="0.001cm" svg:height="0.001cm" svg:x="0cm" svg:y="2.123cm" presentation:class="page"/>
        <draw:frame presentation:style-name="Master1-Layout10-vertTx-Título-y-texto-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7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78" draw:text-style-name="MP6" draw:layer="backgroundobjects" svg:width="5.715cm" svg:height="16.254cm" svg:x="18.415cm" svg:y="0.763cm" presentation:class="title">
        <draw:text-box>
          <text:p text:style-name="MP5"><text:span text:style-name="MT11">Click to edit Master title style</text:span></text:p>
        </draw:text-box>
      </draw:frame>
      <draw:frame draw:name="Vertical Text Placeholder 2" presentation:style-name="Mpr79" draw:text-style-name="MP6" draw:layer="backgroundobjects" svg:width="16.722cm" svg:height="16.254cm" svg:x="1.27cm" svg:y="0.763cm" presentation:class="outline">
        <draw:text-box>
          <text:list text:style-name="ML2">
            <text:list-item>
              <text:p text:style-name="MP7"><text:span text:style-name="MT12">Edit Master text styles</text:span></text:p>
              <text:list>
                <text:list-item>
                  <text:p text:style-name="MP8"><text:span text:style-name="MT13">Second level</text:span></text:p>
                  <text:list>
                    <text:list-item>
                      <text:p text:style-name="MP9"><text:span text:style-name="MT14">T</text:span><text:span text:style-name="MT14">h</text:span><text:span text:style-name="MT14">i</text:span><text:span text:style-name="MT14">r</text:span><text:span text:style-name="MT14">d</text:span><text:span text:style-name="MT14"> </text:span><text:span text:style-name="MT14">l</text:span><text:span text:style-name="MT14">e</text:span><text:span text:style-name="MT14">v</text:span><text:span text:style-name="MT14">e</text:span><text:span text:style-name="MT14">l</text:span></text:p>
                      <text:list>
                        <text:list-item>
                          <text:p text:style-name="MP10"><text:span text:style-name="MT14">F</text:span><text:span text:style-name="MT14">o</text:span><text:span text:style-name="MT14">u</text:span><text:span text:style-name="MT14">r</text:span><text:span text:style-name="MT14">t</text:span><text:span text:style-name="MT14">h</text:span><text:span text:style-name="MT14"> </text:span><text:span text:style-name="MT14">l</text:span><text:span text:style-name="MT14">e</text:span><text:span text:style-name="MT14">v</text:span><text:span text:style-name="MT14">e</text:span><text:span text:style-name="MT14">l</text:span></text:p>
                          <text:list>
                            <text:list-item>
                              <text:p text:style-name="MP11"><text:span text:style-name="MT14">F</text:span><text:span text:style-name="MT14">i</text:span><text:span text:style-name="MT14">f</text:span><text:span text:style-name="MT14">t</text:span><text:span text:style-name="MT14">h</text:span><text:span text:style-name="MT14"> </text:span><text:span text:style-name="MT14">l</text:span><text:span text:style-name="MT14">e</text:span><text:span text:style-name="MT14">v</text:span><text:span text:style-name="MT14">e</text:span><text:span text:style-name="MT14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6-01-21">1/21/26</text:date></text:span></text:p>
        </draw:text-box>
      </draw:frame>
      <draw:frame draw:name="Footer Placeholder 4" presentation:style-name="Mpr8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Título-vertical-y-texto-title" draw:layer="backgroundobjects" svg:width="0.001cm" svg:height="0.001cm" svg:x="0cm" svg:y="2.123cm" presentation:class="page"/>
        <draw:frame presentation:style-name="Master1-Layout11-vertTitleAndTx-Título-vertical-y-texto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5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5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86" draw:text-style-name="MP6" draw:layer="backgroundobjects" svg:width="21.167cm" svg:height="12.149cm" svg:x="1.27cm" svg:y="4.868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87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6-01-21">1/21/26</text:date></text:span></text:p>
        </draw:text-box>
      </draw:frame>
      <draw:frame draw:name="Footer Placeholder 4" presentation:style-name="Mpr88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9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9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_5f__5f_" style:display-name="Master1-Layout2-obj-Título-y-objetos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5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2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93" draw:text-style-name="MP6" draw:layer="backgroundobjects" svg:width="8.382cm" svg:height="4.275cm" svg:x="0.254cm" svg:y="3.853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94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6-01-21">1/21/26</text:date></text:span></text:p>
        </draw:text-box>
      </draw:frame>
      <draw:frame draw:name="Footer Placeholder 4" presentation:style-name="Mpr95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6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_5f__5f_-outline1" draw:layer="backgroundobjects" svg:width="22.859cm" svg:height="11.048cm" svg:x="10.668cm" svg:y="5.334cm" presentation:class="outline" presentation:placeholder="true">
        <draw:text-box/>
      </draw:frame>
      <draw:custom-shape draw:name="Rectangle 7" draw:style-name="Mgr6" draw:text-style-name="MP13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Layout2-obj-Título-y-objetos_5f__5f_-title" draw:layer="backgroundobjects" svg:width="0.001cm" svg:height="0.001cm" svg:x="0cm" svg:y="2.123cm" presentation:class="page"/>
        <draw:frame presentation:style-name="Master1-Layout2-obj-Título-y-objetos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9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ángulo 9_19" draw:style-name="Mgr7" draw:text-style-name="MP13" draw:layer="backgroundobjects" svg:width="25.4cm" svg:height="2.381cm" svg:x="0.01cm" svg:y="16.669cm">
        <text:p/>
        <draw:enhanced-geometry svg:viewBox="0 0 21600 21600" draw:type="non-primitive" draw:enhanced-path="M 0 0 L 21600 0 21600 21600 0 21600 Z N"/>
      </draw:custom-shape>
      <draw:frame presentation:style-name="Mpr99" draw:layer="backgroundobjects" svg:width="22.859cm" svg:height="2.656cm" svg:x="1.27cm" svg:y="0.254cm" presentation:class="title">
        <draw:text-box>
          <text:p>Click to edit the title text format</text:p>
        </draw:text-box>
      </draw:frame>
      <draw:frame presentation:style-name="Default1-outline1" draw:layer="backgroundobjects" svg:width="22.859cm" svg:height="11.545cm" svg:x="1.27cm" svg:y="4.457cm" presentation:class="outline" presentation:placeholder="true">
        <draw:text-box/>
      </draw:frame>
      <draw:frame draw:name="Imagen 1_1" draw:style-name="Mgr8" draw:text-style-name="MP19" draw:layer="backgroundobjects" svg:width="5.009cm" svg:height="1.914cm" svg:x="0cm" svg:y="16.869cm">
        <draw:image xlink:href="Pictures/10006070000038A6000015883DB32451.emf" xlink:type="simple" xlink:show="embed" xlink:actuate="onLoad" draw:mime-type="image/x-emf">
          <text:p/>
        </draw:image>
        <draw:image xlink:href="Pictures/1000000100000224000000D0F767D6AC.png" xlink:type="simple" xlink:show="embed" xlink:actuate="onLoad" draw:mime-type="image/png"/>
        <svg:desc>logoURJC.eps</svg:desc>
      </draw:frame>
      <draw:frame draw:name="CuadroTexto 8_19" draw:style-name="Mgr9" draw:text-style-name="MP20" draw:layer="backgroundobjects" svg:width="13.742cm" svg:height="3.467cm" svg:x="11.662cm" svg:y="17.072cm">
        <draw:text-box>
          <text:p text:style-name="MP5"><text:span text:style-name="MT24">Oficina de Conocimiento y Cultura Libres</text:span></text:p>
          <text:p text:style-name="MP5"><text:span text:style-name="MT24"><text:a xlink:href="https://urjc.es/ofilibre" xlink:type="simple">https://urjc.es/ofilibre</text:a></text:span></text:p>
          <text:p text:style-name="MP5"><text:span text:style-name="MT25"/></text:p>
          <text:p text:style-name="MP5"><text:span text:style-name="MT25"/></text:p>
        </draw:text-box>
      </draw:frame>
      <draw:frame draw:name="Subtítulo 2_13" draw:style-name="Mgr10" draw:text-style-name="MP21" draw:layer="backgroundobjects" svg:width="14.16cm" svg:height="1.12cm" svg:x="0cm" svg:y="3.048cm">
        <draw:text-box>
          <text:p/>
        </draw:text-box>
      </draw:frame>
      <draw:custom-shape draw:name="Rectangle 6" draw:style-name="Mgr5" draw:text-style-name="MP22" draw:layer="backgroundobjects" svg:width="0.397cm" svg:height="3.81cm" svg:x="25.07cm" svg:y="0.00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69cm" svg:y="3.833cm">
        <text:p/>
        <draw:enhanced-geometry svg:viewBox="0 0 21600 21600" draw:type="non-primitive" draw:enhanced-path="M 0 0 L 21600 0 21600 21600 0 21600 Z N"/>
      </draw:custom-shape>
      <draw:frame presentation:style-name="Mpr100" draw:text-style-name="MP4" draw:layer="backgroundobjects" svg:width="5.259cm" svg:height="0.886cm" svg:x="5.712cm" svg:y="17.05cm">
        <draw:text-box>
          <text:p text:style-name="MP23"><text:span text:style-name="MT26"><text:date style:data-style-name="D4" text:date-value="2026-01-21">01/21/2026</text:date></text:span></text:p>
        </draw:text-box>
      </draw:frame>
      <draw:frame presentation:style-name="Mpr100" draw:text-style-name="MP4" draw:layer="backgroundobjects" svg:width="5.592cm" svg:height="0.86cm" svg:x="5.378cm" svg:y="17.936cm">
        <draw:text-box>
          <text:p text:style-name="MP23"><text:span text:style-name="MT27"><text:page-number>&lt;number&gt;</text:page-number></text:span><text:span text:style-name="MT27">/</text:span><text:span text:style-name="MT27"><text:page-count>27</text:page-count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ángulo 9_19" draw:style-name="Mgr7" draw:text-style-name="MP13" draw:layer="backgroundobjects" svg:width="25.4cm" svg:height="2.381cm" svg:x="0.01cm" svg:y="16.669cm">
        <text:p/>
        <draw:enhanced-geometry svg:viewBox="0 0 21600 21600" draw:type="non-primitive" draw:enhanced-path="M 0 0 L 21600 0 21600 21600 0 21600 Z N"/>
      </draw:custom-shape>
      <draw:frame presentation:style-name="Mpr103" draw:layer="backgroundobjects" svg:width="22.859cm" svg:height="2.656cm" svg:x="1.27cm" svg:y="0.254cm" presentation:class="title">
        <draw:text-box>
          <text:p>Click to edit the title text format</text:p>
        </draw:text-box>
      </draw:frame>
      <draw:frame presentation:style-name="Default-outline1" draw:layer="backgroundobjects" svg:width="22.859cm" svg:height="11.545cm" svg:x="1.27cm" svg:y="4.457cm" presentation:class="outline" presentation:placeholder="true">
        <draw:text-box/>
      </draw:frame>
      <draw:frame draw:name="CuadroTexto 8_19" draw:style-name="Mgr11" draw:text-style-name="MP20" draw:layer="backgroundobjects" svg:width="12.726cm" svg:height="1.778cm" svg:x="13.042cm" svg:y="16.987cm">
        <draw:text-box>
          <text:p text:style-name="MP5"><text:span text:style-name="MT24">Oficina de Conocimiento y Cultura Libres</text:span></text:p>
          <text:p text:style-name="MP5"><text:span text:style-name="MT24"><text:a xlink:href="https://ofilibre.urjc.es/" xlink:type="simple">https://ofilibre.urjc.es</text:a></text:span></text:p>
        </draw:text-box>
      </draw:frame>
      <draw:frame draw:name="Subtítulo 2_13" draw:style-name="Mgr10" draw:text-style-name="MP21" draw:layer="backgroundobjects" svg:width="14.16cm" svg:height="1.12cm" svg:x="0cm" svg:y="3.048cm">
        <draw:text-box>
          <text:p/>
        </draw:text-box>
      </draw:frame>
      <draw:custom-shape draw:name="Rectangle 6" draw:style-name="Mgr5" draw:text-style-name="MP22" draw:layer="backgroundobjects" svg:width="0.397cm" svg:height="3.81cm" svg:x="25.07cm" svg:y="0.00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69cm" svg:y="3.833cm">
        <text:p/>
        <draw:enhanced-geometry svg:viewBox="0 0 21600 21600" draw:type="non-primitive" draw:enhanced-path="M 0 0 L 21600 0 21600 21600 0 21600 Z N"/>
      </draw:custom-shape>
      <draw:frame presentation:style-name="Mpr104" draw:text-style-name="MP4" draw:layer="backgroundobjects" svg:width="4.243cm" svg:height="0.886cm" svg:x="8.693cm" svg:y="16.956cm">
        <draw:text-box>
          <text:p text:style-name="MP23"><text:span text:style-name="MT26"><text:date style:data-style-name="D4" text:date-value="2026-01-21">01/21/2026</text:date></text:span></text:p>
        </draw:text-box>
      </draw:frame>
      <draw:frame presentation:style-name="Mpr104" draw:text-style-name="MP4" draw:layer="backgroundobjects" svg:width="3.712cm" svg:height="0.86cm" svg:x="9.268cm" svg:y="17.936cm">
        <draw:text-box>
          <text:p text:style-name="MP23"><text:span text:style-name="MT27"><text:page-number>&lt;number&gt;</text:page-number></text:span><text:span text:style-name="MT27">/</text:span><text:span text:style-name="MT27"><text:page-count>27</text:page-count></text:span></text:p>
        </draw:text-box>
      </draw:frame>
      <draw:frame draw:style-name="Mgr12" draw:text-style-name="MP24" draw:layer="backgroundobjects" svg:width="8.697cm" svg:height="2.124cm" svg:x="0.291cm" svg:y="16.839cm">
        <draw:image xlink:href="Pictures/1000000100000333000000C8C39BB24A.png" xlink:type="simple" xlink:show="embed" xlink:actuate="onLoad" draw:mime-type="image/pn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0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7" draw:style-name="Mgr6" draw:text-style-name="MP25" draw:layer="backgroundobjects" svg:width="0.397cm" svg:height="15.24cm" svg:x="25.033cm" svg:y="3.595cm">
        <text:p/>
        <draw:enhanced-geometry svg:viewBox="0 0 21600 21600" draw:type="non-primitive" draw:enhanced-path="M 0 0 L 21600 0 21600 21600 0 21600 Z N"/>
      </draw:custom-shape>
      <draw:custom-shape draw:name="Rectángulo 9_ 3" draw:style-name="Mgr7" draw:text-style-name="MP26" draw:layer="backgroundobjects" svg:width="25.4cm" svg:height="2.381cm" svg:x="0.035cm" svg:y="16.733cm">
        <text:p/>
        <draw:enhanced-geometry svg:viewBox="0 0 21600 21600" draw:type="non-primitive" draw:enhanced-path="M 0 0 L 21600 0 21600 21600 0 21600 Z N"/>
      </draw:custom-shape>
      <draw:frame presentation:style-name="Mpr107" draw:layer="backgroundobjects" svg:width="22.859cm" svg:height="3.18cm" svg:x="1.27cm" svg:y="0.122cm" presentation:class="title">
        <draw:text-box>
          <text:p>Click to edit the title text format</text:p>
        </draw:text-box>
      </draw:frame>
      <draw:frame draw:style-name="Mgr13" draw:text-style-name="MP27" draw:layer="backgroundobjects" svg:width="22.859cm" svg:height="11.048cm" svg:x="1.27cm" svg:y="4.457cm">
        <draw:text-box>
          <text:p/>
        </draw:text-box>
      </draw:frame>
      <draw:frame draw:style-name="Mgr12" draw:text-style-name="MP24" draw:layer="backgroundobjects" svg:width="8.697cm" svg:height="2.124cm" svg:x="0.29cm" svg:y="16.839cm">
        <draw:image xlink:href="Pictures/1000000100000333000000C8C39BB24A.png" xlink:type="simple" xlink:show="embed" xlink:actuate="onLoad" draw:mime-type="image/png">
          <text:p/>
        </draw:image>
      </draw:frame>
      <draw:frame draw:name="CuadroTexto 8_19" draw:style-name="Mgr9" draw:text-style-name="MP20" draw:layer="backgroundobjects" svg:width="13.742cm" svg:height="3.467cm" svg:x="11.908cm" svg:y="17.073cm">
        <draw:text-box>
          <text:p text:style-name="MP5"><text:span text:style-name="MT24">Oficina de Conocimiento y Cultura Libres</text:span></text:p>
          <text:p text:style-name="MP5"><text:span text:style-name="MT24"><text:a xlink:href="https://ofilibre.urjc.es/" xlink:type="simple">https://ofilibre.urjc.es</text:a></text:span></text:p>
          <text:p text:style-name="MP5"><text:span text:style-name="MT25"/></text:p>
          <text:p text:style-name="MP5"><text:span text:style-name="MT25"/></text:p>
        </draw:text-box>
      </draw:frame>
      <draw:frame draw:name="Subtítulo 2_13" draw:style-name="Mgr10" draw:text-style-name="MP21" draw:layer="backgroundobjects" svg:width="14.16cm" svg:height="1.12cm" svg:x="0cm" svg:y="3.171cm">
        <draw:text-box>
          <text:p/>
        </draw:text-box>
      </draw:frame>
      <draw:frame draw:style-name="Mgr14" draw:text-style-name="MP4" draw:layer="backgroundobjects" svg:width="3.205cm" svg:height="2.032cm" svg:x="8.987cm" svg:y="16.875cm">
        <draw:text-box>
          <text:p text:style-name="MP23"><text:span text:style-name="MT28">2026-01-22</text:span></text:p>
          <text:p text:style-name="MP23"><text:span text:style-name="MT28"/></text:p>
          <text:p text:style-name="MP23"><text:span text:style-name="MT28"><text:page-number>&lt;number&gt;</text:page-number></text:span><text:span text:style-name="MT28">/</text:span><text:span text:style-name="MT28"><text:page-count>27</text:page-count></text:span></text:p>
        </draw:text-box>
      </draw:frame>
      <draw:custom-shape draw:name="Rectangle 6" draw:style-name="Mgr5" draw:text-style-name="MP12" draw:layer="backgroundobjects" svg:width="0.397cm" svg:height="3.81cm" svg:x="25.033cm" svg:y="-0.092cm">
        <text:p/>
        <draw:enhanced-geometry svg:viewBox="0 0 21600 21600" draw:type="non-primitive" draw:enhanced-path="M 0 0 L 21600 0 21600 21600 0 21600 Z N"/>
      </draw:custom-shape>
      <draw:frame presentation:style-name="Default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0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title>OfiLibre URJC (Presentación)</dc:title>
    <meta:initial-creator>Manuel Gertrudix Barrio</meta:initial-creator>
    <meta:creation-date>2019-01-21T12:01:12Z</meta:creation-date>
    <dc:date>2026-01-21T00:34:57.114480443</dc:date>
    <meta:editing-cycles>26</meta:editing-cycles>
    <meta:editing-duration>PT5H4M28S</meta:editing-duration>
    <dc:creator>Jesus Gonzalez-Barahona</dc:creator>
    <meta:document-statistic meta:object-count="397"/>
    <meta:template xlink:type="simple" xlink:actuate="onRequest" xlink:title="" xlink:href="../presentaciones/Ofilibre-presentacion.odp/Esencial"/>
  </office:meta>
</office:document-meta>
</file>