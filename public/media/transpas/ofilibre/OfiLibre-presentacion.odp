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360000049870DC883E.png" manifest:media-type="image/png"/>
  <manifest:file-entry manifest:full-path="Pictures/10000001000002A4000000C7EBD9225E.png" manifest:media-type="image/png"/>
  <manifest:file-entry manifest:full-path="Pictures/1000000100000690000003EC23375696.png" manifest:media-type="image/png"/>
  <manifest:file-entry manifest:full-path="Pictures/100000000000007F0000007FD226DE4F.png" manifest:media-type="image/png"/>
  <manifest:file-entry manifest:full-path="Pictures/10000001000006900000026C51375833.png" manifest:media-type="image/png"/>
  <manifest:file-entry manifest:full-path="Pictures/100000010000014000000071C893EDEA.png" manifest:media-type="image/png"/>
  <manifest:file-entry manifest:full-path="Pictures/1000000100000333000000C8C39BB24A.png" manifest:media-type="image/png"/>
  <manifest:file-entry manifest:full-path="Pictures/1000000100000224000000D00984F657.png" manifest:media-type="image/png"/>
  <manifest:file-entry manifest:full-path="Pictures/10006070000038A6000015883DB32451.emf" manifest:media-type="image/x-emf"/>
  <manifest:file-entry manifest:full-path="Pictures/1000000100000489000001CDF7562C6B.png" manifest:media-type="image/png"/>
  <manifest:file-entry manifest:full-path="Pictures/100000000000078000000387F062883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 Black" svg:font-family="'Aria Black'"/>
    <style:font-face style:name="Arial" svg:font-family="Arial"/>
    <style:font-face style:name="Arial Black" svg:font-family="'Arial Black'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ill Sans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family-generic="swiss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 loext:decorative="false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9.198cm" loext:decorative="false"/>
      <style:paragraph-properties style:writing-mode="lr-tb"/>
    </style:style>
    <style:style style:name="gr12" style:family="graphic" style:parent-style-name="standard" style:list-style-name="L3">
      <style:graphic-properties svg:stroke-color="#ffffff" draw:fill="solid" draw:fill-color="#ffffff" fo:min-height="12.661cm" loext:decorative="false"/>
      <style:paragraph-properties style:writing-mode="lr-tb"/>
    </style:style>
    <style:style style:name="gr13" style:family="graphic" style:parent-style-name="standard" style:list-style-name="L3">
      <style:graphic-properties svg:stroke-color="#ffffff" draw:fill-color="#ffffff" fo:min-height="9.95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5" style:family="graphic" style:parent-style-name="standard" style:list-style-name="L3">
      <style:graphic-properties svg:stroke-color="#ffffff" draw:fill-color="#ffffff" fo:min-height="11.377cm" loext:decorative="false"/>
      <style:paragraph-properties style:writing-mode="lr-tb"/>
    </style:style>
    <style:style style:name="gr16" style:family="graphic" style:parent-style-name="standard">
      <style:graphic-properties svg:stroke-color="#ffffff" draw:fill-color="#ffffff" fo:min-height="12.478cm" loext:decorative="false"/>
      <style:paragraph-properties style:writing-mode="lr-tb"/>
    </style:style>
    <style:style style:name="gr17" style:family="graphic" style:parent-style-name="standard">
      <style:graphic-properties svg:stroke-color="#ffffff" draw:fill-color="#ffffff" fo:min-height="12.00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7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9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4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359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95cm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789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33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329cm" loext:decorative="false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loext:tab-stop-distance="0cm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loext:tab-stop-distance="0cm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loext:tab-stop-distance="0c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  <style:text-properties fo:language="es" fo:country="ES"/>
    </style:style>
    <style:style style:name="P12" style:family="paragraph">
      <loext:graphic-properties draw:fill-color="#ffffff"/>
      <style:text-properties fo:language="es" fo:country="ES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style:font-independent-line-spacing="true"/>
      <style:text-properties fo:language="es" fo:country="ES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language="es" fo:country="ES"/>
    </style:style>
    <style:style style:name="P16" style:family="paragraph">
      <loext:graphic-properties draw:fill-color="#ffffff"/>
      <style:text-properties fo:font-size="20pt" fo:language="es" fo:country="ES"/>
    </style:style>
    <style:style style:name="P17" style:family="paragraph">
      <style:paragraph-properties style:writing-mode="lr-tb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 fo:language="es" fo:country="ES"/>
    </style:style>
    <style:style style:name="P19" style:family="paragraph">
      <loext:graphic-properties draw:fill="none" draw:fill-color="#ffffff"/>
      <style:text-properties style:font-name="Liberation Sans" fo:font-size="22pt" fo:language="es" fo:country="ES" fo:font-weight="bold" style:font-size-asian="22pt" style:font-weight-asian="bold" style:font-size-complex="22pt" style:font-weight-complex="bold"/>
    </style:style>
    <style:style style:name="P20" style:family="paragraph">
      <style:paragraph-properties fo:margin-top="0.5cm" fo:margin-bottom="0cm"/>
    </style:style>
    <style:style style:name="P21" style:family="paragraph">
      <style:paragraph-properties fo:margin-top="0.5cm" fo:margin-bottom="0cm" fo:text-align="end"/>
    </style:style>
    <style:style style:name="P22" style:family="paragraph">
      <loext:graphic-properties draw:fill="none"/>
      <style:paragraph-properties fo:margin-top="0.5cm" fo:margin-bottom="0cm"/>
      <style:text-properties style:font-name="Liberation Sans" fo:font-size="32pt" fo:language="es" fo:country="ES" style:font-size-asian="32pt" style:font-size-complex="32pt"/>
    </style:style>
    <style:style style:name="P23" style:family="paragraph">
      <loext:graphic-properties draw:fill="none"/>
      <style:paragraph-properties fo:margin-left="0cm" fo:margin-right="0cm" fo:margin-top="0.508cm" fo:margin-bottom="0cm" fo:text-align="start" fo:text-indent="0cm" style:font-independent-line-spacing="true"/>
      <style:text-properties fo:language="es" fo:country="ES"/>
    </style:style>
    <style:style style:name="P24" style:family="paragraph">
      <loext:graphic-properties draw:fill="solid" draw:fill-color="#ffffff"/>
      <style:text-properties style:font-name="Liberation Sans" fo:font-size="32pt" fo:language="es" fo:country="ES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fffff"/>
      <style:text-properties style:font-name="Liberation Sans" fo:font-size="36pt" fo:language="es" fo:country="ES" style:font-size-asian="36pt" style:font-size-complex="36pt"/>
    </style:style>
    <style:style style:name="P26" style:family="paragraph">
      <loext:graphic-properties draw:fill="none" draw:fill-color="#ffffff"/>
      <style:text-properties fo:color="#c9211e" loext:opacity="100%" fo:font-size="36pt" fo:language="es" fo:country="ES" fo:font-weight="bold"/>
    </style:style>
    <style:style style:name="P27" style:family="paragraph">
      <style:paragraph-properties fo:text-align="center"/>
    </style:style>
    <style:style style:name="P28" style:family="paragraph">
      <loext:graphic-properties draw:fill-color="#ffffff"/>
      <style:text-properties style:font-name="Liberation Sans" fo:font-size="28pt" fo:language="es" fo:country="ES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end"/>
      <style:text-properties fo:font-size="18pt" fo:language="es" fo:country="ES"/>
    </style:style>
    <style:style style:name="P30" style:family="paragraph">
      <loext:graphic-properties draw:fill="none" draw:fill-color="#ffffff"/>
      <style:text-properties fo:font-size="18pt" fo:language="es" fo:country="ES"/>
    </style:style>
    <style:style style:name="P31" style:family="paragraph">
      <style:paragraph-properties fo:margin-left="0cm" fo:margin-right="0cm" fo:margin-top="0cm" fo:margin-bottom="0cm" fo:line-height="100%" fo:text-align="justify" fo:text-indent="0cm" style:punctuation-wrap="hanging" loext:tab-stop-distance="0cm" style:writing-mode="lr-tb">
        <style:tab-stops/>
      </style:paragraph-properties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/>
      <style:paragraph-properties style:font-independent-line-spacing="true"/>
      <style:text-properties fo:language="es" fo:country="ES" fo:font-style="italic" style:font-style-asian="italic" style:font-style-complex="italic"/>
    </style:style>
    <style:style style:name="P34" style:family="paragraph">
      <style:paragraph-properties fo:text-align="end" style:writing-mode="lr-tb"/>
    </style:style>
    <style:style style:name="P35" style:family="paragraph">
      <style:paragraph-properties fo:text-align="center" style:writing-mode="lr-tb"/>
    </style:style>
    <style:style style:name="P36" style:family="paragraph">
      <style:paragraph-properties fo:margin-left="0cm" fo:margin-right="0cm" fo:margin-top="0.499cm" fo:margin-bottom="0cm" fo:text-indent="0cm" style:writing-mode="lr-tb"/>
    </style:style>
    <style:style style:name="P37" style:family="paragraph">
      <loext:graphic-properties draw:fill="none" draw:fill-color="#ffffff"/>
      <style:text-properties fo:color="#c9211e" loext:opacity="100%" style:font-name="Aria Black" fo:font-size="36pt" fo:language="es" fo:country="ES" fo:font-weight="bold"/>
    </style:style>
    <style:style style:name="P38" style:family="paragraph">
      <loext:graphic-properties draw:fill="none"/>
      <style:text-properties fo:color="#000000" loext:opacity="100%" style:font-name="Liberation Sans" fo:font-size="32pt" fo:language="es" fo:country="ES" fo:font-weight="bold"/>
    </style:style>
    <style:style style:name="P39" style:family="paragraph">
      <style:paragraph-properties fo:margin-left="0cm" fo:margin-right="0cm" fo:margin-top="0.5cm" fo:margin-bottom="0cm" fo:line-height="100%" fo:text-align="start" fo:text-indent="0cm"/>
    </style:style>
    <style:style style:name="P40" style:family="paragraph">
      <style:paragraph-properties fo:margin-left="0cm" fo:margin-right="0cm" fo:margin-top="0.5cm" fo:margin-bottom="0cm" fo:line-height="100%" fo:text-align="end" fo:text-indent="0cm"/>
    </style:style>
    <style:style style:name="P41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/>
      <style:text-properties style:font-name="Liberation Sans" fo:font-size="36pt" fo:language="es" fo:country="ES" fo:font-weight="normal" style:font-size-asian="36pt" style:font-weight-asian="normal" style:font-size-complex="36pt" style:font-weight-complex="normal"/>
    </style:style>
    <style:style style:name="P42" style:family="paragraph">
      <loext:graphic-properties draw:fill="none"/>
      <style:text-properties fo:font-size="18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 draw:fill-color="#ffffff"/>
      <style:text-properties fo:font-size="18pt"/>
    </style:style>
    <style:style style:name="P45" style:family="paragraph">
      <loext:graphic-properties draw:fill="none"/>
      <style:paragraph-properties fo:text-align="end" style:font-independent-line-spacing="true"/>
      <style:text-properties fo:language="es" fo:country="E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language="es" fo:country="ES" fo:font-style="italic" style:font-style-asian="italic" style:font-style-complex="italic"/>
    </style:style>
    <style:style style:name="T7" style:family="text">
      <style:text-properties fo:language="es" fo:country="ES" fo:font-style="italic" fo:background-color="#fff200" style:font-style-asian="italic" style:font-style-complex="italic"/>
    </style:style>
    <style:style style:name="T8" style:family="text">
      <style:text-properties fo:font-size="28pt" fo:language="es" fo:country="ES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size="116.199996948242pt" fo:language="es" fo:country="ES" style:font-size-asian="116.199996948242pt" style:font-size-complex="116.199996948242pt"/>
    </style:style>
    <style:style style:name="T11" style:family="text">
      <style:text-properties fo:font-size="40pt" fo:language="es" fo:country="ES" style:font-size-asian="40pt" style:font-size-complex="40pt"/>
    </style:style>
    <style:style style:name="T12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3" style:family="text">
      <style:text-properties fo:text-transform="uppercase" fo:color="#000000" loext:opacity="100%" style:text-line-through-style="none" style:text-line-through-type="none" style:text-position="0% 100%" style:font-name="Arial Black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style:font-name="Liberation Sans" fo:font-size="22pt" fo:language="es" fo:country="ES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s" fo:country="ES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8" style:family="text">
      <style:text-properties style:font-name="Liberation Sans" fo:font-size="32pt" fo:language="es" fo:country="ES" fo:font-weight="normal" style:font-size-asian="32pt" style:font-weight-asian="normal" style:font-size-complex="32pt" style:font-weight-complex="normal"/>
    </style:style>
    <style:style style:name="T19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Liberation Sans" fo:font-size="36pt" fo:language="es" fo:country="ES" style:font-size-asian="36pt" style:font-size-complex="36pt"/>
    </style:style>
    <style:style style:name="T21" style:family="text">
      <style:text-properties fo:color="#c9211e" loext:opacity="100%" fo:font-size="36pt" fo:language="es" fo:country="ES" fo:font-weight="bold"/>
    </style:style>
    <style:style style:name="T22" style:family="text">
      <style:text-properties style:font-name="Liberation Sans" fo:font-size="36pt" fo:language="es" fo:country="ES" fo:font-weight="normal" style:font-size-asian="22pt" style:font-weight-asian="normal" style:font-size-complex="22pt" style:font-weight-complex="normal"/>
    </style:style>
    <style:style style:name="T23" style:family="text">
      <style:text-properties style:font-name="Liberation Sans" fo:font-size="28pt" fo:language="es" fo:country="ES" fo:font-weight="normal" style:font-weight-asian="normal" style:font-weight-complex="normal"/>
    </style:style>
    <style:style style:name="T24" style:family="text">
      <style:text-properties style:font-name="Liberation Sans" fo:font-size="32pt" fo:language="es" fo:country="ES" fo:font-weight="bold" style:font-size-asian="20pt" style:font-weight-asian="bold" style:font-size-complex="20pt" style:font-weight-complex="bold"/>
    </style:style>
    <style:style style:name="T25" style:family="text">
      <style:text-properties style:font-name="Liberation Sans" fo:font-size="32pt" fo:language="es" fo:country="ES" fo:font-weight="normal" style:font-size-asian="20pt" style:font-weight-asian="normal" style:font-size-complex="20pt" style:font-weight-complex="normal"/>
    </style:style>
    <style:style style:name="T26" style:family="text">
      <style:text-properties fo:font-size="24pt" fo:language="es" fo:country="ES" style:font-size-asian="24pt" style:font-size-complex="24pt"/>
    </style:style>
    <style:style style:name="T27" style:family="text">
      <style:text-properties fo:font-size="18pt" fo:language="es" fo:country="ES"/>
    </style:style>
    <style:style style:name="T28" style:family="text">
      <style:text-properties fo:font-size="32pt" fo:language="es" fo:country="ES" style:font-size-asian="32pt" style:font-size-complex="32pt"/>
    </style:style>
    <style:style style:name="T29" style:family="text">
      <style:text-properties fo:color="#000000" loext:opacity="100%" style:text-line-through-style="none" style:text-line-through-type="none" style:text-position="0% 100%" style:font-name="Arial1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T30" style:family="text">
      <style:text-properties fo:font-size="54pt" fo:language="es" fo:country="ES" style:font-size-asian="54pt" style:font-size-complex="54pt"/>
    </style:style>
    <style:style style:name="T31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2" style:family="text">
      <style:text-properties fo:font-size="40pt" fo:language="es" fo:country="ES" fo:font-style="italic" style:font-size-asian="40pt" style:font-style-asian="italic" style:font-size-complex="40pt" style:font-style-complex="italic"/>
    </style:style>
    <style:style style:name="T33" style:family="text">
      <style:text-properties fo:font-size="48pt" fo:language="es" fo:country="ES" fo:font-style="italic" style:font-size-asian="48pt" style:font-style-asian="italic" style:font-size-complex="48pt" style:font-style-complex="italic"/>
    </style:style>
    <style:style style:name="T34" style:family="text">
      <style:text-properties fo:font-size="32pt" fo:language="es" fo:country="ES" fo:font-style="italic" style:font-size-asian="32pt" style:font-style-asian="italic" style:font-size-complex="32pt" style:font-style-complex="italic"/>
    </style:style>
    <style:style style:name="T35" style:family="text">
      <style:text-properties fo:font-size="28pt" fo:language="es" fo:country="ES" fo:font-style="italic" style:font-size-asian="28pt" style:font-style-asian="italic" style:font-size-complex="28pt" style:font-style-complex="italic"/>
    </style:style>
    <style:style style:name="T36" style:family="text">
      <style:text-properties fo:font-size="60pt" fo:language="es" fo:country="ES" fo:font-style="italic" style:font-size-asian="60pt" style:font-style-asian="italic" style:font-size-complex="60pt" style:font-style-complex="italic"/>
    </style:style>
    <style:style style:name="T37" style:family="text">
      <style:text-properties fo:font-size="40pt" fo:language="es" fo:country="ES" fo:font-style="normal" style:font-size-asian="40pt" style:font-style-asian="normal" style:font-size-complex="40pt" style:font-style-complex="normal"/>
    </style:style>
    <style:style style:name="T38" style:family="text">
      <style:text-properties fo:font-size="24pt" fo:language="es" fo:country="ES" fo:font-style="normal" style:font-size-asian="24pt" style:font-style-asian="normal" style:font-size-complex="24pt" style:font-style-complex="normal"/>
    </style:style>
    <style:style style:name="T39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48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40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44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41" style:family="text">
      <style:text-properties fo:font-size="18pt" fo:language="es" fo:country="ES" fo:font-style="normal" style:font-size-asian="18pt" style:font-style-asian="normal" style:font-size-complex="18pt" style:font-style-complex="normal"/>
    </style:style>
    <style:style style:name="T42" style:family="text">
      <style:text-properties fo:color="#c9211e" loext:opacity="100%" style:font-name="Aria Black" fo:font-size="36pt" fo:language="es" fo:country="ES" fo:font-weight="bold"/>
    </style:style>
    <style:style style:name="T43" style:family="text">
      <style:text-properties fo:color="#000000" loext:opacity="100%" style:font-name="Liberation Sans" fo:font-size="32pt" fo:language="es" fo:country="ES" fo:font-weight="bold" style:font-size-asian="40pt" style:font-weight-asian="normal" style:font-size-complex="40pt" style:font-weight-complex="normal"/>
    </style:style>
    <style:style style:name="T44" style:family="text">
      <style:text-properties fo:color="#000000" loext:opacity="100%" style:font-name="Liberation Sans" fo:font-size="36pt" fo:language="es" fo:country="E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5" style:family="text">
      <style:text-properties fo:color="#000000" loext:opacity="100%" style:font-name="Liberation Sans" fo:font-size="24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Florencia Claes</text:span></text:p>
            <text:p text:style-name="P4"><text:span text:style-name="T2">Tomás Zarza</text:span><text:span text:style-name="T2"><text:tab/></text:span></text:p>
            <text:p text:style-name="P4"><text:span text:style-name="T2">Jesús M. González Barahona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Oficina de Conocimiento y Cultura </text:span><text:span text:style-name="T4">Libres</text:span></text:p>
            <text:p text:style-name="P6"><text:span text:style-name="T4"/></text:p>
          </draw:text-box>
        </draw:frame>
        <draw:frame draw:name="Subtítulo 2_3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Presentación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3DB32451.emf" xlink:type="simple" xlink:show="embed" xlink:actuate="onLoad" draw:mime-type="image/x-emf">
            <text:p/>
          </draw:image>
          <draw:image xlink:href="Pictures/1000000100000224000000D00984F657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C893EDE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8">
        <draw:frame draw:name="Marcador de contenido 6" presentation:style-name="pr2" draw:text-style-name="P14" draw:layer="layout" svg:width="24.336cm" svg:height="15.284cm" svg:x="0.556cm" svg:y="0.718cm" presentation:class="outline" presentation:user-transformed="true">
          <draw:text-box>
            <text:p><text:span text:style-name="T6">Qualquier omen, que lo oya, si bien trovar sopiere,</text:span></text:p>
            <text:p><text:span text:style-name="T6">puede </text:span><text:span text:style-name="T7">más y añadir et emendar</text:span><text:span text:style-name="T6"> si quisiere,</text:span></text:p>
            <text:p><text:span text:style-name="T7">ande de mano en mano</text:span><text:span text:style-name="T6"> a quienquier quel' pidiere,</text:span></text:p>
            <text:p><text:span text:style-name="T6">como pella a las dueñas </text:span><text:span text:style-name="T7">tómelo quien podiere</text:span><text:span text:style-name="T6">.</text:span></text:p>
            <text:p><text:span text:style-name="T6">Pues es de buen amor, emprestadlo de grado,</text:span></text:p>
            <text:p><text:span text:style-name="T6">non desmintades su nombre, nin dedes refertado,</text:span></text:p>
            <text:p><text:span text:style-name="T6">non le dedes por dineros vendido nin alquilado,</text:span></text:p>
            <text:p><text:span text:style-name="T6">ca non ha grado, nin graçias, nin buen amor complado.</text:span></text:p>
            <text:p text:style-name="P13"><text:span text:style-name="T8">Juan Ruiz, Arcipreste de Hita.</text:span></text:p>
            <text:p text:style-name="P13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8">
        <draw:frame draw:name="Marcador de contenido 6" presentation:style-name="pr2" draw:text-style-name="P14" draw:layer="layout" svg:width="23.042cm" svg:height="9.53cm" svg:x="1.342cm" svg:y="4.948cm" presentation:class="outline" presentation:user-transformed="true">
          <draw:text-box>
            <text:list text:style-name="L3">
              <text:list-header>
                <text:p text:style-name="P17"><text:span text:style-name="T10">Acceso Abierto</text:span></text:p>
                <text:p text:style-name="P17"><text:span text:style-name="T11">¿Qué es la publicación en acceso abierto?</text:span></text:p>
              </text:list-header>
            </text:list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23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name="Título 24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2">Berlin Declaration on </text:span><text:span text:style-name="T12">Open Access</text:span><text:span text:style-name="T9"> <text:s/></text:span><text:span text:style-name="T13"><text:s/></text:span></text:p>
          </draw:text-box>
        </draw:frame>
        <draw:frame draw:style-name="gr10" draw:text-style-name="P19" draw:layer="layout" svg:width="17.526cm" svg:height="1.145cm" svg:x="6.858cm" svg:y="15.111cm">
          <draw:text-box>
            <text:p><text:span text:style-name="T14"><text:a xlink:href="https://openaccess.mpg.de/Berlin-Declaration" xlink:type="simple">https://openaccess.mpg.de/Berlin-Declaration</text:a></text:span></text:p>
          </draw:text-box>
        </draw:frame>
        <draw:frame draw:style-name="gr11" draw:text-style-name="P22" draw:layer="layout" svg:width="23.622cm" svg:height="9.448cm" svg:x="0.512cm" svg:y="4.525cm">
          <draw:text-box>
            <text:p text:style-name="P20"><text:span text:style-name="T15">“</text:span><text:span text:style-name="T15">El (los) autor(es) [...] deben garantizar el </text:span><text:span text:style-name="T15">derecho gratuito, irrevocable y mundial de </text:span><text:span text:style-name="T15">acceder al <text:s/>trabajo, y licencia para copiarlo, </text:span><text:span text:style-name="T15">usarlo, distribuirlo, transmitirlo y exhibirlo </text:span><text:span text:style-name="T15">públicamente, y para hacer y distribuir trabajos </text:span><text:span text:style-name="T15">derivados […]''</text:span></text:p>
            <text:p text:style-name="P21"><text:span text:style-name="T16">22 de octubre de 2003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Marcador de contenido 11" presentation:style-name="pr2" draw:text-style-name="P23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25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name="Título 26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7">Condiciones</text:span></text:p>
          </draw:text-box>
        </draw:frame>
        <draw:frame draw:style-name="gr12" draw:text-style-name="P24" draw:layer="layout" svg:width="20.6cm" svg:height="12.911cm" svg:x="1.752cm" svg:y="3.691cm">
          <draw:text-box>
            <text:list text:style-name="L3">
              <text:list-item>
                <text:p><text:span text:style-name="T18">Derecho de acceso (consulta)</text:span></text:p>
              </text:list-item>
              <text:list-item>
                <text:p><text:span text:style-name="T18">Derecho de copia</text:span></text:p>
              </text:list-item>
              <text:list-item>
                <text:p><text:span text:style-name="T18">Derecho de trabajos derivados</text:span></text:p>
              </text:list-item>
              <text:list-item>
                <text:p><text:span text:style-name="T18">Obra y materiales en formatos electrónicos </text:span><text:span text:style-name="T18">“adecuados”</text:span></text:p>
              </text:list-item>
              <text:list-item>
                <text:p><text:span text:style-name="T18">Depósito de la obra y materiales </text:span><text:span text:style-name="T18">complementarios en un archivo abierto</text:span></text:p>
              </text:list-item>
            </text:list>
            <text:p><text:span text:style-name="T18"/></text:p>
            <text:p><text:span text:style-name="T18">Todo con atribución de autorí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Título 27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name="Título 28" draw:style-name="gr9" draw:text-style-name="P18" draw:layer="layout" svg:width="22.437cm" svg:height="2.487cm" svg:x="0.677cm" svg:y="0.423cm">
          <draw:text-box>
            <text:p text:style-name="P2"><text:span text:style-name="T19">Materiales cubiertos </text:span></text:p>
          </draw:text-box>
        </draw:frame>
        <draw:frame draw:style-name="gr13" draw:text-style-name="P25" draw:layer="layout" svg:width="20.208cm" svg:height="10.205cm" svg:x="1.016cm" svg:y="5.08cm">
          <draw:text-box>
            <text:list text:style-name="L3">
              <text:list-item>
                <text:p><text:span text:style-name="T20">Resultados de investigación (artículos)</text:span></text:p>
              </text:list-item>
              <text:list-item>
                <text:p><text:span text:style-name="T20">Datos crudos y metadatos</text:span></text:p>
              </text:list-item>
              <text:list-item>
                <text:p><text:span text:style-name="T20">Materiales fuente (notas)</text:span></text:p>
              </text:list-item>
              <text:list-item>
                <text:p><text:span text:style-name="T20">Representaciones digitales (gráficos, </text:span><text:span text:style-name="T20">multimedia)</text:span></text:p>
              </text:list-item>
              <text:list-item>
                <text:p><text:span text:style-name="T20">Programas de ordenad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8">
        <draw:frame draw:name="Título 29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26" draw:layer="layout" svg:width="10.668cm" svg:height="3.095cm" svg:x="1.016cm" svg:y="1.121cm">
          <draw:text-box>
            <text:p><text:span text:style-name="T21">Archivo abierto</text:span></text:p>
          </draw:text-box>
        </draw:frame>
        <draw:frame draw:style-name="gr15" draw:text-style-name="P25" draw:layer="layout" svg:width="21.844cm" svg:height="11.627cm" svg:x="1.524cm" svg:y="4.747cm">
          <draw:text-box>
            <text:list text:style-name="L3">
              <text:list-item>
                <text:p><text:span text:style-name="T20">Estándares de acceso adecuados </text:span><text:span text:style-name="T20">(ejemplo: Open Archive Definition)</text:span></text:p>
              </text:list-item>
              <text:list-item>
                <text:p><text:span text:style-name="T20">Mantenido por una organización “fiable”</text:span></text:p>
              </text:list-item>
              <text:list-item>
                <text:p><text:span text:style-name="T20">Vocación de distribución universal, </text:span><text:span text:style-name="T20">interoperabilidad, archivo a largo plaz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30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26" draw:layer="layout" svg:width="21.59cm" svg:height="3.095cm" svg:x="0.508cm" svg:y="1.099cm">
          <draw:text-box>
            <text:p><text:span text:style-name="T21">¿Por qué una licencia?</text:span></text:p>
          </draw:text-box>
        </draw:frame>
        <draw:frame draw:style-name="gr16" draw:text-style-name="P28" draw:layer="layout" svg:width="21.336cm" svg:height="12.728cm" svg:x="1.016cm" svg:y="4.116cm">
          <draw:text-box>
            <text:list text:style-name="L1">
              <text:list-item>
                <text:p><text:span text:style-name="T22">El autor, por ser autor, tiene todos los </text:span><text:span text:style-name="T22">derechos sobre su obra</text:span></text:p>
              </text:list-item>
              <text:list-item>
                <text:p><text:span text:style-name="T22">Quien recibe una obra puede hacer lo que </text:span><text:span text:style-name="T22">el autor le haya permitido</text:span></text:p>
              </text:list-item>
              <text:list-item>
                <text:p><text:span text:style-name="T22">Licencia “tradicional”:</text:span></text:p>
              </text:list-item>
            </text:list>
            <text:p text:style-name="P27"><text:span text:style-name="T22">todos los derechos reservados</text:span></text:p>
            <text:list text:continue-numbering="true" text:style-name="L1">
              <text:list-item>
                <text:p><text:span text:style-name="T22">Licencia de publicación abierta:</text:span></text:p>
                <text:p text:style-name="P27"><text:span text:style-name="T22">sólo algunos derechos reservados</text:span></text:p>
              </text:list-item>
            </text:list>
            <text:p text:style-name="P27"><text:span text:style-name="T23"/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draw:name="Título 13_7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26" draw:layer="layout" svg:width="21.59cm" svg:height="3.095cm" svg:x="0.508cm" svg:y="1.099cm">
          <draw:text-box>
            <text:p><text:span text:style-name="T21">Licencias de acceso abierto</text:span></text:p>
          </draw:text-box>
        </draw:frame>
        <draw:frame draw:style-name="gr17" draw:text-style-name="P28" draw:layer="layout" svg:width="22.86cm" svg:height="12.251cm" svg:x="1.016cm" svg:y="4.116cm">
          <draw:text-box>
            <text:p><text:span text:style-name="T24">Creative Commons</text:span></text:p>
            <text:list text:style-name="L1">
              <text:list-item>
                <text:p><text:span text:style-name="T25">CC0 (No rights reserved)</text:span></text:p>
              </text:list-item>
              <text:list-item>
                <text:p><text:span text:style-name="T25">CC-BY (Attribution)</text:span></text:p>
              </text:list-item>
              <text:list-item>
                <text:p><text:span text:style-name="T25">CC-BY-SA (Attribution-ShareAlike)</text:span></text:p>
              </text:list-item>
            </text:list>
            <text:p><text:span text:style-name="T23"/></text:p>
            <text:p><text:span text:style-name="T24">Licencias de software libre</text:span></text:p>
            <text:p><text:span text:style-name="T25"><text:tab/></text:span><text:span text:style-name="T25">(no muy adecuadas para publicaciones)</text:span></text:p>
            <text:p text:style-name="P13"><text:span text:style-name="T23"/></text:p>
            <text:p text:style-name="P13"><text:span text:style-name="T23"><text:a xlink:href="https://creativecommons.org/" xlink:type="simple">https://creativecommons.org</text:a></text:span></text:p>
            <text:p><text:span text:style-name="T23"/></text:p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draw:frame draw:name="Título 13_8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26" draw:layer="layout" svg:width="21.59cm" svg:height="3.095cm" svg:x="0.508cm" svg:y="1.099cm">
          <draw:text-box>
            <text:p><text:span text:style-name="T21">¿Cómo elegir licencia?</text:span></text:p>
          </draw:text-box>
        </draw:frame>
        <draw:frame draw:style-name="gr18" draw:text-style-name="P29" draw:layer="layout" svg:width="15.24cm" svg:height="1.906cm" svg:x="9.398cm" svg:y="12.446cm">
          <draw:text-box>
            <text:p text:style-name="P13"><text:span text:style-name="T26"><text:a xlink:href="https://creativecommons.org/choose/" xlink:type="simple">https://creativecommons.org/choose/</text:a></text:span></text:p>
            <text:p text:style-name="P13"><text:span text:style-name="T27"/></text:p>
          </draw:text-box>
        </draw:frame>
        <draw:frame draw:style-name="gr19" draw:text-style-name="P30" draw:layer="layout" svg:width="20.856cm" svg:height="6.551cm" svg:x="3.556cm" svg:y="4.826cm">
          <draw:text-box>
            <text:p><text:span text:style-name="T11">Fácil:</text:span></text:p>
            <text:p><text:span text:style-name="T11"><text:tab/></text:span><text:span text:style-name="T11"><text:tab/></text:span><text:span text:style-name="T11">Elije una de las licencias</text:span></text:p>
            <text:p><text:span text:style-name="T11"><text:tab/></text:span><text:span text:style-name="T11"><text:tab/></text:span><text:span text:style-name="T11">de Creative Commons</text:span></text:p>
            <text:p><text:span text:style-name="T11"><text:tab/></text:span><text:span text:style-name="T11"><text:tab/></text:span><text:span text:style-name="T11">que son libres</text:span></text:p>
          </draw:text-box>
        </draw:frame>
        <draw:frame draw:style-name="gr7" draw:text-style-name="P11" draw:layer="layout" svg:width="5.244cm" svg:height="5.244cm" svg:x="0.762cm" svg:y="10.25cm">
          <draw:image xlink:href="Pictures/100000000000007F0000007FD226DE4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3_9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26" draw:layer="layout" svg:width="21.59cm" svg:height="3.095cm" svg:x="0.508cm" svg:y="1.099cm">
          <draw:text-box>
            <text:p><text:span text:style-name="T21">¿Cómo licenciar un trabajo?</text:span></text:p>
          </draw:text-box>
        </draw:frame>
        <draw:frame draw:style-name="gr20" draw:text-style-name="P30" draw:layer="layout" svg:width="24.255cm" svg:height="0.962cm" svg:x="0.762cm" svg:y="14.786cm">
          <draw:text-box>
            <text:p><text:span text:style-name="T27"><text:a xlink:href="https://wiki.creativecommons.org/wiki/Es:_Marcando_tu_obra_con_una_licencia_CC" xlink:type="simple">https://wiki.creativecommons.org/wiki/Es:_Marcando_tu_obra_con_una_licencia_CC</text:a></text:span></text:p>
          </draw:text-box>
        </draw:frame>
        <draw:frame draw:style-name="gr21" draw:text-style-name="P30" draw:layer="layout" svg:width="24.384cm" svg:height="5.315cm" svg:x="0.762cm" svg:y="4.614cm">
          <draw:text-box>
            <text:list text:style-name="L1">
              <text:list-item>
                <text:p><text:span text:style-name="T28">Basta con “marcar” el trabajo con una licencia</text:span></text:p>
              </text:list-item>
              <text:list-item>
                <text:p><text:span text:style-name="T28">Opcionalmente, en algunos casos pueden </text:span><text:span text:style-name="T28">usarse metadatos</text:span></text:p>
              </text:list-item>
              <text:list-item>
                <text:p><text:span text:style-name="T28">Ejemplo:</text:span></text:p>
              </text:list-item>
            </text:list>
          </draw:text-box>
        </draw:frame>
        <draw:frame draw:style-name="gr7" draw:text-style-name="P11" draw:layer="layout" svg:width="14.308cm" svg:height="4.211cm" svg:x="9.493cm" svg:y="9.009cm">
          <draw:image xlink:href="Pictures/10000001000002A4000000C7EBD9225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Marcador de contenido 10" presentation:style-name="pr2" draw:text-style-name="P14" draw:layer="layout" svg:width="23.042cm" svg:height="9.53cm" svg:x="1.342cm" svg:y="4.948cm" presentation:class="outline" presentation:user-transformed="true">
          <draw:text-box>
            <text:list text:style-name="L3">
              <text:list-header>
                <text:p text:style-name="P17"><text:span text:style-name="T10">La OfiLibre</text:span></text:p>
                <text:p text:style-name="P17"><text:span text:style-name="T11">Oficina de Conocimiento y Cultura Libres de la URJC</text:span></text:p>
              </text:list-header>
            </text:list>
          </draw:text-box>
        </draw:frame>
        <draw:frame draw:name="Título 21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2" draw:style-name="gr9" draw:text-style-name="P15" draw:layer="layout" svg:width="22.437cm" svg:height="2.487cm" svg:x="0cm" svg:y="0.423cm">
          <draw:text-box>
            <text:p text:style-name="P2"><text:span text:style-name="T9"><text:tab/></text:span></text:p>
          </draw:text-box>
        </draw:frame>
        <draw:frame draw:style-name="gr22" draw:text-style-name="P32" draw:layer="layout" svg:width="12.499cm" svg:height="1.673cm" svg:x="11.43cm" svg:y="14.583cm">
          <draw:text-box>
            <text:p text:style-name="P31"><text:span text:style-name="T29"><text:a xlink:href="https://ofilibre.urjc.es/" xlink:type="simple">https://ofilibre.urjc.es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5" presentation:style-name="pr2" draw:text-style-name="P14" draw:layer="layout" svg:width="22.304cm" svg:height="10.486cm" svg:x="1.596cm" svg:y="4.948cm" presentation:class="outline" presentation:user-transformed="true">
          <draw:text-box>
            <text:list text:style-name="L3">
              <text:list-item>
                <text:p text:style-name="P17"><text:span text:style-name="T30">Publicación abierta</text:span></text:p>
              </text:list-item>
              <text:list-item>
                <text:p text:style-name="P17"><text:span text:style-name="T30">Datos abiertos</text:span></text:p>
              </text:list-item>
              <text:list-item>
                <text:p text:style-name="P17"><text:span text:style-name="T30">Cultura libre</text:span></text:p>
              </text:list-item>
              <text:list-item>
                <text:p text:style-name="P17"><text:span text:style-name="T30">Software libre</text:span></text:p>
              </text:list-item>
            </text:list>
          </draw:text-box>
        </draw:frame>
        <draw:frame draw:name="Título 12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14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7">Ámbitos de actuación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Marcador de contenido 6" presentation:style-name="pr2" draw:text-style-name="P33" draw:layer="layout" svg:width="24.13cm" svg:height="10.922cm" svg:x="0.254cm" svg:y="7.112cm" presentation:class="outline" presentation:user-transformed="true">
          <draw:text-box>
            <text:list text:style-name="L3">
              <text:list-header>
                <text:p text:style-name="P17"><text:span text:style-name="T32">Realizar tareas de información, promoción, coordinación y facilitación, en colaboración con todos los agentes de la Universidad</text:span></text:p>
              </text:list-header>
            </text:list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7">Mandato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Marcador de contenido 6" presentation:style-name="pr2" draw:text-style-name="P33" draw:layer="layout" svg:width="21.59cm" svg:height="10.922cm" svg:x="2.286cm" svg:y="4.572cm" presentation:class="outline" presentation:user-transformed="true">
          <draw:text-box>
            <text:p text:style-name="P17"><text:span text:style-name="T32">Open Access: Definición de Berlín</text:span></text:p>
            <text:list text:style-name="L3">
              <text:list-item>
                <text:p text:style-name="P17"><text:span text:style-name="T32">resultados de investigación</text:span></text:p>
              </text:list-item>
              <text:list-item>
                <text:p text:style-name="P17"><text:span text:style-name="T32">materiales docentes</text:span></text:p>
              </text:list-item>
              <text:list-item>
                <text:p text:style-name="P17"><text:span text:style-name="T32">documentos de gestión</text:span></text:p>
              </text:list-item>
            </text:list>
            <text:p text:style-name="P17"><text:span text:style-name="T33">“</text:span><text:span text:style-name="T33">Plantéate si podría ser abierto...”</text:span></text:p>
            <text:p text:style-name="P34"><text:span text:style-name="T34"><text:a xlink:href="https://openaccess.mpg.de/Berlin-Declaration" xlink:type="simple">https://openaccess.mpg.de/Berlin-Declaration</text:a></text:span></text:p>
            <text:list text:continue-numbering="true" text:style-name="L3">
              <text:list-header>
                <text:p text:style-name="P17"><text:span text:style-name="T32"/></text:p>
              </text:list-header>
            </text:list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7">Publicación abierta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8">
        <draw:frame draw:name="Marcador de contenido 6" presentation:style-name="pr2" draw:text-style-name="P33" draw:layer="layout" svg:width="21.082cm" svg:height="11.684cm" svg:x="1.778cm" svg:y="4.572cm" presentation:class="outline" presentation:user-transformed="true">
          <draw:text-box>
            <text:p text:style-name="P17"><text:span text:style-name="T32">Definición según Open Data Handbook </text:span></text:p>
            <text:list text:style-name="L3">
              <text:list-item>
                <text:p text:style-name="P17"><text:span text:style-name="T32">Conocimiento y uso</text:span></text:p>
              </text:list-item>
              <text:list-item>
                <text:p text:style-name="P17"><text:span text:style-name="T32">Publicación</text:span></text:p>
              </text:list-item>
              <text:list-item>
                <text:p text:style-name="P17"><text:span text:style-name="T32">Apoyo a iniciativas</text:span></text:p>
              </text:list-item>
            </text:list>
            <text:p text:style-name="P17"><text:span text:style-name="T32">“</text:span><text:span text:style-name="T32">Los datos abiertos son más útiles”</text:span></text:p>
            <text:p text:style-name="P34"><text:span text:style-name="T35"><text:a xlink:href="http://opendatahandbook.org/" xlink:type="simple">http://opendatahandbook.org/</text:a></text:span></text:p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7">Datos abiertos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Marcador de contenido 6" presentation:style-name="pr2" draw:text-style-name="P33" draw:layer="layout" svg:width="20.939cm" svg:height="11.684cm" svg:x="3.048cm" svg:y="4.572cm" presentation:class="outline" presentation:user-transformed="true">
          <draw:text-box>
            <text:p text:style-name="P17"><text:span text:style-name="T32">Definición de “obras culturales libres”</text:span></text:p>
            <text:list text:style-name="L3">
              <text:list-item>
                <text:p text:style-name="P17"><text:span text:style-name="T32">Promoción y acercamiento</text:span></text:p>
              </text:list-item>
              <text:list-item>
                <text:p text:style-name="P17"><text:span text:style-name="T32">Fomento de la producción</text:span></text:p>
              </text:list-item>
              <text:list-item>
                <text:p text:style-name="P17"><text:span text:style-name="T32">Puesta en contacto de interesados</text:span></text:p>
              </text:list-item>
            </text:list>
            <text:p text:style-name="P17"><text:span text:style-name="T33">“</text:span><text:span text:style-name="T33">La cultura libre es una opción”</text:span></text:p>
            <text:p text:style-name="P34"><text:span text:style-name="T35"><text:a xlink:href="https://freedomdefined.org/Definition/Es" xlink:type="simple">https://freedomdefined.org/Definition/Es</text:a></text:span></text:p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7">Cultura libre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Marcador de contenido 6" presentation:style-name="pr2" draw:text-style-name="P33" draw:layer="layout" svg:width="18.542cm" svg:height="11.684cm" svg:x="3.048cm" svg:y="4.572cm" presentation:class="outline" presentation:user-transformed="true">
          <draw:text-box>
            <text:p text:style-name="P17"><text:span text:style-name="T32">Definiciones de OSI y FSF</text:span></text:p>
            <text:list text:style-name="L3">
              <text:list-item>
                <text:p text:style-name="P17"><text:span text:style-name="T32">Conocimiento de opciones</text:span></text:p>
              </text:list-item>
              <text:list-item>
                <text:p text:style-name="P17"><text:span text:style-name="T32">Apoyo a usuarios</text:span></text:p>
              </text:list-item>
              <text:list-item>
                <text:p text:style-name="P17"><text:span text:style-name="T32">Fomento de liberaciones</text:span></text:p>
              </text:list-item>
              <text:list-item>
                <text:p text:style-name="P17"><text:span text:style-name="T32">Explicación de implicaciones</text:span></text:p>
              </text:list-item>
            </text:list>
            <text:p text:style-name="P17"><text:span text:style-name="T33">“</text:span><text:span text:style-name="T33">El software libre tiene ventajas”</text:span></text:p>
            <text:p text:style-name="P34"><text:span text:style-name="T35"><text:a xlink:href="https://www.gnu.org/philosophy/free-sw.es.html" xlink:type="simple">https://www.gnu.org/philosophy/free-sw.es.html</text:a></text:span></text:p>
            <text:p text:style-name="P34"><text:span text:style-name="T35"><text:a xlink:href="https://opensource.com/resources/what-open-source" xlink:type="simple">https://opensource.com/resources/what-open-source</text:a></text:span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7">Software libre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8">
        <draw:frame draw:name="Marcador de contenido 6" presentation:style-name="pr2" draw:text-style-name="P33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17"><text:span text:style-name="T32">Identificación y apoyo a iniciativas</text:span></text:p>
              </text:list-item>
              <text:list-item>
                <text:p text:style-name="P17"><text:span text:style-name="T32">Estímulo de nuevas iniciativas</text:span></text:p>
              </text:list-item>
              <text:list-item>
                <text:p text:style-name="P17"><text:span text:style-name="T32">Colaboración con comunidades</text:span></text:p>
              </text:list-item>
              <text:list-item>
                <text:p text:style-name="P17"><text:span text:style-name="T32">Formación y asesoramiento</text:span></text:p>
              </text:list-item>
              <text:list-item>
                <text:p text:style-name="P17"><text:span text:style-name="T32">Actividades de promoción y acercamiento</text:span></text:p>
              </text:list-item>
            </text:list>
            <text:p text:style-name="P17"><text:span text:style-name="T32"/></text:p>
            <text:p text:style-name="P35"><text:span text:style-name="T36">“</text:span><text:span text:style-name="T36">OfiLibre: un agente útil”</text:span></text:p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7">En todos los ámbitos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8">
        <draw:frame draw:name="Título 10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23" draw:text-style-name="P26" draw:layer="layout" svg:width="24.13cm" svg:height="2.181cm" svg:x="1.016cm" svg:y="1.121cm">
          <draw:text-box>
            <text:p><text:span text:style-name="T21">Contexto: LOSU</text:span></text:p>
          </draw:text-box>
        </draw:frame>
        <draw:frame draw:style-name="gr7" draw:text-style-name="P11" draw:layer="layout" svg:width="25.399cm" svg:height="9.372cm" svg:x="0.043cm" svg:y="4.894cm">
          <draw:image xlink:href="Pictures/10000001000006900000026C51375833.png" xlink:type="simple" xlink:show="embed" xlink:actuate="onLoad" draw:mime-type="image/png">
            <text:p/>
          </draw:image>
        </draw:frame>
        <draw:frame draw:style-name="gr24" draw:text-style-name="P30" draw:layer="layout" svg:width="16.614cm" svg:height="0.962cm" svg:x="8.558cm" svg:y="15.494cm">
          <draw:text-box>
            <text:p><text:span text:style-name="T27"><text:a xlink:href="https://www.boe.es/buscar/act.php?id=BOE-A-2023-7500" xlink:type="simple">https://www.boe.es/buscar/act.php?id=BOE-A-2023-7500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draw:name="Título 11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23" draw:text-style-name="P26" draw:layer="layout" svg:width="24.13cm" svg:height="2.181cm" svg:x="1.016cm" svg:y="1.121cm">
          <draw:text-box>
            <text:p><text:span text:style-name="T21">Contexto: LOSU</text:span></text:p>
          </draw:text-box>
        </draw:frame>
        <draw:frame draw:style-name="gr7" draw:text-style-name="P11" draw:layer="layout" svg:width="21.039cm" svg:height="12.572cm" svg:x="0.297cm" svg:y="2.794cm">
          <draw:image xlink:href="Pictures/1000000100000690000003EC23375696.png" xlink:type="simple" xlink:show="embed" xlink:actuate="onLoad" draw:mime-type="image/png">
            <text:p/>
          </draw:image>
        </draw:frame>
        <draw:frame draw:style-name="gr24" draw:text-style-name="P30" draw:layer="layout" svg:width="16.614cm" svg:height="0.962cm" svg:x="8.557cm" svg:y="15.494cm">
          <draw:text-box>
            <text:p><text:span text:style-name="T27"><text:a xlink:href="https://www.boe.es/buscar/act.php?id=BOE-A-2023-7500" xlink:type="simple">https://www.boe.es/buscar/act.php?id=BOE-A-2023-7500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8">
        <draw:frame draw:name="Marcador de contenido 1" presentation:style-name="pr2" draw:text-style-name="P33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36"><text:span text:style-name="T37">Convocatoria de Asignaturas en Abierto</text:span></text:p>
              </text:list-item>
              <text:list-item>
                <text:p text:style-name="P36"><text:span text:style-name="T37">Jornadas de Cultura Libre</text:span></text:p>
              </text:list-item>
              <text:list-item>
                <text:p text:style-name="P36"><text:span text:style-name="T37">Café con OfiLibre</text:span></text:p>
              </text:list-item>
              <text:list-item>
                <text:p text:style-name="P36"><text:span text:style-name="T37">Apoyo a Editorial Academia Abierta</text:span></text:p>
                <text:list>
                  <text:list-item>
                    <text:p text:style-name="P17"><text:span text:style-name="T37">Monografías en acceso abierto</text:span></text:p>
                  </text:list-item>
                  <text:list-item>
                    <text:p text:style-name="P17"><text:span text:style-name="T37">Revistas en acceso abierto</text:span></text:p>
                  </text:list-item>
                </text:list>
              </text:list-item>
              <text:list-item>
                <text:p text:style-name="P17"><text:span text:style-name="T37">Apoyo a publicación de TFGs, TFMs y tesis en acceso abierto</text:span></text:p>
              </text:list-item>
              <text:list-item>
                <text:p text:style-name="P17"><text:span text:style-name="T37">Programa de formación para PDI, PTGAS y alumnado</text:span></text:p>
                <text:p text:style-name="P17"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3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7">Principales acciones en marcha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8">
        <draw:frame draw:name="Marcador de contenido 2" presentation:style-name="pr2" draw:text-style-name="P33" draw:layer="layout" svg:width="24.13cm" svg:height="11.684cm" svg:x="0.762cm" svg:y="4.572cm" presentation:class="outline" presentation:user-transformed="true">
          <draw:text-box>
            <text:list text:style-name="L3">
              <text:list-item>
                <text:p text:style-name="P36"><text:span text:style-name="T37">Curso 2024-2025: tercera convocatoria</text:span></text:p>
              </text:list-item>
              <text:list-item>
                <text:p text:style-name="P17"><text:span text:style-name="T37">Primer cuatrimestre ya cerrado</text:span></text:p>
              </text:list-item>
              <text:list-item>
                <text:p text:style-name="P17"><text:span text:style-name="T37">Incentivos para docentes autores</text:span></text:p>
              </text:list-item>
              <text:list-item>
                <text:p text:style-name="P17"><text:span text:style-name="T37">Materiales en abierto en repositorios</text:span></text:p>
              </text:list-item>
              <text:list-item>
                <text:p text:style-name="P17"><text:span text:style-name="T37">Asignaturas en abierto en aula virtual</text:span></text:p>
              </text:list-item>
            </text:list>
            <text:p text:style-name="P17"><text:span text:style-name="T38"><text:a xlink:href="https://online.urjc.es/es/para-futuros-estudiantes/asignaturas-en-abierto" xlink:type="simple">https://online.urjc.es/es/para-futuros-estudiantes/asignaturas-en-abierto</text:a></text:span></text:p>
            <text:p text:style-name="P17"><text:span text:style-name="T38"><text:a xlink:href="https://ofilibre.urjc.es/guias/convocatoria-asignaturas-abierto/" xlink:type="simple">https://ofilibre.urjc.es/guias/convocatoria-asignaturas-abierto/</text:a></text:span></text:p>
            <text:p text:style-name="P17"><text:span text:style-name="T38"/></text:p>
            <text:p text:style-name="P17"><text:span text:style-name="T38"/></text:p>
            <text:list text:continue-numbering="true" text:style-name="L3">
              <text:list-header>
                <text:p text:style-name="P17"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3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4" draw:style-name="gr9" draw:text-style-name="P15" draw:layer="layout" svg:width="24.129cm" svg:height="2.487cm" svg:x="0cm" svg:y="0.423cm">
          <draw:text-box>
            <text:p text:style-name="P2"><text:span text:style-name="T9"><text:tab/></text:span><text:span text:style-name="T39">Convocatoria de </text:span><text:span text:style-name="T39">Asignaturas en Abierto </text:span><text:span text:style-name="T40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8">
        <draw:frame draw:name="Marcador de contenido 3" presentation:style-name="pr2" draw:text-style-name="P3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7"><text:span text:style-name="T37">Revistas de investigación, docencia, etc.</text:span></text:p>
              </text:list-item>
              <text:list-item>
                <text:p text:style-name="P17"><text:span text:style-name="T37">Plataforma de revistas digitales de la URJC (basada en OJS)</text:span></text:p>
              </text:list-item>
              <text:list-item>
                <text:p text:style-name="P17"><text:span text:style-name="T37">Varios tipos de ayuda en el proceso editorial</text:span></text:p>
              </text:list-item>
            </text:list>
            <text:p text:style-name="P34"><text:span text:style-name="T37"><text:a xlink:href="https://revistas.urjc.es/" xlink:type="simple">https://revistas.urjc.es/</text:a></text:span></text:p>
          </draw:text-box>
        </draw:frame>
        <draw:frame draw:name="Título 6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7" draw:style-name="gr9" draw:text-style-name="P15" draw:layer="layout" svg:width="24.129cm" svg:height="2.487cm" svg:x="0cm" svg:y="0.423cm">
          <draw:text-box>
            <text:p text:style-name="P2"><text:span text:style-name="T9"><text:tab/></text:span><text:span text:style-name="T39">Revistas en Abierto </text:span><text:span text:style-name="T40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8">
        <draw:frame draw:name="Marcador de contenido 9" presentation:style-name="pr2" draw:text-style-name="P33" draw:layer="layout" svg:width="23.876cm" svg:height="11.176cm" svg:x="0.762cm" svg:y="4.572cm" presentation:class="outline" presentation:user-transformed="true">
          <draw:text-box>
            <text:list text:style-name="L3">
              <text:list-item>
                <text:p text:style-name="P17"><text:span text:style-name="T37">Monografías y colecciones de monografías</text:span></text:p>
              </text:list-item>
              <text:list-item>
                <text:p text:style-name="P17"><text:span text:style-name="T37">Plataforma de monografías de la URJC (basada en OMP)</text:span></text:p>
              </text:list-item>
              <text:list-item>
                <text:p text:style-name="P17"><text:span text:style-name="T37">Tipos: docentes, de investigación, institucionales...</text:span></text:p>
              </text:list-item>
            </text:list>
            <text:p text:style-name="P17"><text:span text:style-name="T41"><text:a xlink:href="https://www.urjc.es/estudiar-en-la-urjc/vida-universitaria/8783-servicio-de-publicaciones" xlink:type="simple">https://www.urjc.es/estudiar-en-la-urjc/vida-universitaria/8783-servicio-de-publicaciones</text:a></text:span></text:p>
          </draw:text-box>
        </draw:frame>
        <draw:frame draw:name="Título 19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0" draw:style-name="gr9" draw:text-style-name="P15" draw:layer="layout" svg:width="24.129cm" svg:height="2.487cm" svg:x="0cm" svg:y="0.423cm">
          <draw:text-box>
            <text:p text:style-name="P2"><text:span text:style-name="T9"><text:tab/></text:span><text:span text:style-name="T39">Monografías en Abierto </text:span><text:span text:style-name="T40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8">
        <draw:frame draw:name="Marcador de contenido 7" presentation:style-name="pr2" draw:text-style-name="P3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7"><text:span text:style-name="T37">Normativa: estudiantes pueden publicar la memoria en acceso abierto</text:span></text:p>
              </text:list-item>
              <text:list-item>
                <text:p text:style-name="P17"><text:span text:style-name="T37">Gestión vía plataforma de depósito</text:span></text:p>
              </text:list-item>
              <text:list-item>
                <text:p text:style-name="P17"><text:span text:style-name="T37">Actualmente, el tutor ha de dar permiso (cuando acepta la presentación de la memoria)</text:span></text:p>
                <text:p text:style-name="P17"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3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5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16" draw:style-name="gr9" draw:text-style-name="P15" draw:layer="layout" svg:width="24.129cm" svg:height="2.487cm" svg:x="0cm" svg:y="0.423cm">
          <draw:text-box>
            <text:p text:style-name="P2"><text:span text:style-name="T9"><text:tab/></text:span><text:span text:style-name="T39">Publicación de TFGs en </text:span><text:span text:style-name="T39">acceso abiert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8">
        <draw:frame draw:name="Marcador de contenido 4" presentation:style-name="pr2" draw:text-style-name="P3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7"><text:span text:style-name="T37">Cursos en el plan de formación de PDI</text:span></text:p>
              </text:list-item>
              <text:list-item>
                <text:p text:style-name="P17"><text:span text:style-name="T37">Colaboración en cursos de la Escuela de Doctorado</text:span></text:p>
              </text:list-item>
              <text:list-item>
                <text:p text:style-name="P17"><text:span text:style-name="T37">Varias actividades específicas, en colaboración con centros, vicerrectorados</text:span></text:p>
              </text:list-item>
            </text:list>
            <text:p text:style-name="P17"><text:span text:style-name="T38"/></text:p>
            <text:list text:continue-numbering="true" text:style-name="L3">
              <text:list-header>
                <text:p text:style-name="P17"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3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8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9" draw:style-name="gr9" draw:text-style-name="P15" draw:layer="layout" svg:width="24.129cm" svg:height="2.487cm" svg:x="0cm" svg:y="0.423cm">
          <draw:text-box>
            <text:p text:style-name="P2"><text:span text:style-name="T9"><text:tab/></text:span><text:span text:style-name="T39">Plan de formación y </text:span><text:span text:style-name="T39">promoción</text:span><text:span text:style-name="T40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8">
        <draw:frame draw:name="Marcador de contenido 12" presentation:style-name="pr2" draw:text-style-name="P3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7"><text:span text:style-name="T37">Cada año, en marzo</text:span></text:p>
              </text:list-item>
              <text:list-item>
                <text:p text:style-name="P17"><text:span text:style-name="T37">Presentaciones, talleres, mesas redondas, exposiciones, feria</text:span></text:p>
              </text:list-item>
              <text:list-item>
                <text:p text:style-name="P17"><text:span text:style-name="T37">Convocatoria abierta de contribuciones</text:span></text:p>
              </text:list-item>
              <text:list-item>
                <text:p text:style-name="P17"><text:span text:style-name="T37">¿Qué vas a presentar este año?</text:span></text:p>
              </text:list-item>
            </text:list>
          </draw:text-box>
        </draw:frame>
        <draw:frame draw:name="Título 3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34" draw:style-name="gr9" draw:text-style-name="P15" draw:layer="layout" svg:width="24.129cm" svg:height="2.487cm" svg:x="0cm" svg:y="0.423cm">
          <draw:text-box>
            <text:p text:style-name="P2"><text:span text:style-name="T9"><text:tab/></text:span><text:span text:style-name="T39">Jornadas de Cultura Libre</text:span><text:span text:style-name="T40"> 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2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8">
        <draw:frame draw:name="Marcador de contenido 13" presentation:style-name="pr2" draw:text-style-name="P33" draw:layer="layout" svg:width="22.86cm" svg:height="11.684cm" svg:x="1.016cm" svg:y="4.572cm" presentation:class="outline" presentation:user-transformed="true">
          <draw:text-box>
            <text:list text:style-name="L3">
              <text:list-item>
                <text:p text:style-name="P17"><text:span text:style-name="T37">Directo, miércoles a las 10:00</text:span></text:p>
              </text:list-item>
              <text:list-item>
                <text:p text:style-name="P17"><text:span text:style-name="T37">Temas variados, relacionados con las competencias de OfiLibre</text:span></text:p>
              </text:list-item>
              <text:list-item>
                <text:p text:style-name="P17"><text:span text:style-name="T37">En directo, o grabados, vía TV URJC</text:span></text:p>
              </text:list-item>
            </text:list>
            <text:p text:style-name="P17"><text:span text:style-name="T37"><text:a xlink:href="https://ofilibre.urjc.es/acciones/cafes/" xlink:type="simple">https://ofilibre.urjc.es/acciones/cafes/</text:a></text:span></text:p>
          </draw:text-box>
        </draw:frame>
        <draw:frame draw:name="Título 35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36" draw:style-name="gr9" draw:text-style-name="P15" draw:layer="layout" svg:width="24.129cm" svg:height="2.487cm" svg:x="0cm" svg:y="0.423cm">
          <draw:text-box>
            <text:p text:style-name="P2"><text:span text:style-name="T9"><text:tab/></text:span><text:span text:style-name="T39">Cafés con OfiLibre</text:span><text:span text:style-name="T40"> 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2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8">
        <draw:frame draw:name="Marcador de contenido 8" presentation:style-name="pr2" draw:text-style-name="P3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7"><text:span text:style-name="T37">Órgano consultivo</text:span></text:p>
              </text:list-item>
              <text:list-item>
                <text:p text:style-name="P17"><text:span text:style-name="T37">Normativa relacionada con la publicación en acceso abierto</text:span></text:p>
              </text:list-item>
              <text:list-item>
                <text:p text:style-name="P17"><text:span text:style-name="T37">Representantes de todos los centros</text:span></text:p>
              </text:list-item>
            </text:list>
            <text:p text:style-name="P17"><text:span text:style-name="T38"/></text:p>
            <text:list text:continue-numbering="true" text:style-name="L3">
              <text:list-header>
                <text:p text:style-name="P17"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3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7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18" draw:style-name="gr9" draw:text-style-name="P15" draw:layer="layout" svg:width="24.129cm" svg:height="2.487cm" svg:x="0cm" svg:y="0.423cm">
          <draw:text-box>
            <text:p text:style-name="P2"><text:span text:style-name="T9"><text:tab/></text:span><text:span text:style-name="T39">Consejo de publicación </text:span><text:span text:style-name="T39">abier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8">
        <draw:frame draw:name="Título 31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37" draw:layer="layout" svg:width="17.018cm" svg:height="3.095cm" svg:x="0.508cm" svg:y="1.121cm">
          <draw:text-box>
            <text:p><text:span text:style-name="T42">Biblioteca URJC</text:span></text:p>
          </draw:text-box>
        </draw:frame>
        <draw:frame draw:style-name="gr25" draw:text-style-name="P38" draw:layer="layout" svg:width="22.422cm" svg:height="1.609cm" svg:x="0.692cm" svg:y="4.233cm">
          <draw:text-box>
            <text:p><text:span text:style-name="T43"><text:s/></text:span></text:p>
          </draw:text-box>
        </draw:frame>
        <draw:frame draw:style-name="gr26" draw:text-style-name="P41" draw:layer="layout" svg:width="23.876cm" svg:height="10.745cm" svg:x="0.557cm" svg:y="5.003cm">
          <draw:text-box>
            <text:p text:style-name="P39"><text:span text:style-name="T44">Apoyo al acceso abierto</text:span></text:p>
            <text:list text:style-name="L1">
              <text:list-item>
                <text:p text:style-name="P39"><text:span text:style-name="T44">Archivo abierto: BURJC Digital</text:span></text:p>
              </text:list-item>
              <text:list-item>
                <text:p text:style-name="P39"><text:span text:style-name="T44">E-Ciencia: Datos en abierto</text:span></text:p>
              </text:list-item>
            </text:list>
            <text:p text:style-name="P39"><text:span text:style-name="T44"/></text:p>
            <text:p text:style-name="P40"><text:span text:style-name="T45"><text:a xlink:href="https://www.urjc.es/burjc/investiga/publicar" xlink:type="simple">Acceso abierto en el sitio web de Bibliotec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8">
        <draw:frame draw:name="Título 32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26" draw:layer="layout" svg:width="21.844cm" svg:height="3.095cm" svg:x="0.508cm" svg:y="1.121cm">
          <draw:text-box>
            <text:p><text:span text:style-name="T21">Archivo Abierto BURJC Digital</text:span></text:p>
          </draw:text-box>
        </draw:frame>
        <draw:frame draw:style-name="gr25" draw:text-style-name="P38" draw:layer="layout" svg:width="22.422cm" svg:height="1.609cm" svg:x="0.692cm" svg:y="4.233cm">
          <draw:text-box>
            <text:p><text:span text:style-name="T43"><text:s/></text:span></text:p>
          </draw:text-box>
        </draw:frame>
        <draw:frame draw:style-name="gr27" draw:text-style-name="P41" draw:layer="layout" svg:width="23.876cm" svg:height="5.039cm" svg:x="0.557cm" svg:y="13.97cm">
          <draw:text-box>
            <text:p text:style-name="P39"><text:span text:style-name="T44"/></text:p>
            <text:p text:style-name="P39"><text:span text:style-name="T44"/></text:p>
            <text:p text:style-name="P40"><text:span text:style-name="T45"/></text:p>
          </draw:text-box>
        </draw:frame>
        <draw:frame draw:style-name="gr28" draw:text-style-name="P42" draw:layer="layout" svg:width="11.43cm" svg:height="1.581cm" svg:x="13.97cm" svg:y="15.183cm">
          <draw:text-box>
            <text:p><text:span text:style-name="T46"><text:a xlink:href="https://burjcdigital.urjc.es/" xlink:type="simple">https://burjcdigital.urjc.es/</text:a></text:span></text:p>
          </draw:text-box>
        </draw:frame>
        <draw:frame draw:style-name="gr7" draw:text-style-name="P43" draw:layer="layout" svg:width="23.833cm" svg:height="11.885cm" svg:x="0.043cm" svg:y="3.247cm">
          <draw:image xlink:href="Pictures/10000001000009360000049870DC883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8">
        <draw:frame draw:name="Título 13_25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style-name="gr14" draw:text-style-name="P26" draw:layer="layout" svg:width="25.146cm" svg:height="3.095cm" svg:x="-0.071cm" svg:y="0.943cm">
          <draw:text-box>
            <text:p><text:span text:style-name="T21">Reglamento de Acceso y Cultura Abierta</text:span></text:p>
          </draw:text-box>
        </draw:frame>
        <draw:frame draw:style-name="gr25" draw:text-style-name="P38" draw:layer="layout" svg:width="22.422cm" svg:height="1.609cm" svg:x="0.692cm" svg:y="4.233cm">
          <draw:text-box>
            <text:p><text:span text:style-name="T43"><text:s/></text:span></text:p>
          </draw:text-box>
        </draw:frame>
        <draw:frame draw:style-name="gr29" draw:text-style-name="P44" draw:layer="layout" svg:width="22.829cm" svg:height="1.276cm" svg:x="2.032cm" svg:y="14.472cm">
          <draw:text-box>
            <text:p><text:span text:style-name="T46"><text:a xlink:href="https://ofilibre.gitlab.io/blog/reglamento-acceso-abierto/" xlink:type="simple">https://ofilibre.gitlab.io/blog/reglamento-acceso-abierto/</text:a></text:span></text:p>
          </draw:text-box>
        </draw:frame>
        <draw:frame draw:style-name="gr7" draw:text-style-name="P43" draw:layer="layout" svg:width="25.073cm" svg:height="9.955cm" svg:x="0.243cm" svg:y="4.251cm">
          <draw:image xlink:href="Pictures/1000000100000489000001CDF7562C6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8">
        <draw:frame draw:name="Marcador de contenido 6" presentation:style-name="pr2" draw:text-style-name="P45" draw:layer="layout" svg:width="21.844cm" svg:height="8.576cm" svg:x="1.524cm" svg:y="6.858cm" presentation:class="outline" presentation:user-transformed="true">
          <draw:text-box>
            <text:p text:style-name="P13"><text:span text:style-name="T47">Copyright 2020-2024 Oficina de </text:span><text:span text:style-name="T47">Conocimiento y Cultura Libres,</text:span></text:p>
            <text:p text:style-name="P13"><text:span text:style-name="T47">Universidad Rey Juan Carlos</text:span></text:p>
            <text:p text:style-name="P13"><text:span text:style-name="T47">Algunos derechos reservados.</text:span></text:p>
            <text:p text:style-name="P13"><text:span text:style-name="T47"/></text:p>
            <text:p text:style-name="P13"><text:span text:style-name="T47">Este artículo se distribuye bajo la licencia</text:span></text:p>
            <text:p text:style-name="P13"><text:span text:style-name="T47">“</text:span><text:span text:style-name="T47">Reconocimiento-CompartirIgual 4.0 </text:span><text:span text:style-name="T47">Internacional” de Creative Commons,</text:span></text:p>
            <text:p text:style-name="P13"><text:span text:style-name="T47">disponible en </text:span><text:span text:style-name="T47"><text:a xlink:href="https://creativecommons.org/licenses/by-sa/4.0/deed.es" xlink:type="simple">https://creativecommons.org/licenses/by-sa/4.0/deed.es</text:a></text:span></text:p>
            <text:p text:style-name="P13"><text:span text:style-name="T47">Este documento (o uno muy similar) está </text:span><text:span text:style-name="T47">disponible en </text:span><text:span text:style-name="T47"><text:a xlink:href="https://ofilibre.urjc.es/" xlink:type="simple">https://ofilibre.urjc.es</text:a></text:span></text:p>
            <text:p text:style-name="P13"><text:span text:style-name="T47"/></text:p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 Black" svg:font-family="'Aria Black'"/>
    <style:font-face style:name="Arial" svg:font-family="Arial"/>
    <style:font-face style:name="Arial Black" svg:font-family="'Arial Black'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ill Sans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family-generic="swiss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ook" xlink:href="Pictures/100000000000078000000387F062883B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style:font-name="Calibri" fo:font-family="Calibri" style:font-family-generic="roman" style:font-pitch="variable" fo:language="es" fo:country="ES" style:font-name-asian="DejaVu Sans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1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1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fo:font-weight="bold" style:font-name-asian="Calibri1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fo:font-weight="bold" style:font-name-asian="Calibri1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Internet_20_Link" style:display-name="Internet Link" style:family="graphic">
      <style:paragraph-properties style:text-autospace="none"/>
      <style:text-properties fo:color="#c00000" loext:opacity="10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1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1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1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fo:language="en" fo:country="US" fo:font-weight="normal" style:font-name-asian="Calibri (Body)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 loext:tab-stop-distance="0cm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 loext:tab-stop-distance="0cm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 style:writing-mode="lr-tb" loext:decorative="false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 style:writing-mode="lr-tb" loext:decorative="false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 loext:decorative="false"/>
    </style:style>
    <style:style style:name="Mgr8" style:family="graphic" style:parent-style-name="Graphics">
      <style:graphic-properties draw:stroke="none" draw:fill="none" fo:clip="rect(0cm, 0cm, 0cm, 0cm)" style:mirror="none" loext:decorative="fals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 loext:decorative="false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</style:style>
    <style:style style:name="M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.687cm" fo:padding-top="0.127cm" fo:padding-bottom="0.127cm" fo:padding-left="0.254cm" fo:padding-right="0.254cm" fo:wrap-option="wrap" loext:decorative="false"/>
      <style:paragraph-properties style:writing-mode="lr-tb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3" style:family="graphic" style:parent-style-name="standard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9" style:family="presentation" style:parent-style-name="Default1-title">
      <style:graphic-properties draw:auto-grow-height="false" fo:min-height="3.181cm" loext:decorative="false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3" style:family="presentation" style:parent-style-name="Default-title">
      <style:graphic-properties draw:auto-grow-height="false" fo:min-height="3.181cm" loext:decorative="false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font-independent-line-spacing="true"/>
    </style:style>
    <style:style style:name="MP19" style:family="paragraph">
      <loext:graphic-properties draw:fill="none"/>
    </style:style>
    <style:style style:name="M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MP21" style:family="paragraph">
      <loext:graphic-properties draw:fill="solid" draw:fill-color="#d9d9d9" draw:opacity="100%"/>
      <style:paragraph-properties style:font-independent-line-spacing="true"/>
      <style:text-properties fo:language="es" fo:country="ES"/>
    </style:style>
    <style:style style:name="MP22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3" style:family="paragraph">
      <style:paragraph-properties fo:text-align="end"/>
    </style:style>
    <style:style style:name="MP24" style:family="paragraph">
      <loext:graphic-properties draw:fill="none"/>
      <style:paragraph-properties fo:text-align="center"/>
    </style:style>
    <style:style style:name="MP25" style:family="paragraph">
      <style:paragraph-properties fo:line-height="100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4-11-17">11/17/24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edit </text:span><text:span text:style-name="MT8">Master title </text:span><text:span text:style-name="MT8">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4-11-17">11/17/24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4-11-17">11/17/24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edit </text:span><text:span text:style-name="MT8">Master title </text:span><text:span text:style-name="MT8">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4-11-17">11/17/24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4-11-17">11/17/24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4-11-17">11/17/24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4-11-17">11/17/24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4-11-17">11/17/24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4-11-17">11/17/24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4-11-17">11/17/24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4-11-17">11/17/24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6" draw:layer="backgroundobjects" svg:width="5.715cm" svg:height="16.254cm" svg:x="18.415cm" svg:y="0.763cm" presentation:class="title">
        <draw:text-box>
          <text:p text:style-name="MP5"><text:span text:style-name="MT11">C</text:span><text:span text:style-name="MT11">li</text:span><text:span text:style-name="MT11">c</text:span><text:span text:style-name="MT11">k </text:span><text:span text:style-name="MT11">t</text:span><text:span text:style-name="MT11">o </text:span><text:span text:style-name="MT11">e</text:span><text:span text:style-name="MT11">d</text:span><text:span text:style-name="MT11">it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 </text:span><text:span text:style-name="MT11">ti</text:span><text:span text:style-name="MT11">t</text:span><text:span text:style-name="MT11">l</text:span><text:span text:style-name="MT11">e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Vertical Text Placeholder 2" presentation:style-name="Mpr79" draw:text-style-name="MP6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4-11-17">11/17/24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4-11-17">11/17/24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4-11-17">11/17/24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19" draw:layer="backgroundobjects" svg:width="5.009cm" svg:height="1.914cm" svg:x="0cm" svg:y="16.869cm">
        <draw:image xlink:href="Pictures/10006070000038A6000015883DB32451.emf" xlink:type="simple" xlink:show="embed" xlink:actuate="onLoad" draw:mime-type="image/x-emf">
          <text:p/>
        </draw:image>
        <draw:image xlink:href="Pictures/1000000100000224000000D00984F657.png" xlink:type="simple" xlink:show="embed" xlink:actuate="onLoad" draw:mime-type="image/png"/>
        <svg:desc>logoURJC.eps</svg:desc>
      </draw:frame>
      <draw:frame draw:name="CuadroTexto 8_19" draw:style-name="Mgr9" draw:text-style-name="MP20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1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2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3"><text:span text:style-name="MT26"><text:date style:data-style-name="D4" text:date-value="2024-11-17">11/17/2024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3"><text:span text:style-name="MT27"><text:page-number>&lt;number&gt;</text:page-number></text:span><text:span text:style-name="MT27">/</text:span><text:span text:style-name="MT27"><text:page-count>34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11" draw:text-style-name="MP20" draw:layer="backgroundobjects" svg:width="12.407cm" svg:height="1.941cm" svg:x="12.905cm" svg:y="17.261cm">
        <draw:text-box>
          <text:p text:style-name="MP5"><text:span text:style-name="MT24">Oficina de Conocimiento y Cultura Libres</text:span></text:p>
          <text:p text:style-name="MP5"><text:span text:style-name="MT24"><text:a xlink:href="https://ofilibre.urjc.es/" xlink:type="simple">https://ofilibre.urjc.es</text:a></text:span></text:p>
        </draw:text-box>
      </draw:frame>
      <draw:frame draw:name="Subtítulo 2_13" draw:style-name="Mgr10" draw:text-style-name="MP21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2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draw:style-name="Mgr12" draw:text-style-name="MP24" draw:layer="backgroundobjects" svg:width="8.697cm" svg:height="2.124cm" svg:x="0.29cm" svg:y="16.839cm">
        <draw:image xlink:href="Pictures/1000000100000333000000C8C39BB24A.png" xlink:type="simple" xlink:show="embed" xlink:actuate="onLoad" draw:mime-type="image/png">
          <text:p/>
        </draw:image>
      </draw:frame>
      <draw:frame draw:style-name="Mgr13" draw:text-style-name="MP4" draw:layer="backgroundobjects" svg:width="3.982cm" svg:height="3.198cm" svg:x="8.893cm" svg:y="16.614cm">
        <draw:text-box>
          <text:p text:style-name="MP25"><text:span text:style-name="MT27"/></text:p>
          <text:p text:style-name="MP25"><text:span text:style-name="MT27">2024-11-18</text:span></text:p>
          <text:p text:style-name="MP25"><text:span text:style-name="MT27"><text:page-number>&lt;number&gt;</text:page-number></text:span><text:span text:style-name="MT27">/</text:span><text:span text:style-name="MT27"><text:page-count>34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title>OfiLibre URJC (Presentación)</dc:title>
    <meta:initial-creator>Manuel Gertrudix Barrio</meta:initial-creator>
    <meta:creation-date>2019-01-21T12:01:12Z</meta:creation-date>
    <dc:date>2024-11-17T23:41:50.068450535</dc:date>
    <meta:editing-cycles>33</meta:editing-cycles>
    <meta:editing-duration>PT5H32M14S</meta:editing-duration>
    <dc:creator>Jesus Gonzalez-Barahona</dc:creator>
    <meta:document-statistic meta:object-count="418"/>
    <meta:template xlink:type="simple" xlink:actuate="onRequest" xlink:title="" xlink:href="../presentaciones/Ofilibre-presentacion.odp/Esencial"/>
  </office:meta>
</office:document-meta>
</file>