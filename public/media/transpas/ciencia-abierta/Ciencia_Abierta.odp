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0000003EC23375696.png" manifest:media-type="image/png"/>
  <manifest:file-entry manifest:full-path="Pictures/100000010000051D000002C20DC92EEC.png" manifest:media-type="image/png"/>
  <manifest:file-entry manifest:full-path="Pictures/100000010000058C0000033280FCF69E.png" manifest:media-type="image/png"/>
  <manifest:file-entry manifest:full-path="Pictures/10000001000004AD0000033829EF3288.png" manifest:media-type="image/png"/>
  <manifest:file-entry manifest:full-path="Pictures/1000000100000ED80000082F46A801EB.png" manifest:media-type="image/png"/>
  <manifest:file-entry manifest:full-path="Pictures/10000001000006900000026C51375833.png" manifest:media-type="image/png"/>
  <manifest:file-entry manifest:full-path="Pictures/100000010000014000000071C893EDEA.png" manifest:media-type="image/png"/>
  <manifest:file-entry manifest:full-path="Pictures/1000000100000224000000D00984F657.png" manifest:media-type="image/png"/>
  <manifest:file-entry manifest:full-path="Pictures/10006070000038A6000015883DB32451.emf" manifest:media-type="image/x-emf"/>
  <manifest:file-entry manifest:full-path="Pictures/10000001000004E00000036662BEFE44.png" manifest:media-type="image/png"/>
  <manifest:file-entry manifest:full-path="Pictures/1000000100000333000000C8C39BB24A.png" manifest:media-type="image/png"/>
  <manifest:file-entry manifest:full-path="Pictures/100000010000058800000378A6A1C932.png" manifest:media-type="image/png"/>
  <manifest:file-entry manifest:full-path="Pictures/100000000000078000000387F062883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/>
    <style:font-face style:name="Arial Black1" svg:font-family="'Arial Black'" style:font-family-generic="roman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1.95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7.801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gr15" style:family="graphic" style:parent-style-name="standard">
      <style:graphic-properties draw:stroke="none" draw:fill="none" fo:min-height="9.097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9.8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9.198cm" loext:decorative="false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1.076cm" loext:decorative="false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 loext:decorative="false"/>
      <style:paragraph-properties style:writing-mode="lr-tb"/>
    </style:style>
    <style:style style:name="gr26" style:family="graphic" style:parent-style-name="standard" style:list-style-name="L3">
      <style:graphic-properties svg:stroke-color="#ffffff" draw:fill-color="#ffffff" fo:min-height="1.528cm" loext:decorative="false"/>
      <style:paragraph-properties style:writing-mode="lr-tb"/>
    </style:style>
    <style:style style:name="gr27" style:family="graphic" style:parent-style-name="standard" style:list-style-name="L3">
      <style:graphic-properties svg:stroke-color="#ffffff" draw:fill-color="#ffffff" fo:min-height="12.782cm" loext:decorative="false"/>
      <style:paragraph-properties style:writing-mode="lr-tb"/>
    </style:style>
    <style:style style:name="gr28" style:family="graphic" style:parent-style-name="standard" style:list-style-name="L3">
      <style:graphic-properties svg:stroke-color="#ffffff" draw:fill-color="#ffffff" fo:min-height="9.832cm" loext:decorative="false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title">
      <style:graphic-properties fo:min-height="2.656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Default-title">
      <style:graphic-properties fo:min-height="3.473cm" loext:decorative="false"/>
      <style:paragraph-properties style:writing-mode="lr-tb"/>
    </style:style>
    <style:style style:name="pr10" style:family="presentation" style:parent-style-name="Default-outline1">
      <style:graphic-properties fo:min-height="5.256cm" loext:decorative="false"/>
      <style:paragraph-properties style:writing-mode="lr-tb"/>
    </style:style>
    <style:style style:name="pr11" style:family="presentation" style:parent-style-name="Default-outline1">
      <style:graphic-properties draw:fill="solid" draw:fill-color="#ffffff" fo:min-height="5.256cm" loext:decorative="false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loext:tab-stop-distance="0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text-properties fo:font-size="18pt" fo:language="es" fo:country="ES"/>
    </style:style>
    <style:style style:name="P16" style:family="paragraph">
      <loext:graphic-properties draw:fill-color="#ffffff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/>
      <style:text-properties style:font-name="Liberation Sans" fo:font-size="40pt" fo:language="es" fo:country="ES" style:font-size-asian="40pt" style:font-size-complex="40pt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2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P23" style:family="paragraph">
      <style:paragraph-properties fo:margin-top="0.5cm" fo:margin-bottom="0cm"/>
    </style:style>
    <style:style style:name="P24" style:family="paragraph">
      <loext:graphic-properties draw:fill="none"/>
      <style:paragraph-properties fo:margin-top="0.5cm" fo:margin-bottom="0cm"/>
      <style:text-properties fo:font-size="32pt" fo:language="es" fo:country="ES" style:font-size-asian="32pt" style:font-size-complex="32pt"/>
    </style:style>
    <style:style style:name="P25" style:family="paragraph">
      <style:text-properties fo:language="es" fo:country="ES"/>
    </style:style>
    <style:style style:name="P26" style:family="paragraph">
      <loext:graphic-properties draw:fill="none"/>
      <style:paragraph-properties fo:text-align="center"/>
      <style:text-properties fo:language="es" fo:country="ES"/>
    </style:style>
    <style:style style:name="P27" style:family="paragraph">
      <loext:graphic-properties draw:fill="none" draw:fill-color="#ffffff"/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margin-top="0.5cm" fo:margin-bottom="0cm"/>
      <style:text-properties style:font-name="Liberation Sans" fo:font-size="32pt" fo:language="es" fo:country="ES" style:font-size-asian="32pt" style:font-size-complex="32pt"/>
    </style:style>
    <style:style style:name="P29" style:family="paragraph">
      <loext:graphic-properties draw:fill="solid" draw:fill-color="#ffffff"/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P30" style:family="paragraph">
      <loext:graphic-properties draw:fill-color="#ffffff"/>
      <style:text-properties style:font-name="Liberation Sans" fo:font-size="36pt" fo:language="es" fo:country="ES" style:font-size-asian="36pt" style:font-size-complex="36pt"/>
    </style:style>
    <style:style style:name="P31" style:family="paragraph">
      <loext:graphic-properties draw:fill="none" draw:fill-color="#ffffff"/>
      <style:text-properties fo:color="#c9211e" loext:opacity="100%" fo:font-size="36pt" fo:language="es" fo:country="ES" fo:font-weight="bold"/>
    </style:style>
    <style:style style:name="P32" style:family="paragraph">
      <style:paragraph-properties fo:margin-left="0cm" fo:margin-right="0cm" fo:margin-top="0.5cm" fo:margin-bottom="0cm" fo:line-height="100%" fo:text-indent="0cm"/>
    </style:style>
    <style:style style:name="P33" style:family="paragraph">
      <style:paragraph-properties fo:margin-left="0cm" fo:margin-right="0cm" fo:margin-top="0.5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" fo:font-size="26pt" fo:language="es" fo:country="ES"/>
    </style:style>
    <style:style style:name="P35" style:family="paragraph">
      <style:paragraph-properties fo:margin-left="0cm" fo:margin-right="0cm" fo:margin-top="0.5cm" fo:margin-bottom="0cm" fo:line-height="100%" fo:text-align="end" fo:text-indent="0cm"/>
    </style:style>
    <style:style style:name="P36" style:family="paragraph">
      <style:paragraph-properties fo:margin-left="0cm" fo:margin-right="0cm" fo:margin-top="0.5cm" fo:margin-bottom="0cm" fo:line-height="100%" fo:text-align="start" fo:text-indent="0cm"/>
    </style:style>
    <style:style style:name="P37" style:family="paragraph">
      <style:paragraph-properties fo:margin-left="0cm" fo:margin-right="0cm" fo:margin-top="0.8cm" fo:margin-bottom="0cm" fo:line-height="100%" fo:text-align="end" fo:text-indent="0cm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ffffff"/>
      <style:paragraph-properties fo:text-align="end"/>
      <style:text-properties fo:language="es" fo:country="ES"/>
    </style:style>
    <style:style style:name="P40" style:family="paragraph">
      <loext:graphic-properties draw:fill-color="#ffffff"/>
      <style:paragraph-properties fo:text-align="center"/>
      <style:text-properties style:font-name="Liberation Sans" fo:font-size="36pt" fo:language="es" fo:country="ES" style:font-size-asian="36pt" style:font-size-complex="36pt"/>
    </style:style>
    <style:style style:name="P41" style:family="paragraph">
      <loext:graphic-properties draw:fill="none"/>
      <style:paragraph-properties fo:text-align="end" style:font-independent-line-spacing="true"/>
      <style:text-properties fo:color="#000000" loext:opacity="100%" style:font-name="Liberation Sans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ize="32pt" fo:language="es" fo:country="ES" style:font-size-asian="32pt" style:font-size-complex="32pt"/>
    </style:style>
    <style:style style:name="T8" style:family="text">
      <style:text-properties fo:font-size="18pt" fo:language="es" fo:country="ES"/>
    </style:style>
    <style:style style:name="T9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0" style:family="text">
      <style:text-properties style:font-name="Liberation Sans" fo:font-size="40pt" fo:language="es" fo:country="ES" fo:font-style="italic" style:font-size-asian="40pt" style:font-style-asian="italic" style:font-size-complex="40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fo:language="es" fo:country="ES" style:font-size-asian="40pt" style:font-size-complex="40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5" style:family="text"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40pt" fo:language="es" fo:country="ES" fo:font-weight="normal" style:font-size-asian="40pt" style:font-weight-asian="normal" style:font-size-complex="40pt" style:font-weight-complex="normal"/>
    </style:style>
    <style:style style:name="T18" style:family="text"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fo:color="#000000" loext:opacity="100%" style:font-name="Liberation Sans" fo:font-size="28pt" fo:language="es" fo:country="ES" fo:font-style="italic" style:font-style-asian="italic" style:font-style-complex="italic"/>
    </style:style>
    <style:style style:name="T23" style:family="text">
      <style:text-properties fo:color="#000000" loext:opacity="100%" style:font-name="Liberation Sans" fo:font-size="44pt" fo:language="es" fo:country="ES" fo:font-style="italic" style:font-size-asian="26pt" style:font-style-asian="italic" style:font-size-complex="26pt" style:font-style-complex="italic"/>
    </style:style>
    <style:style style:name="T24" style:family="text">
      <style:text-properties fo:color="#000000" loext:opacity="100%" style:font-name="Liberation Sans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language="es" fo:country="ES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44pt" fo:language="es" fo:country="ES" style:font-size-asian="44pt" style:font-size-complex="44pt"/>
    </style:style>
    <style:style style:name="T28" style:family="text">
      <style:text-properties style:font-name="Liberation Sans" fo:font-size="24pt" fo:language="es" fo:country="ES" style:font-size-asian="20pt" style:font-size-complex="20pt"/>
    </style:style>
    <style:style style:name="T29" style:family="text">
      <style:text-properties style:font-name="Liberation Sans" fo:font-size="28pt" fo:language="es" fo:country="ES" style:font-size-asian="24pt" style:font-size-complex="24pt"/>
    </style:style>
    <style:style style:name="T30" style:family="text">
      <style:text-properties style:font-name="Liberation Sans" fo:font-size="60pt" fo:language="es" fo:country="ES" style:font-size-asian="60pt" style:font-size-complex="60pt"/>
    </style:style>
    <style:style style:name="T31" style:family="text">
      <style:text-properties fo:font-size="18pt" fo:language="es" fo:country="ES" style:font-size-asian="18pt" style:font-size-complex="18pt"/>
    </style:style>
    <style:style style:name="T32" style:family="text">
      <style:text-properties fo:color="#000000" loext:opacity="100%" style:font-name="Liberation Sans" fo:font-size="26pt" fo:language="es" fo:country="ES" style:font-size-asian="26pt" style:font-size-complex="26pt"/>
    </style:style>
    <style:style style:name="T33" style:family="text">
      <style:text-properties fo:color="#000000" loext:opacity="100%" style:font-name="Liberation Sans" fo:font-size="24pt" fo:language="es" fo:country="E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/></text:p>
            <text:p text:style-name="P4"><text:span text:style-name="T2">Fediverso: @jgbarah@floss.social</text:span></text:p>
          </draw:text-box>
        </draw:frame>
        <draw:frame draw:name="Título 1" draw:style-name="gr4" draw:text-style-name="P7" draw:layer="layout" svg:width="21.345cm" svg:height="3.048cm" svg:x="2.531cm" svg:y="4.318cm">
          <draw:text-box>
            <text:p text:style-name="P6"><text:span text:style-name="T3">Ciencia Abierta</text:span></text:p>
            <text:p text:style-name="P6"><text:span text:style-name="T3"/></text:p>
          </draw:text-box>
        </draw:frame>
        <draw:frame draw:name="Subtítulo 2" draw:style-name="gr5" draw:text-style-name="P9" draw:layer="layout" svg:width="19.605cm" svg:height="3.048cm" svg:x="2.747cm" svg:y="8.128cm">
          <draw:text-box>
            <text:p text:style-name="P8"><text:span text:style-name="T4">Ética en la Investigación</text:span></text:p>
            <text:p text:style-name="P8"><text:span text:style-name="T4">Escuela Internacional de Doctorado</text:span></text:p>
            <text:p text:style-name="P8"><text:span text:style-name="T4">16 de abril de 2024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3DB32451.emf" xlink:type="simple" xlink:show="embed" xlink:actuate="onLoad" draw:mime-type="image/x-emf">
            <text:p/>
          </draw:image>
          <draw:image xlink:href="Pictures/1000000100000224000000D00984F657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C893EDE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s text:c="2"/></text:span><text:span text:style-name="T6"><text:s/></text:span></text:p>
          </draw:text-box>
        </draw:frame>
        <draw:frame draw:style-name="gr10" draw:text-style-name="P15" draw:layer="layout" svg:width="19.304cm" svg:height="11.09cm" svg:x="5.588cm" svg:y="5.842cm">
          <draw:text-box>
            <text:list text:style-name="L1">
              <text:list-item>
                <text:p><text:span text:style-name="T7">Ciencia abierta</text:span></text:p>
              </text:list-item>
              <text:list-item>
                <text:p><text:span text:style-name="T7">Publicación en acceso abierto</text:span></text:p>
              </text:list-item>
              <text:list-item>
                <text:p><text:span text:style-name="T7">Datos abiertos</text:span></text:p>
              </text:list-item>
              <text:list-item>
                <text:p><text:span text:style-name="T7">Reproducibilidad</text:span></text:p>
              </text:list-item>
              <text:list-item>
                <text:p><text:span text:style-name="T7">Evaluación abierta</text:span></text:p>
              </text:list-item>
              <text:list-item>
                <text:p><text:span text:style-name="T7">Infraestructura y herramientas</text:span></text:p>
              </text:list-item>
              <text:list-item>
                <text:p><text:span text:style-name="T7">Ejemplos de políticas sobre ciencia abierta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Ciencia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5"> <text:s/></text:span><text:span text:style-name="T6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0">Por primera vez</text:span></text:p>
            <text:p text:style-name="P19"><text:span text:style-name="T10">tenemos herramientas</text:span></text:p>
            <text:p text:style-name="P19"><text:span text:style-name="T10">que nos permiten</text:span></text:p>
            <text:p text:style-name="P19"><text:span text:style-name="T10">colaborar, difundir resultados,</text:span></text:p>
            <text:p text:style-name="P19"><text:span text:style-name="T10">elaborar sobre lo que hacen otros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13" draw:text-style-name="P20" draw:layer="layout" svg:width="24.028cm" svg:height="8.051cm" svg:x="0.508cm" svg:y="6.419cm">
          <draw:text-box>
            <text:p text:style-name="P19"><text:span text:style-name="T10">… </text:span><text:span text:style-name="T10">de forma rápida,</text:span></text:p>
            <text:p text:style-name="P19"><text:span text:style-name="T10">barata,</text:span></text:p>
            <text:p text:style-name="P19"><text:span text:style-name="T10">eficiente,</text:span></text:p>
            <text:p text:style-name="P19"><text:span text:style-name="T10">universa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5"><text:tab/></text:span><text:span text:style-name="T6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0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_34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13" draw:text-style-name="P20" draw:layer="layout" svg:width="24.028cm" svg:height="8.051cm" svg:x="0.508cm" svg:y="6.419cm">
          <draw:text-box>
            <text:p text:style-name="P19"><text:span text:style-name="T10">… </text:span><text:span text:style-name="T10">pero las estamos usando</text:span></text:p>
            <text:p text:style-name="P19"><text:span text:style-name="T10">en un contexto heredado,</text:span></text:p>
            <text:p text:style-name="P19"><text:span text:style-name="T10">que no se adapta bien a ellas,</text:span></text:p>
            <text:p text:style-name="P19"><text:span text:style-name="T10">y no permite explotar su potencial.</text:span></text:p>
          </draw:text-box>
        </draw:frame>
        <draw:frame draw:name="Título 5_1" draw:style-name="gr9" draw:text-style-name="P14" draw:layer="layout" svg:width="22.437cm" svg:height="2.487cm" svg:x="0.001cm" svg:y="0.424cm">
          <draw:text-box>
            <text:p text:style-name="P2"><text:span text:style-name="T5"><text:tab/></text:span><text:span text:style-name="T6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11">Nuevo enfoque</text:span><text:span text:style-name="T5"> <text:s/></text:span><text:span text:style-name="T6"><text:s/></text:span></text:p>
          </draw:text-box>
        </draw:frame>
        <draw:frame draw:name="Subtítulo 2" draw:style-name="gr14" draw:text-style-name="P22" draw:layer="layout" svg:width="14.16cm" svg:height="1.12cm" svg:x="0cm" svg:y="2.91cm">
          <draw:text-box>
            <text:p/>
          </draw:text-box>
        </draw:frame>
        <draw:frame draw:style-name="gr15" draw:text-style-name="P24" draw:layer="layout" svg:width="23.114cm" svg:height="9.347cm" svg:x="0.508cm" svg:y="5.373cm">
          <draw:text-box>
            <text:p text:style-name="P23"><text:span text:style-name="T12">Si podemos replantear la investigación y la </text:span><text:span text:style-name="T12">ciencia con las herramientas actuales:</text:span></text:p>
            <text:list text:style-name="L1">
              <text:list-item>
                <text:p text:style-name="P23"><text:span text:style-name="T12">¿Es el esquema tradicional el mejor?</text:span></text:p>
              </text:list-item>
              <text:list-item>
                <text:p text:style-name="P23"><text:span text:style-name="T12">¿Qué nuevas opciones proporciona la </text:span><text:span text:style-name="T12">tecnología?</text:span></text:p>
              </text:list-item>
              <text:list-item>
                <text:p text:style-name="P23"><text:span text:style-name="T12">¿Podemos diseñar un 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28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7" draw:style-name="gr9" draw:text-style-name="P14" draw:layer="layout" svg:width="24.638cm" svg:height="2.487cm" svg:x="0cm" svg:y="0.423cm">
          <draw:text-box>
            <text:p text:style-name="P2"><text:span text:style-name="T5"><text:tab/></text:span><text:span text:style-name="T11">Ciencia abierta / investigación </text:span><text:span text:style-name="T11">abierta</text:span><text:span text:style-name="T5"> <text:s/></text:span><text:span text:style-name="T6"><text:s/></text:span></text:p>
          </draw:text-box>
        </draw:frame>
        <draw:frame draw:name="Subtítulo 2_0" draw:style-name="gr14" draw:text-style-name="P22" draw:layer="layout" svg:width="14.16cm" svg:height="1.12cm" svg:x="0cm" svg:y="2.91cm">
          <draw:text-box>
            <text:p/>
          </draw:text-box>
        </draw:frame>
        <draw:frame draw:style-name="gr16" draw:text-style-name="P24" draw:layer="layout" svg:width="23.114cm" svg:height="10.113cm" svg:x="0.508cm" svg:y="5.373cm">
          <draw:text-box>
            <text:p text:style-name="P23"><text:span text:style-name="T12">Hagamos la investigación más colaborativa, </text:span><text:span text:style-name="T12">más accesible, más involucrada en la </text:span><text:span text:style-name="T12">sociedad</text:span></text:p>
            <text:p text:style-name="P23"><text:span text:style-name="T12"/></text:p>
            <text:p text:style-name="P23"><text:span text:style-name="T12">Afecta a prácticamente todos los aspectos </text:span><text:span text:style-name="T12">de la actividad investigadora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13">Ciencia Abierta: una taxonomía</text:span></text:p>
          </draw:text-box>
        </draw:frame>
        <draw:frame draw:style-name="gr7" draw:text-style-name="P26" draw:layer="layout" svg:width="25.225cm" svg:height="13.906cm" svg:x="0.254cm" svg:y="2.647cm">
          <draw:image xlink:href="Pictures/1000000100000ED80000082F46A801E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8">
        <draw:frame draw:name="Título 13_30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Publicación en </text:span><text:span text:style-name="T9">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_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3" draw:style-name="gr9" draw:text-style-name="P14" draw:layer="layout" svg:width="24.638cm" svg:height="2.487cm" svg:x="0cm" svg:y="0.423cm">
          <draw:text-box>
            <text:p text:style-name="P2"><text:span text:style-name="T5"><text:tab/></text:span><text:span text:style-name="T11">Objetivos</text:span><text:span text:style-name="T5"> <text:s/></text:span><text:span text:style-name="T6"><text:s/></text:span></text:p>
          </draw:text-box>
        </draw:frame>
        <draw:frame draw:name="Subtítulo 2_1" draw:style-name="gr14" draw:text-style-name="P22" draw:layer="layout" svg:width="14.16cm" svg:height="1.12cm" svg:x="0cm" svg:y="2.91cm">
          <draw:text-box>
            <text:p/>
          </draw:text-box>
        </draw:frame>
        <draw:frame draw:style-name="gr16" draw:text-style-name="P24" draw:layer="layout" svg:width="23.114cm" svg:height="10.113cm" svg:x="0.508cm" svg:y="5.373cm">
          <draw:text-box>
            <text:p text:style-name="P23"><text:span text:style-name="T12">Hagamos la investigación y sus resultados </text:span><text:span text:style-name="T12">accesibles a todos los niveles, para otros </text:span><text:span text:style-name="T12">investigadores (profesionales o aficionados) </text:span><text:span text:style-name="T12">y para la sociedad en general</text:span></text:p>
            <text:p text:style-name="P23"><text:span text:style-name="T12"/></text:p>
            <text:p text:style-name="P23"><text:span text:style-name="T12">Afecta a publicaciones, datos, materiales de </text:span><text:span text:style-name="T12">difusión, software, materiales de trabajo, etc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14">Berlin Declaration on </text:span><text:span text:style-name="T14">Open Access</text:span><text:span text:style-name="T5"> <text:s/></text:span><text:span text:style-name="T6"><text:s/></text:span></text:p>
          </draw:text-box>
        </draw:frame>
        <draw:frame draw:style-name="gr17" draw:text-style-name="P27" draw:layer="layout" svg:width="17.526cm" svg:height="1.145cm" svg:x="6.858cm" svg:y="15.111cm">
          <draw:text-box>
            <text:p><text:span text:style-name="T15"><text:a xlink:href="https://openaccess.mpg.de/Berlin-Declaration" xlink:type="simple">https://openaccess.mpg.de/Berlin-Declaration</text:a></text:span></text:p>
          </draw:text-box>
        </draw:frame>
        <draw:frame draw:style-name="gr18" draw:text-style-name="P28" draw:layer="layout" svg:width="23.622cm" svg:height="9.448cm" svg:x="0.512cm" svg:y="4.525cm">
          <draw:text-box>
            <text:p text:style-name="P23"><text:span text:style-name="T12">“</text:span><text:span text:style-name="T12">El (los) autor(es) [...] deben garantizar el </text:span><text:span text:style-name="T12">derecho gratuito, irrevocable y mundial de </text:span><text:span text:style-name="T12">acceder al <text:s/>trabajo, y licencia para copiarlo, </text:span><text:span text:style-name="T12">usarlo, distribuirlo, transmitirlo y exhibirlo </text:span><text:span text:style-name="T12">públicamente, y para hacer y distribuir </text:span><text:span text:style-name="T12">trabajos derivados […]''</text:span></text:p>
            <text:p text:style-name="P19"><text:span text:style-name="T16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11">Condiciones</text:span></text:p>
          </draw:text-box>
        </draw:frame>
        <draw:frame draw:name="Subtítulo 2" draw:style-name="gr14" draw:text-style-name="P22" draw:layer="layout" svg:width="14.16cm" svg:height="1.12cm" svg:x="0cm" svg:y="2.91cm">
          <draw:text-box>
            <text:p/>
          </draw:text-box>
        </draw:frame>
        <draw:frame draw:style-name="gr19" draw:text-style-name="P29" draw:layer="layout" svg:width="23.821cm" svg:height="11.326cm" svg:x="0.421cm" svg:y="4.422cm">
          <draw:text-box>
            <text:list text:style-name="L3">
              <text:list-item>
                <text:p><text:span text:style-name="T17">Derecho de acceso (consulta)</text:span></text:p>
              </text:list-item>
              <text:list-item>
                <text:p><text:span text:style-name="T17">Derecho de copia</text:span></text:p>
              </text:list-item>
              <text:list-item>
                <text:p><text:span text:style-name="T17">Derecho de trabajos derivados</text:span></text:p>
              </text:list-item>
              <text:list-item>
                <text:p><text:span text:style-name="T17">Formatos electrónicos </text:span><text:span text:style-name="T17">“adecuados”</text:span></text:p>
              </text:list-item>
              <text:list-item>
                <text:p><text:span text:style-name="T17">Depósito en un archivo abierto</text:span></text:p>
              </text:list-item>
            </text:list>
            <text:p><text:span text:style-name="T18"/></text:p>
            <text:p text:style-name="P17"><text:span text:style-name="T17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20" draw:text-style-name="P30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</text:span><text:span text:style-name="T20">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(gráficos, </text:span><text:span text:style-name="T20">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22" draw:text-style-name="P30" draw:layer="layout" svg:width="21.844cm" svg:height="11.627cm" svg:x="1.524cm" svg:y="4.747cm">
          <draw:text-box>
            <text:list text:style-name="L3">
              <text:list-item>
                <text:p><text:span text:style-name="T20">Estándares de acceso adecuados </text:span><text:span text:style-name="T20">(ejemplo: Open Archive Definitions)</text:span></text:p>
              </text:list-item>
              <text:list-item>
                <text:p><text:span text:style-name="T20">Mantenido por una organización </text:span><text:span text:style-name="T20">“fiable”</text:span></text:p>
              </text:list-item>
              <text:list-item>
                <text:p><text:span text:style-name="T20">Vocación de distribución universal, </text:span><text:span text:style-name="T20">interoperabilidad, archivo a largo </text:span><text:span text:style-name="T20">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_31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Datos abiert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_5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1.336cm" svg:height="3.095cm" svg:x="0.508cm" svg:y="1.121cm">
          <draw:text-box>
            <text:p><text:span text:style-name="T21">La importancia de los datos</text:span></text:p>
          </draw:text-box>
        </draw:frame>
        <draw:frame draw:style-name="gr23" draw:text-style-name="P34" draw:layer="layout" svg:width="23.876cm" svg:height="11.359cm" svg:x="0.762cm" svg:y="4.318cm">
          <draw:text-box>
            <text:p text:style-name="P32"><text:span text:style-name="T22">Los datos son fundamentales en muchos campos </text:span><text:span text:style-name="T22">de investigación:</text:span></text:p>
            <text:list text:style-name="L1">
              <text:list-item>
                <text:p text:style-name="P32"><text:span text:style-name="T22">Modelan los objetos investigados</text:span></text:p>
              </text:list-item>
              <text:list-item>
                <text:p text:style-name="P32"><text:span text:style-name="T22">Se utilizan para extraer resultados (que pueden </text:span><text:span text:style-name="T22">ser datos también)</text:span></text:p>
              </text:list-item>
              <text:list-item>
                <text:p text:style-name="P32"><text:span text:style-name="T22">Necesarios para reproducir, interpretar, entender</text:span></text:p>
              </text:list-item>
            </text:list>
            <text:p text:style-name="P33"><text:span text:style-name="T23">“</text:span><text:span text:style-name="T23">El detalle está en en los datos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_35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1.336cm" svg:height="3.095cm" svg:x="0.508cm" svg:y="1.121cm">
          <draw:text-box>
            <text:p><text:span text:style-name="T21">Datos abiertos (open data)</text:span></text:p>
          </draw:text-box>
        </draw:frame>
        <draw:frame draw:style-name="gr24" draw:text-style-name="P34" draw:layer="layout" svg:width="23.876cm" svg:height="11.359cm" svg:x="0.762cm" svg:y="4.318cm">
          <draw:text-box>
            <text:p text:style-name="P32"><text:span text:style-name="T22">“</text:span><text:span text:style-name="T22">Datos que cualquiera puede usar, modificar y </text:span><text:span text:style-name="T22">compartir para cualquier propósito”</text:span></text:p>
            <text:p text:style-name="P35"><text:span text:style-name="T24"><text:a xlink:href="http://opendefinition.org/" xlink:type="simple">http://opendefinition.org</text:a></text:span></text:p>
            <text:p text:style-name="P36"><text:span text:style-name="T22"/></text:p>
            <text:p text:style-name="P36"><text:span text:style-name="T22">“</text:span><text:span text:style-name="T22">Datos libremente disponibles para cualquiera, que </text:span><text:span text:style-name="T22">se pueden utilizar y republicar, sin restricciones de </text:span><text:span text:style-name="T22">patentes, derechos de autor, ni de otro tipo.”</text:span></text:p>
            <text:p text:style-name="P37"><text:span text:style-name="T24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8">
        <draw:frame draw:name="Título 13_2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1.336cm" svg:height="5.925cm" svg:x="1.858cm" svg:y="4.296cm">
          <draw:text-box>
            <text:p text:style-name="P17"><text:span text:style-name="T9">Reproducibilida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Solución a la crisis de </text:span><text:span text:style-name="T25">reproducibilidad</text:span></text:p>
          </draw:text-box>
        </draw:frame>
        <draw:frame presentation:style-name="pr10" draw:text-style-name="P25" draw:layer="layout" svg:width="23.114cm" svg:height="11.799cm" svg:x="1.27cm" svg:y="4.457cm" presentation:class="outline" presentation:user-transformed="true">
          <draw:text-box>
            <text:list text:style-name="L3">
              <text:list-item>
                <text:p><text:span text:style-name="T25">¿Hay una crisis de reproducibilidad?</text:span></text:p>
              </text:list-item>
              <text:list-item>
                <text:p><text:span text:style-name="T25">Si los resultados no se pueden reproducir, no podemos estar seguros de ellos</text:span></text:p>
              </text:list-item>
              <text:list-item>
                <text:p><text:span text:style-name="T25">Posible solución: proporcionar mecanismos de ayuda a la reproducibilidad de forma integral, como parte de la propia investigación</text:span></text:p>
              </text:list-item>
              <text:list-item>
                <text:p><text:span text:style-name="T25">Posible solución: reproducción como parte de la revisión por par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5">Ayudas a la reproducibilidad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5">Cuadernos de campo / laboratorio abiertos</text:span></text:p>
              </text:list-item>
              <text:list-item>
                <text:p><text:span text:style-name="T25">Procesos de investigación abiertos (atención a grupos reproductores)</text:span></text:p>
              </text:list-item>
              <text:list-item>
                <text:p><text:span text:style-name="T25">Reproducción como parte de la investigación</text:span></text:p>
              </text:list-item>
              <text:list-item>
                <text:p><text:span text:style-name="T25">Prácticas de prueba de autorreproducción</text:span></text:p>
              </text:list-item>
              <text:list-item>
                <text:p><text:span text:style-name="T25">Publicación de todo lo necesari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8">
        <draw:frame draw:name="Título 13_32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1.336cm" svg:height="5.925cm" svg:x="1.858cm" svg:y="4.296cm">
          <draw:text-box>
            <text:p text:style-name="P17"><text:span text:style-name="T9">Evaluación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5">Revisión abierta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5">Intercambios detallados y públicos entre autores y revisores</text:span></text:p>
              </text:list-item>
              <text:list-item>
                <text:p><text:span text:style-name="T25">Terceras partes podrían destacar problemas o errores</text:span></text:p>
              </text:list-item>
              <text:list-item>
                <text:p><text:span text:style-name="T25">Revisión como un proceso continuo, empieza antes del envío para publicación, no termina ni después de la publicación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presentation:style-name="pr9" draw:text-style-name="P25" draw:layer="layout" svg:width="21.082cm" svg:height="3.473cm" svg:x="2.032cm" svg:y="-0.154cm" presentation:class="title" presentation:user-transformed="true">
          <draw:text-box>
            <text:p><text:span text:style-name="T25">Nuevas métricas y evaluación </text:span><text:span text:style-name="T25">cualitativa</text:span></text:p>
          </draw:text-box>
        </draw:frame>
        <draw:frame draw:style-name="gr7" draw:text-style-name="P26" draw:layer="layout" svg:width="18.621cm" svg:height="12.98cm" svg:x="-0.021cm" svg:y="3.531cm">
          <draw:image xlink:href="Pictures/10000001000004E00000036662BEFE44.png" xlink:type="simple" xlink:show="embed" xlink:actuate="onLoad" draw:mime-type="image/png">
            <text:p/>
          </draw:image>
        </draw:frame>
        <draw:frame presentation:style-name="pr11" draw:text-style-name="P39" draw:layer="layout" svg:width="24.13cm" svg:height="2.77cm" svg:x="0.414cm" svg:y="13.896cm" presentation:class="outline" presentation:user-transformed="true">
          <draw:text-box>
            <text:list text:style-name="L3">
              <text:list-header>
                <text:p text:style-name="P38"><text:span text:style-name="T26"><text:a xlink:href="https://sfdora.org/" xlink:type="simple">https://sfdora.org/</text:a></text:span></text:p>
                <text:p text:style-name="P38"><text:span text:style-name="T26"><text:a xlink:href="https://researchsupport.admin.ox.ac.uk/information/principles" xlink:type="simple">https://researchsupport.admin.ox.ac.uk/information/principles</text:a></text:span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presentation:style-name="pr9" draw:text-style-name="P25" draw:layer="layout" svg:width="21.082cm" svg:height="3.473cm" svg:x="2.032cm" svg:y="-0.154cm" presentation:class="title" presentation:user-transformed="true">
          <draw:text-box>
            <text:p><text:span text:style-name="T25">Nuevos criterios</text:span></text:p>
          </draw:text-box>
        </draw:frame>
        <draw:frame presentation:style-name="pr11" draw:text-style-name="P39" draw:layer="layout" svg:width="7.32cm" svg:height="1.524cm" svg:x="17.526cm" svg:y="15.24cm" presentation:class="outline" presentation:user-transformed="true">
          <draw:text-box>
            <text:list text:style-name="L3">
              <text:list-header>
                <text:p text:style-name="P38"><text:span text:style-name="T26"><text:a xlink:href="https://coara.eu/" xlink:type="simple">https://coara.eu</text:a></text:span></text:p>
              </text:list-header>
            </text:list>
          </draw:text-box>
        </draw:frame>
        <draw:frame draw:style-name="gr7" draw:text-style-name="P11" draw:layer="layout" svg:width="18.753cm" svg:height="12.909cm" svg:x="0.043cm" svg:y="2.572cm">
          <draw:image xlink:href="Pictures/10000001000004AD0000033829EF328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8">
        <draw:frame draw:name="Título 13_6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Infraestructura y </text:span><text:span text:style-name="T9">herramient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Tecnología para la ciencia </text:span><text:span text:style-name="T25">abierta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7">Repositorios abiertos: publicación, catalogación, preservación...</text:span></text:p>
              </text:list-item>
              <text:list-item>
                <text:p><text:span text:style-name="T27">Plataformas de colaboración (open workflow)</text:span></text:p>
              </text:list-item>
              <text:list-item>
                <text:p><text:span text:style-name="T27">Servicios de apoyo a la ciencia abierta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5">Ejemplos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7">Zenodo (publicación, datos...)</text:span></text:p>
              </text:list-item>
              <text:list-item>
                <text:p><text:span text:style-name="T27">Binder (Jupyter Lab como servicio)</text:span></text:p>
              </text:list-item>
              <text:list-item>
                <text:p><text:span text:style-name="T27">ORCID (identificador de investigador)</text:span></text:p>
              </text:list-item>
              <text:list-item>
                <text:p><text:span text:style-name="T27">ROR (identificador de organización)</text:span></text:p>
              </text:list-item>
            </text:list>
            <text:p text:style-name="P38"><text:span text:style-name="T7"><text:a xlink:href="https://zenodo.org/" xlink:type="simple">https://zenodo.org/</text:a></text:span></text:p>
            <text:p text:style-name="P38"><text:span text:style-name="T7"><text:a xlink:href="https://mybinder.org/" xlink:type="simple">https://mybinder.org</text:a></text:span></text:p>
            <text:p text:style-name="P38"><text:span text:style-name="T7"><text:a xlink:href="https://orcid.org/" xlink:type="simple">https://orcid.org</text:a></text:span></text:p>
            <text:p text:style-name="P38"><text:span text:style-name="T7"><text:a xlink:href="https://ror.org/" xlink:type="simple">https://ror.org</text:a></text:span><text:span text:style-name="T7"><text:s text:c="9"/></text:span><text:span text:style-name="T7"><text:a xlink:href="https://ror.org/01v5cv687" xlink:type="simple">https://ror.org/01v5cv687</text:a></text:span></text:p>
            <text:p><text:span text:style-name="T27"/></text:p>
            <text:p><text:span text:style-name="T27"/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18">
        <draw:frame draw:name="Título 13_4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25" draw:text-style-name="P18" draw:layer="layout" svg:width="24.384cm" svg:height="4.846cm" svg:x="0.508cm" svg:y="3.536cm">
          <draw:text-box>
            <text:p text:style-name="P17"><text:span text:style-name="T9">Software libre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Software libre para </text:span><text:span text:style-name="T25">herrameintas y servicios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p><text:span text:style-name="T27">Muchas herramientas para ciencia abierta son software libre</text:span></text:p>
            <text:list text:style-name="L3">
              <text:list-item>
                <text:p><text:span text:style-name="T27">Facilitan la involucración de los usuarios en su mejora</text:span></text:p>
              </text:list-item>
              <text:list-item>
                <text:p><text:span text:style-name="T27">Facilitan la creación de consorcios para su mantenimiento y evolución</text:span></text:p>
              </text:list-item>
              <text:list-item>
                <text:p><text:span text:style-name="T27">Facilitan el despliegue local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Software como parte de la </text:span><text:span text:style-name="T25">reproducibilidad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p><text:span text:style-name="T27">El software es básico para la reproducibilidad.</text:span></text:p>
            <text:p><text:span text:style-name="T27">El software libre facilita:</text:span></text:p>
            <text:list text:style-name="L3">
              <text:list-item>
                <text:p><text:span text:style-name="T27">Disposición del software para cualquier revisor</text:span></text:p>
              </text:list-item>
              <text:list-item>
                <text:p><text:span text:style-name="T27">Disponibilidad del software durante mucho tiempo</text:span></text:p>
              </text:list-item>
              <text:list-item>
                <text:p><text:span text:style-name="T27">Inspección del software para mitigar error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1T18">
        <draw:frame draw:name="Título 13_7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25" draw:text-style-name="P18" draw:layer="layout" svg:width="24.384cm" svg:height="4.846cm" svg:x="0.508cm" svg:y="5.06cm">
          <draw:text-box>
            <text:p text:style-name="P17"><text:span text:style-name="T9">Polític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_26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6" draw:text-style-name="P30" draw:layer="layout" svg:width="24.638cm" svg:height="1.778cm" svg:x="1.016cm" svg:y="14.986cm">
          <draw:text-box>
            <text:p><text:span text:style-name="T28"><text:a xlink:href="https://en.unesco.org/science-sustainable-future/open-science" xlink:type="simple">https://en.unesco.org/science-sustainable-future/open-science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1">Unesco</text:span></text:p>
          </draw:text-box>
        </draw:frame>
        <draw:frame draw:style-name="gr7" draw:text-style-name="P26" draw:layer="layout" svg:width="19.558cm" svg:height="12.265cm" svg:x="5.842cm" svg:y="2.54cm">
          <draw:image xlink:href="Pictures/100000010000058800000378A6A1C93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_9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1">Unión Europea</text:span></text:p>
          </draw:text-box>
        </draw:frame>
        <draw:frame draw:style-name="gr7" draw:text-style-name="P26" draw:layer="layout" svg:width="21.923cm" svg:height="12.629cm" svg:x="3.2cm" svg:y="3.414cm">
          <draw:image xlink:href="Pictures/100000010000058C0000033280FCF69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8">
        <draw:frame draw:name="Título 13_8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7" draw:text-style-name="P30" draw:layer="layout" svg:width="23.749cm" svg:height="13.032cm" svg:x="0.472cm" svg:y="3.654cm">
          <draw:text-box>
            <text:p><text:span text:style-name="T20">Publicaciones científicas financiadas </text:span><text:span text:style-name="T20">con fondos públicos se publicarán en </text:span><text:span text:style-name="T20">revistas o plataformas de acceso </text:span><text:span text:style-name="T20">abierto</text:span></text:p>
            <text:list text:style-name="L3">
              <text:list-header>
                <text:p><text:span text:style-name="T20"/></text:p>
                <text:p><text:span text:style-name="T20"/></text:p>
                <text:p><text:span text:style-name="T20"/></text:p>
              </text:list-header>
            </text:list>
            <text:p><text:span text:style-name="T20"/></text:p>
            <text:p><text:span text:style-name="T20"/></text:p>
            <text:p text:style-name="P38"><text:span text:style-name="T29"><text:a xlink:href="https://www.coalition-s.org/" xlink:type="simple">https://www.coalition-s.org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1">Plan S</text:span></text:p>
          </draw:text-box>
        </draw:frame>
        <draw:frame draw:style-name="gr7" draw:text-style-name="P26" draw:layer="layout" svg:width="13.309cm" svg:height="7.178cm" svg:x="4.725cm" svg:y="8.062cm">
          <draw:image xlink:href="Pictures/100000010000051D000002C20DC92EE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8">
        <draw:frame draw:name="Título 13_ 2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3.368cm" svg:height="3.095cm" svg:x="1.016cm" svg:y="0.254cm">
          <draw:text-box>
            <text:p><text:span text:style-name="T21">Ley de Ordenación del Sistema </text:span><text:span text:style-name="T21">Universitario (2023)</text:span></text:p>
          </draw:text-box>
        </draw:frame>
        <draw:frame draw:style-name="gr7" draw:text-style-name="P11" draw:layer="layout" svg:width="24.597cm" svg:height="9.076cm" svg:x="0.508cm" svg:y="5.148cm">
          <draw:image xlink:href="Pictures/10000001000006900000026C5137583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8">
        <draw:frame draw:name="Título 13_ 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3.368cm" svg:height="3.095cm" svg:x="1.016cm" svg:y="0.254cm">
          <draw:text-box>
            <text:p><text:span text:style-name="T21">Ley de Ordenación del Sistema </text:span><text:span text:style-name="T21">Universitario (2023)</text:span></text:p>
          </draw:text-box>
        </draw:frame>
        <draw:frame draw:style-name="gr7" draw:text-style-name="P11" draw:layer="layout" svg:width="21.039cm" svg:height="12.572cm" svg:x="3.556cm" svg:y="3.938cm">
          <draw:image xlink:href="Pictures/1000000100000690000003EC2337569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8">
        <draw:frame draw:name="Título 13_ 1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8" draw:text-style-name="P40" draw:layer="layout" svg:width="23.749cm" svg:height="10.082cm" svg:x="0.508cm" svg:y="4.396cm">
          <draw:text-box>
            <text:p text:style-name="P17"><text:span text:style-name="T30">Ciencia abierta:</text:span></text:p>
            <text:p text:style-name="P17"><text:span text:style-name="T30"/></text:p>
            <text:p text:style-name="P17"><text:span text:style-name="T30">¿La ciencia como </text:span><text:span text:style-name="T30">debería ser la ciencia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>
          <draw:text-box>
            <text:p><text:span text:style-name="T25">Créditos</text:span></text:p>
          </draw:text-box>
        </draw:frame>
        <draw:frame presentation:style-name="pr10" draw:text-style-name="P25" draw:layer="layout" svg:width="24.13cm" svg:height="11.675cm" svg:x="0.762cm" svg:y="4.572cm" presentation:class="outline" presentation:user-transformed="true">
          <draw:text-box>
            <text:list text:style-name="L3">
              <text:list-item>
                <text:p><text:span text:style-name="T26">“</text:span><text:span text:style-name="T26">Open Science Taxonomy”,</text:span></text:p>
                <text:p><text:span text:style-name="T26">Petr Knoth and Nancy Pontika</text:span></text:p>
                <text:p><text:span text:style-name="T31"><text:a xlink:href="https://en.wikipedia.org/wiki/Open_science#/media/File:Os_taxonomy.png" xlink:type="simple">https://en.wikipedia.org/wiki/Open_science#/media/File:Os_taxonomy.png</text:a></text:span></text:p>
                <text:p><text:span text:style-name="T31"/></text:p>
              </text:list-item>
            </text:list>
          </draw:text-box>
        </draw:frame>
        <draw:frame draw:style-name="gr7" draw:text-style-name="P26" draw:layer="layout" svg:width="5.78cm" svg:height="3.187cm" svg:x="16.838cm" svg:y="3.963cm">
          <draw:image xlink:href="Pictures/1000000100000ED80000082F46A801E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8">
        <draw:frame draw:name="Marcador de contenido 6" presentation:style-name="pr6" draw:text-style-name="P41" draw:layer="layout" svg:width="23.114cm" svg:height="8.576cm" svg:x="0.254cm" svg:y="6.858cm" presentation:class="outline" presentation:user-transformed="true">
          <draw:text-box>
            <text:p text:style-name="P38"><text:span text:style-name="T32">©2019-2024 OfiLibre URJC</text:span></text:p>
            <text:p text:style-name="P38"><text:span text:style-name="T32">Algunos derechos reservados.</text:span></text:p>
            <text:p text:style-name="P38"><text:span text:style-name="T32">Este documento se distribuye bajo la licencia “Reconocimiento-CompartirIgual 4.0 Internacional” de Creative Commons, disponible en</text:span></text:p>
            <text:p><text:span text:style-name="T33"><text:a xlink:href="https://creativecommons.org/licenses/by-sa/4.0/deed.es" xlink:type="simple">https://creativecommons.org/licenses/by-sa/4.0/deed.es</text:a></text:span></text:p>
            <text:p text:style-name="P38"><text:span text:style-name="T32"/></text:p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/>
    <style:font-face style:name="Arial Black1" svg:font-family="'Arial Black'" style:font-family-generic="roman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ook" xlink:href="Pictures/100000000000078000000387F062883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 loext:decorative="false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 loext:decorative="false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 loext:decorative="false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2.119cm" fo:padding-top="0.127cm" fo:padding-bottom="0.127cm" fo:padding-left="0.254cm" fo:padding-right="0.254cm" fo:wrap-option="wrap" loext:decorative="false"/>
      <style:paragraph-properties style:writing-mode="lr-tb"/>
    </style:style>
    <style:style style:name="Mgr9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4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font-independent-line-spacing="true"/>
    </style:style>
    <style:style style:name="MP17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8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MP25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line-height="100%"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32" style:family="text">
      <style:text-properties fo:font-size="54pt" style:font-size-asian="54pt" style:font-size-complex="54pt"/>
    </style:style>
    <style:style style:name="MT3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4" draw:layer="backgroundobjects" svg:width="5.715cm" svg:height="16.254cm" svg:x="18.415cm" svg:y="0.76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Vertical Text Placeholder 2" presentation:style-name="Mpr91" draw:text-style-name="MP4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4-04-15">4/15/24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5" draw:text-style-name="MP17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4-04-15">4/15/24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8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2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3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3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ángulo 9_ 3" draw:style-name="Mgr7" draw:text-style-name="MP23" draw:layer="backgroundobjects" svg:width="25.4cm" svg:height="2.381cm" svg:x="0.033cm" svg:y="16.764cm">
        <text:p/>
        <draw:enhanced-geometry svg:viewBox="0 0 21600 21600" draw:mirror-horizontal="false" draw:mirror-vertical="false" draw:type="non-primitive" draw:enhanced-path="M 0 0 L 21600 0 21600 21600 0 21600 Z N"/>
      </draw:custom-shape>
      <draw:frame presentation:style-name="Mpr114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8" draw:text-style-name="MP24" draw:layer="backgroundobjects" svg:width="12.256cm" svg:height="2.375cm" svg:x="13.177cm" svg:y="16.677cm">
        <draw:text-box>
          <text:p text:style-name="MP3"><text:span text:style-name="MT30"/></text:p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frame draw:name="Subtítulo 2_13" draw:style-name="Mgr9" draw:text-style-name="MP25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10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0" draw:text-style-name="MP26" draw:layer="backgroundobjects" svg:width="8.697cm" svg:height="2.124cm" svg:x="0.289cm" svg:y="16.839cm">
        <draw:image xlink:href="Pictures/1000000100000333000000C8C39BB24A.png" xlink:type="simple" xlink:show="embed" xlink:actuate="onLoad" draw:mime-type="image/png">
          <text:p/>
        </draw:image>
      </draw:frame>
      <draw:frame draw:style-name="Mgr11" draw:text-style-name="MP22" draw:layer="backgroundobjects" svg:width="3.832cm" svg:height="2.083cm" svg:x="9.014cm" svg:y="16.835cm">
        <draw:text-box>
          <text:p text:style-name="MP27"><text:span text:style-name="MT31"/></text:p>
          <text:p text:style-name="MP27"><text:span text:style-name="MT31">2024-04-15</text:span></text:p>
          <text:p text:style-name="MP27"><text:span text:style-name="MT31"><text:page-number>&lt;number&gt;</text:page-number></text:span><text:span text:style-name="MT31">/</text:span><text:span text:style-name="MT31"><text:page-count>40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5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6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6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7" draw:layer="backgroundobjects" svg:width="22.859cm" svg:height="6.35cm" svg:x="1.27cm" svg:y="4.826cm" presentation:class="title">
        <draw:text-box>
          <text:p><text:span text:style-name="MT32">Click to edit the title text </text:span><text:span text:style-name="MT32">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8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CuadroTexto 8_19" draw:style-name="Mgr12" draw:text-style-name="MP24" draw:layer="backgroundobjects" svg:width="13.742cm" svg:height="3.467cm" svg:x="11.662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3"/></text:p>
          <text:p text:style-name="MP3"><text:span text:style-name="MT33"/></text:p>
        </draw:text-box>
      </draw:frame>
      <draw:custom-shape draw:name="Rectangle 6" draw:style-name="Mgr5" draw:text-style-name="MP10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8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draw:frame draw:style-name="Mgr10" draw:text-style-name="MP26" draw:layer="backgroundobjects" svg:width="8.697cm" svg:height="2.124cm" svg:x="0.289cm" svg:y="16.839cm">
        <draw:image xlink:href="Pictures/1000000100000333000000C8C39BB24A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8" draw:text-style-name="MP20" draw:layer="backgroundobjects" svg:width="9.369cm" svg:height="1.396cm" svg:x="0cm" svg:y="0cm" presentation:class="header">
          <draw:text-box>
            <text:p text:style-name="MP19"><text:span text:style-name="MT29"><presentation:header/></text:span></text:p>
          </draw:text-box>
        </draw:frame>
        <draw:frame presentation:style-name="Mpr118" draw:text-style-name="MP22" draw:layer="backgroundobjects" svg:width="9.369cm" svg:height="1.396cm" svg:x="12.22cm" svg:y="0cm" presentation:class="date-time">
          <draw:text-box>
            <text:p text:style-name="MP21"><text:span text:style-name="MT29"><presentation:date-time/></text:span></text:p>
          </draw:text-box>
        </draw:frame>
        <draw:frame presentation:style-name="Mpr119" draw:text-style-name="MP20" draw:layer="backgroundobjects" svg:width="9.369cm" svg:height="1.396cm" svg:x="0cm" svg:y="26.543cm" presentation:class="footer">
          <draw:text-box>
            <text:p text:style-name="MP19"><text:span text:style-name="MT29"><presentation:footer/></text:span></text:p>
          </draw:text-box>
        </draw:frame>
        <draw:frame presentation:style-name="Mpr119" draw:text-style-name="MP22" draw:layer="backgroundobjects" svg:width="9.369cm" svg:height="1.396cm" svg:x="12.22cm" svg:y="26.543cm" presentation:class="page-number">
          <draw:text-box>
            <text:p text:style-name="MP21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dc:title>PowerPoint Presentation</dc:title>
    <meta:initial-creator>Manuel Gertrudix Barrio</meta:initial-creator>
    <meta:creation-date>2019-01-21T12:01:12Z</meta:creation-date>
    <dc:date>2024-04-15T23:47:07.415406160</dc:date>
    <meta:editing-cycles>48</meta:editing-cycles>
    <meta:editing-duration>PT16H3M7S</meta:editing-duration>
    <dc:creator>Jesus Gonzalez-Barahona</dc:creator>
    <meta:document-statistic meta:object-count="435"/>
    <meta:template xlink:type="simple" xlink:actuate="onRequest" xlink:title="" xlink:href="../Downloads/presentaciones/Ofilibre-presentacion.odp/Esencial"/>
  </office:meta>
</office:document-meta>
</file>