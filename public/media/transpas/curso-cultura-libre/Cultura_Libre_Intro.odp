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400000027F93BCAEE3.png" manifest:media-type="image/png"/>
  <manifest:file-entry manifest:full-path="Pictures/1000000100000690000003EC23375696.png" manifest:media-type="image/png"/>
  <manifest:file-entry manifest:full-path="Pictures/10000001000006900000026C51375833.png" manifest:media-type="image/png"/>
  <manifest:file-entry manifest:full-path="Pictures/100000010000014000000071C893EDEA.png" manifest:media-type="image/png"/>
  <manifest:file-entry manifest:full-path="Pictures/100000010000051C000001C09DD8C50D.png" manifest:media-type="image/png"/>
  <manifest:file-entry manifest:full-path="Pictures/1000000100000333000000C8C39BB24A.png" manifest:media-type="image/png"/>
  <manifest:file-entry manifest:full-path="Pictures/100000000000078000000387F062883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/>
    <style:font-face style:name="Arial Black1" svg:font-family="'Arial Black'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559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95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7.30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8.376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2.62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8.1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9.198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11.395cm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62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063cm" loext:decorative="false"/>
      <style:paragraph-properties style:writing-mode="lr-tb"/>
    </style:style>
    <style:style style:name="gr26" style:family="graphic" style:parent-style-name="standard" style:list-style-name="L2">
      <style:graphic-properties svg:stroke-color="#ffffff" draw:fill-color="#ffffff" fo:min-height="11.827cm" loext:decorative="false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11.178cm" loext:decorative="false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9.955cm" loext:decorative="false"/>
      <style:paragraph-properties style:writing-mode="lr-tb"/>
    </style:style>
    <style:style style:name="gr29" style:family="graphic" style:parent-style-name="standard" style:list-style-name="L2">
      <style:graphic-properties svg:stroke-color="#ffffff" draw:fill-color="#ffffff" fo:min-height="9.955cm" loext:decorative="false"/>
      <style:paragraph-properties style:writing-mode="lr-tb"/>
    </style:style>
    <style:style style:name="gr30" style:family="graphic" style:parent-style-name="standard" style:list-style-name="L2">
      <style:graphic-properties svg:stroke-color="#ffffff" draw:fill-color="#ffffff" fo:min-height="11.377cm" loext:decorative="false"/>
      <style:paragraph-properties style:writing-mode="lr-tb"/>
    </style:style>
    <style:style style:name="gr31" style:family="graphic" style:parent-style-name="standard" style:list-style-name="L2">
      <style:graphic-properties svg:stroke-color="#ffffff" draw:fill-color="#ffffff" fo:min-height="12.745cm" loext:decorative="false"/>
      <style:paragraph-properties style:writing-mode="lr-tb"/>
    </style:style>
    <style:style style:name="gr32" style:family="graphic" style:parent-style-name="standard" style:list-style-name="L2">
      <style:graphic-properties svg:stroke-color="#ffffff" draw:fill-color="#ffffff" fo:min-height="12.47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1.35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55cm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381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99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99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cm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21cm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231cm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title">
      <style:graphic-properties fo:min-height="3.18cm" loext:decorative="false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loext:tab-stop-distance="0cm" style:font-independent-line-spacing="true">
        <style:tab-stops/>
      </style:paragraph-properties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/>
      <style:text-properties style:font-name="Liberation Sans"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="none"/>
      <style:paragraph-properties fo:margin-top="0.5cm" fo:margin-bottom="0cm" fo:text-align="end"/>
      <style:text-properties fo:font-size="32pt" style:font-size-asian="32pt" style:font-size-complex="32pt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style:font-independent-line-spacing="true"/>
      <style:text-properties fo:language="es" fo:country="ES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language="es" fo:country="ES"/>
    </style:style>
    <style:style style:name="P25" style:family="paragraph">
      <loext:graphic-properties draw:fill-color="#ffffff"/>
      <style:text-properties fo:font-size="20pt" fo:language="es" fo:country="ES"/>
    </style:style>
    <style:style style:name="P26" style:family="paragraph">
      <loext:graphic-properties draw:fill="none"/>
      <style:paragraph-properties fo:margin-top="0.5cm" fo:margin-bottom="0cm"/>
      <style:text-properties fo:font-size="32pt" style:font-size-asian="32pt" style:font-size-complex="32pt"/>
    </style:style>
    <style:style style:name="P27" style:family="paragraph">
      <style:paragraph-properties fo:margin-left="0cm" fo:margin-right="0cm" fo:margin-top="0.2cm" fo:margin-bottom="0.2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/>
    </style:style>
    <style:style style:name="P29" style:family="paragraph">
      <loext:graphic-properties draw:fill="none" draw:fill-color="#ffffff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none"/>
      <style:paragraph-properties fo:margin-top="0.5cm" fo:margin-bottom="0cm"/>
      <style:text-properties style:font-name="Liberation Sans" fo:font-size="32pt" style:font-size-asian="32pt" style:font-size-complex="32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Liberation Sans" fo:font-size="32pt" style:font-size-asian="32pt" style:font-size-complex="32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text-align="start"/>
    </style:style>
    <style:style style:name="P35" style:family="paragraph">
      <style:paragraph-properties fo:margin-left="0cm" fo:margin-right="0cm" fo:margin-top="0.8cm" fo:margin-bottom="0cm" fo:line-height="100%" fo:text-indent="0cm"/>
    </style:style>
    <style:style style:name="P36" style:family="paragraph">
      <style:paragraph-properties fo:margin-left="0cm" fo:margin-right="0cm" fo:margin-top="0.8cm" fo:margin-bottom="0cm" fo:line-height="100%" fo:text-align="end" fo:text-indent="0cm"/>
    </style:style>
    <style:style style:name="P37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" fo:font-size="26pt" fo:font-weight="normal" style:font-weight-asian="normal" style:font-weight-complex="normal"/>
    </style:style>
    <style:style style:name="P38" style:family="paragraph">
      <loext:graphic-properties draw:fill="none" draw:fill-color="#ffffff"/>
      <style:text-properties fo:color="#c9211e" loext:opacity="100%" fo:font-size="36pt" fo:font-weight="bold"/>
    </style:style>
    <style:style style:name="P39" style:family="paragraph">
      <style:paragraph-properties fo:margin-left="0cm" fo:margin-right="0cm" fo:margin-top="0.5cm" fo:margin-bottom="0cm" fo:line-height="100%" fo:text-indent="0cm"/>
    </style:style>
    <style:style style:name="P40" style:family="paragraph">
      <style:paragraph-properties fo:margin-left="0cm" fo:margin-right="0cm" fo:margin-top="0.5cm" fo:margin-bottom="0cm" fo:line-height="100%" fo:text-align="end" fo:text-indent="0cm"/>
    </style:style>
    <style:style style:name="P41" style:family="paragraph">
      <style:paragraph-properties fo:margin-left="0cm" fo:margin-right="0cm" fo:margin-top="0.5cm" fo:margin-bottom="0cm" fo:line-height="100%" fo:text-align="start" fo:text-indent="0cm"/>
    </style:style>
    <style:style style:name="P42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" fo:font-size="26pt"/>
    </style:style>
    <style:style style:name="P43" style:family="paragraph">
      <loext:graphic-properties draw:fill-color="#ffffff"/>
      <style:paragraph-properties fo:text-align="end"/>
      <style:text-properties style:font-name="Liberation Sans" fo:font-size="36pt" style:font-size-asian="36pt" style:font-size-complex="36pt"/>
    </style:style>
    <style:style style:name="P44" style:family="paragraph">
      <loext:graphic-properties draw:fill-color="#ffffff"/>
      <style:text-properties style:font-name="Liberation Sans" fo:font-size="36pt" style:font-size-asian="36pt" style:font-size-complex="36pt"/>
    </style:style>
    <style:style style:name="P45" style:family="paragraph">
      <loext:graphic-properties draw:fill="none" draw:fill-color="#ffffff"/>
      <style:text-properties fo:color="#c9211e" loext:opacity="100%" fo:font-size="36pt" fo:language="es" fo:country="ES" fo:font-weight="bold"/>
    </style:style>
    <style:style style:name="P46" style:family="paragraph">
      <loext:graphic-properties draw:fill="none"/>
      <style:paragraph-properties fo:text-align="center"/>
      <style:text-properties fo:language="es" fo:country="ES"/>
    </style:style>
    <style:style style:name="P47" style:family="paragraph">
      <loext:graphic-properties draw:fill="none" draw:fill-color="#ffffff"/>
      <style:text-properties fo:font-size="18pt" fo:language="es" fo:country="ES"/>
    </style:style>
    <style:style style:name="P48" style:family="paragraph">
      <loext:graphic-properties draw:fill="none"/>
      <style:text-properties fo:color="#000000" loext:opacity="100%" style:font-name="Liberation Sans" fo:font-size="32pt" fo:font-weight="bold"/>
    </style:style>
    <style:style style:name="P49" style:family="paragraph">
      <loext:graphic-properties draw:fill="none" draw:fill-color="#ffffff"/>
      <style:paragraph-properties fo:text-align="end"/>
      <style:text-properties fo:font-size="18pt"/>
    </style:style>
    <style:style style:name="P50" style:family="paragraph">
      <style:paragraph-properties fo:margin-left="0cm" fo:margin-right="0cm" fo:margin-top="0.5cm" fo:margin-bottom="0cm" fo:line-height="100%" fo:text-align="center" fo:text-indent="0cm"/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" fo:font-size="36pt" fo:font-weight="normal" style:font-size-asian="36pt" style:font-weight-asian="normal" style:font-size-complex="36pt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" fo:font-size="36pt" fo:font-weight="normal" style:font-size-asian="36pt" style:font-weight-asian="normal" style:font-size-complex="36pt" style:font-weight-complex="normal"/>
    </style:style>
    <style:style style:name="P53" style:family="paragraph">
      <loext:graphic-properties draw:fill="none"/>
      <style:paragraph-properties fo:text-align="end" style:font-independent-line-spacing="true"/>
      <style:text-properties fo:color="#000000" loext:opacity="100%" style:font-name="Liberation Sans" fo:font-size="26pt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style:font-name-asian="AR PL KaitiM GB1" style:font-size-asian="40pt" style:font-style-asian="italic" style:font-weight-asian="normal" style:font-name-complex="Free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16" style:family="text">
      <style:text-properties fo:font-size="22pt" fo:language="es" fo:country="ES" fo:font-style="italic" fo:background-color="#fff200" style:font-size-asian="22pt" style:font-style-asian="italic" style:font-size-complex="22pt" style:font-style-complex="italic"/>
    </style:style>
    <style:style style:name="T17" style:family="text">
      <style:text-properties fo:font-size="21pt" fo:language="es" fo:country="ES" style:font-size-asian="21pt" style:font-size-complex="21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AR PL KaitiM GB1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AR PL KaitiM GB1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2" style:family="text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fo:font-size="54pt" fo:font-weight="bold" style:font-size-asian="26pt" style:font-size-complex="26pt"/>
    </style:style>
    <style:style style:name="T25" style:family="text">
      <style:text-properties style:font-name="Liberation Sans" fo:font-size="32pt" fo:font-weight="normal" style:font-size-asian="22pt" style:font-weight-asian="normal" style:font-size-complex="22pt" style:font-weight-complex="normal"/>
    </style:style>
    <style:style style:name="T26" style:family="text">
      <style:text-properties style:font-name="Liberation Sans" fo:font-size="26pt" fo:font-weight="normal" style:font-size-asian="22pt" style:font-weight-asian="normal" style:font-size-complex="22pt" style:font-weight-complex="normal"/>
    </style:style>
    <style:style style:name="T27" style:family="text">
      <style:text-properties fo:color="#c9211e" loext:opacity="100%" fo:font-size="48pt" fo:font-weight="bold" style:font-size-asian="24pt" style:font-size-complex="24pt"/>
    </style:style>
    <style:style style:name="T28" style:family="text">
      <style:text-properties fo:color="#000000" loext:opacity="100%" style:font-name="Liberation Sans" fo:font-size="28pt" fo:font-style="italic" style:font-style-asian="italic" style:font-style-complex="italic"/>
    </style:style>
    <style:style style:name="T29" style:family="text">
      <style:text-properties fo:color="#000000" loext:opacity="100%" style:font-name="Liberation Sans" fo:font-size="28p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6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60pt" style:font-style-asian="normal" style:font-weight-asian="bold" style:font-name-complex="Free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" fo:font-size="60pt" style:font-size-asian="60pt" style:font-size-complex="60pt"/>
    </style:style>
    <style:style style:name="T33" style:family="text">
      <style:text-properties style:font-name="Liberation Sans" fo:font-size="40pt" style:font-size-asian="40pt" style:font-size-complex="40pt"/>
    </style:style>
    <style:style style:name="T34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48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8pt" style:font-style-asian="normal" style:font-weight-asian="bold" style:font-name-complex="Free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Liberation Sans" fo:font-size="36pt" style:font-size-asian="36pt" style:font-size-complex="36pt"/>
    </style:style>
    <style:style style:name="T36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4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0pt" style:font-style-asian="normal" style:font-weight-asian="bold" style:font-name-complex="Free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Liberation Sans" fo:font-size="36pt" fo:font-weight="normal" style:font-size-asian="36pt" style:font-weight-asian="normal" style:font-size-complex="36pt" style:font-weight-complex="normal"/>
    </style:style>
    <style:style style:name="T38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42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2pt" style:font-style-asian="normal" style:font-weight-asian="bold" style:font-name-complex="FreeSans1" style:font-size-complex="4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Liberation Sans" fo:font-size="32pt" style:font-size-asian="32pt" style:font-size-complex="32pt"/>
    </style:style>
    <style:style style:name="T40" style:family="text">
      <style:text-properties style:font-name="Liberation Sans" fo:font-size="28pt" style:font-size-asian="28pt" style:font-size-complex="28pt"/>
    </style:style>
    <style:style style:name="T41" style:family="text">
      <style:text-properties style:font-name="Liberation Sans" fo:font-size="32pt" fo:language="es" fo:country="ES" style:font-size-asian="32pt" style:font-size-complex="32pt"/>
    </style:style>
    <style:style style:name="T42" style:family="text">
      <style:text-properties fo:color="#c9211e" loext:opacity="100%" fo:font-size="36pt" fo:language="es" fo:country="ES" fo:font-weight="bold"/>
    </style:style>
    <style:style style:name="T43" style:family="text">
      <style:text-properties fo:font-size="18pt" fo:language="es" fo:country="ES"/>
    </style:style>
    <style:style style:name="T44" style:family="text">
      <style:text-properties fo:color="#c9211e" loext:opacity="100%" fo:font-size="36pt" fo:font-weight="bold"/>
    </style:style>
    <style:style style:name="T45" style:family="text">
      <style:text-properties fo:color="#000000" loext:opacity="100%" style:font-name="Liberation Sans" fo:font-size="32pt" fo:font-weight="bold" style:font-size-asian="40pt" style:font-weight-asian="normal" style:font-size-complex="40pt" style:font-weight-complex="normal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color="#000000" loext:opacity="100%" style:font-name="Liberation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9" style:family="text">
      <style:text-properties fo:color="#000000" loext:opacity="100%" style:font-name="Liberation Sans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0" style:family="text">
      <style:text-properties fo:color="#000000" loext:opacity="100%" style:font-name="Liberation San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1" style:family="text">
      <style:text-properties fo:color="#000000" loext:opacity="100%" style:font-name="Liberation San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fo:color="#c9211e" loext:opacity="100%" fo:font-size="44pt" fo:font-weight="bold" style:font-size-asian="22pt" style:font-size-complex="22pt"/>
    </style:style>
    <style:style style:name="T53" style:family="text">
      <style:text-properties fo:color="#000000" loext:opacity="100%" style:font-name="Liberation Sans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54" style:family="text">
      <style:text-properties fo:color="#000000" loext:opacity="100%" style:font-name="Liberation Sans" fo:font-size="26pt" style:font-size-asian="26pt" style:font-size-complex="26pt"/>
    </style:style>
    <style:style style:name="T55" style:family="text">
      <style:text-properties fo:color="#000000" loext:opacity="100%" style:font-name="Liberation Sans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813cm" svg:x="13.88cm" svg:y="11.43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@floss.social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Fediverso: @jgbarah@floss.social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troducción a la publicación en acceso abiert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El mundo de la cultura y el conocimiento libres</text:span></text:p>
            <text:p text:style-name="P8"><text:span text:style-name="T5">Cuso formación PDI, URJC</text:span></text:p>
            <text:p text:style-name="P8"><text:span text:style-name="T5">13 de mayo de 2025</text:span></text:p>
          </draw:text-box>
        </draw:frame>
        <draw:frame draw:style-name="gr6" draw:text-style-name="P10" draw:layer="layout" svg:width="5.14cm" svg:height="1.814cm" svg:x="20.006cm" svg:y="14.95cm">
          <draw:image xlink:href="Pictures/100000010000014000000071C893EDE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9.558cm" svg:height="9.144cm" svg:x="6.096cm" svg:y="5.334cm">
          <draw:text-box>
            <text:list text:style-name="L1">
              <text:list-item>
                <text:p><text:span text:style-name="T8">Motivación</text:span></text:p>
              </text:list-item>
              <text:list-item>
                <text:p><text:span text:style-name="T8">Definición de obra cultural libre</text:span></text:p>
              </text:list-item>
              <text:list-item>
                <text:p><text:span text:style-name="T8">Definiciones relacionadas</text:span></text:p>
              </text:list-item>
              <text:list-item>
                <text:p><text:span text:style-name="T8">Implicaciones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3.114cm" svg:height="11.599cm" svg:x="1.016cm" svg:y="4.318cm">
          <draw:text-box>
            <text:p text:style-name="P16"><text:span text:style-name="T10">Motiv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Por primera vez</text:span></text:p>
            <text:p text:style-name="P18"><text:span text:style-name="T11">tenemos herramientas</text:span></text:p>
            <text:p text:style-name="P18"><text:span text:style-name="T11">que nos permiten acceder,</text:span></text:p>
            <text:p text:style-name="P18"><text:span text:style-name="T11">de forma simple, rápida y barata,</text:span></text:p>
            <text:p text:style-name="P18"><text:span text:style-name="T11">a todo conocimiento</text:span></text:p>
            <text:p text:style-name="P18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12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18"><text:span text:style-name="T11">… </text:span><text:span text:style-name="T11">y lo estamos impidiendo</text:span></text:p>
            <text:p text:style-name="P18"><text:span text:style-name="T11">con un modelo económico y legal</text:span></text:p>
            <text:p text:style-name="P18"><text:span text:style-name="T11"><text:s/></text:span><text:span text:style-name="T11">de la era de la información en pape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1" presentation:style-name="pr5" draw:text-style-name="P12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_2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19" draw:layer="layout" svg:width="24.028cm" svg:height="8.626cm" svg:x="0.508cm" svg:y="6.419cm">
          <draw:text-box>
            <text:p text:style-name="P18"><text:span text:style-name="T11">No podemos reutilizar lo que encontramos en Internet,</text:span></text:p>
            <text:p text:style-name="P18"><text:span text:style-name="T11">salvo que su autor nos de permiso, o el uso esté amparado por una excepción legal</text:span></text:p>
          </draw:text-box>
        </draw:frame>
        <draw:frame draw:name="Título 5_7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4" draw:text-style-name="P21" draw:layer="layout" svg:width="24.384cm" svg:height="12.879cm" svg:x="0.39cm" svg:y="4.29cm">
          <draw:text-box>
            <text:p text:style-name="P18"><text:span text:style-name="T13">Podemos llegar lejos</text:span></text:p>
            <text:p text:style-name="P18"><text:span text:style-name="T13">porque podemos subirnos</text:span></text:p>
            <text:p text:style-name="P18"><text:span text:style-name="T13">en hombros de gigantes</text:span></text:p>
            <text:p text:style-name="P18"><text:span text:style-name="T13"/></text:p>
            <text:list text:style-name="L1">
              <text:list-item>
                <text:p text:style-name="P20"><text:span text:style-name="T13">Muchas veces es mejor reutilizar que rehacer</text:span></text:p>
              </text:list-item>
              <text:list-item>
                <text:p text:style-name="P20"><text:span text:style-name="T13">Sobre todo si podemos reelaborar</text:span></text:p>
              </text:list-item>
              <text:list-item>
                <text:p text:style-name="P20"><text:span text:style-name="T13">Siempre, reconociendo autorí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1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6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Nuevo enfoque (2)</text:span><text:span text:style-name="T6"> <text:s/></text:span><text:span text:style-name="T7"><text:s/></text:span></text:p>
          </draw:text-box>
        </draw:frame>
        <draw:frame draw:style-name="gr14" draw:text-style-name="P21" draw:layer="layout" svg:width="24.384cm" svg:height="12.879cm" svg:x="0.39cm" svg:y="4.29cm">
          <draw:text-box>
            <text:p text:style-name="P18"><text:span text:style-name="T14">Cultura de la reutilizacion</text:span></text:p>
            <text:p text:style-name="P18"><text:span text:style-name="T14">(frente a cultura de pedir permiso)</text:span></text:p>
            <text:p text:style-name="P18"><text:span text:style-name="T13"/></text:p>
            <text:p text:style-name="P18"><text:span text:style-name="T14">Hace falta que el autor haya dado</text:span></text:p>
            <text:p text:style-name="P18"><text:span text:style-name="T14">permiso explítico</text:span></text:p>
            <text:p text:style-name="P18"><text:span text:style-name="T14">para que podamos reutilizar su obr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Marcador de contenido 1" presentation:style-name="pr5" draw:text-style-name="P23" draw:layer="layout" svg:width="24.336cm" svg:height="15.284cm" svg:x="3.302cm" svg:y="3.512cm" presentation:class="outline" presentation:user-transformed="true">
          <draw:text-box>
            <text:p><text:span text:style-name="T15">Qualquier omen, que lo oya, si bien trovar sopiere,</text:span></text:p>
            <text:p><text:span text:style-name="T15">puede </text:span><text:span text:style-name="T16">más y añadir et emendar</text:span><text:span text:style-name="T15"> si quisiere,</text:span></text:p>
            <text:p><text:span text:style-name="T16">ande de mano en mano</text:span><text:span text:style-name="T15"> a quienquier quel' pidiere,</text:span></text:p>
            <text:p><text:span text:style-name="T15">como pella a las dueñas </text:span><text:span text:style-name="T16">tómelo quien podiere</text:span><text:span text:style-name="T15">.</text:span></text:p>
            <text:p><text:span text:style-name="T15">Pues es de buen amor, emprestadlo de grado,</text:span></text:p>
            <text:p><text:span text:style-name="T15">non desmintades su nombre, nin dedes refertado,</text:span></text:p>
            <text:p><text:span text:style-name="T15">non le dedes por dineros vendido nin alquilado,</text:span></text:p>
            <text:p><text:span text:style-name="T15">ca non ha grado, nin graçias, nin buen amor complado.</text:span></text:p>
            <text:p text:style-name="P22"><text:span text:style-name="T17">Juan Ruiz, Arcipreste de Hita.</text:span></text:p>
            <text:p text:style-name="P22"><text:span text:style-name="T17"><text:a xlink:href="http://www.cervantesvirtual.com/obra-visor/el-libro-de-buen-amor--0/html/" xlink:type="simple">Libro de Buen Amor</text:a></text:span><text:span text:style-name="T17">, siglo XIV</text:span></text:p>
          </draw:text-box>
        </draw:frame>
        <draw:frame draw:name="Título 4" presentation:style-name="pr2" draw:text-style-name="P24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 2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12">Aunque tampoco tan nuevo...</text:span><text:span text:style-name="T6"> <text:s/></text:span><text:span text:style-name="T7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8">
        <draw:frame draw:name="Título 13_2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4.318cm">
          <draw:text-box>
            <text:p text:style-name="P16"><text:span text:style-name="T10">Defini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_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Obras culturales libres (1)</text:span><text:span text:style-name="T6"> <text:s/></text:span><text:span text:style-name="T7"><text:s/></text:span></text:p>
          </draw:text-box>
        </draw:frame>
        <draw:frame draw:style-name="gr16" draw:text-style-name="P26" draw:layer="layout" svg:width="23.114cm" svg:height="8.416cm" svg:x="0.762cm" svg:y="6.046cm">
          <draw:text-box>
            <text:p text:style-name="P20"><text:span text:style-name="T13"/></text:p>
            <text:p text:style-name="P20"><text:span text:style-name="T13"/></text:p>
            <text:p text:style-name="P18"><text:span text:style-name="T18"/></text:p>
          </draw:text-box>
        </draw:frame>
        <draw:frame draw:style-name="gr17" draw:text-style-name="P28" draw:layer="layout" svg:width="23.368cm" svg:height="12.471cm" svg:x="1.524cm" svg:y="4.233cm">
          <draw:text-box>
            <text:p text:style-name="P27"><text:span text:style-name="T19">Obras cuya licencia otorga libertad de:</text:span></text:p>
            <text:list text:style-name="L1">
              <text:list-item>
                <text:p text:style-name="P27"><text:span text:style-name="T19">Usarla y ejecutarla (o interpretarla)</text:span></text:p>
              </text:list-item>
              <text:list-item>
                <text:p text:style-name="P27"><text:span text:style-name="T19">Estudiarla y aplicar lo aprendido</text:span></text:p>
              </text:list-item>
              <text:list-item>
                <text:p text:style-name="P27"><text:span text:style-name="T19">Redistribuir copias de ella</text:span></text:p>
              </text:list-item>
              <text:list-item>
                <text:p text:style-name="P27"><text:span text:style-name="T19">Redistribuir obras derivadas de ella</text:span></text:p>
                <text:p text:style-name="P22"><text:span text:style-name="T8"/></text:p>
              </text:list-item>
            </text:list>
            <text:p text:style-name="P22"><text:span text:style-name="T20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_2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8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Obras culturales libres (2)</text:span><text:span text:style-name="T6"> </text:span><text:span text:style-name="T7"><text:s/></text:span></text:p>
          </draw:text-box>
        </draw:frame>
        <draw:frame draw:style-name="gr16" draw:text-style-name="P26" draw:layer="layout" svg:width="23.114cm" svg:height="8.416cm" svg:x="0.762cm" svg:y="6.046cm">
          <draw:text-box>
            <text:p text:style-name="P20"><text:span text:style-name="T13"/></text:p>
            <text:p text:style-name="P20"><text:span text:style-name="T13"/></text:p>
            <text:p text:style-name="P18"><text:span text:style-name="T18"/></text:p>
          </draw:text-box>
        </draw:frame>
        <draw:frame draw:style-name="gr18" draw:text-style-name="P28" draw:layer="layout" svg:width="23.368cm" svg:height="11.249cm" svg:x="1.524cm" svg:y="4.233cm">
          <draw:text-box>
            <text:p text:style-name="P27"><text:span text:style-name="T19">Además:</text:span></text:p>
            <text:list text:style-name="L1">
              <text:list-item>
                <text:p text:style-name="P27"><text:span text:style-name="T19">Disponibilidad de datos fuente</text:span></text:p>
              </text:list-item>
              <text:list-item>
                <text:p text:style-name="P27"><text:span text:style-name="T19">Uso de formato libre</text:span></text:p>
              </text:list-item>
              <text:list-item>
                <text:p text:style-name="P27"><text:span text:style-name="T19">Sin restricciones técnicas</text:span></text:p>
              </text:list-item>
              <text:list-item>
                <text:p text:style-name="P27"><text:span text:style-name="T19">Sin otras restricciones o limitaciones</text:span></text:p>
              </text:list-item>
            </text:list>
            <text:p text:style-name="P27"><text:span text:style-name="T19"/></text:p>
            <text:p text:style-name="P22"><text:span text:style-name="T20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3.048cm">
          <draw:text-box>
            <text:p text:style-name="P16"><text:span text:style-name="T10">Conceptos relacionad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21">Acceso abierto</text:span><text:span text:style-name="T6"> <text:s/></text:span><text:span text:style-name="T7"><text:s/></text:span></text:p>
          </draw:text-box>
        </draw:frame>
        <draw:frame draw:style-name="gr19" draw:text-style-name="P29" draw:layer="layout" svg:width="17.526cm" svg:height="1.145cm" svg:x="6.858cm" svg:y="15.111cm">
          <draw:text-box>
            <text:p><text:span text:style-name="T22"><text:a xlink:href="https://openaccess.mpg.de/Berlin-Declaration" xlink:type="simple">https://openaccess.mpg.de/Berlin-Declaration</text:a></text:span></text:p>
          </draw:text-box>
        </draw:frame>
        <draw:frame draw:style-name="gr20" draw:text-style-name="P30" draw:layer="layout" svg:width="23.622cm" svg:height="9.448cm" svg:x="0.512cm" svg:y="4.525cm">
          <draw:text-box>
            <text:p text:style-name="P20"><text:span text:style-name="T13">“</text:span><text:span text:style-name="T13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8"><text:span text:style-name="T18">Declaración de Berlín, 22 de octubre 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3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21">Acceso abierto: condiciones</text:span><text:span text:style-name="T6"> <text:s/></text:span><text:span text:style-name="T7"><text:s/></text:span></text:p>
          </draw:text-box>
        </draw:frame>
        <draw:frame draw:style-name="gr21" draw:text-style-name="P32" draw:layer="layout" svg:width="23.622cm" svg:height="11.645cm" svg:x="0.508cm" svg:y="4.865cm">
          <draw:text-box>
            <text:list text:style-name="L2">
              <text:list-item>
                <text:p text:style-name="P31"><text:span text:style-name="T23">Derecho de acceso (consulta)</text:span></text:p>
              </text:list-item>
              <text:list-item>
                <text:p text:style-name="P31"><text:span text:style-name="T23">Derecho de copia</text:span></text:p>
              </text:list-item>
              <text:list-item>
                <text:p text:style-name="P31"><text:span text:style-name="T23">Derecho de trabajos derivados</text:span></text:p>
              </text:list-item>
              <text:list-item>
                <text:p text:style-name="P31"><text:span text:style-name="T23">Obra y materiales en formatos electrónicos “adecuados”</text:span></text:p>
              </text:list-item>
              <text:list-item>
                <text:p text:style-name="P31"><text:span text:style-name="T23">Depósito de la obra y materiales complementarios en un archivo abierto</text:span></text:p>
              </text:list-item>
            </text:list>
            <text:p text:style-name="P31"><text:span text:style-name="T23"/></text:p>
            <text:p text:style-name="P31"><text:span text:style-name="T23">Todo con atribución de autorí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presentation:style-name="pr6" draw:text-style-name="P34" draw:layer="layout" svg:width="22.859cm" svg:height="3.18cm" svg:x="1.27cm" svg:y="0.122cm" presentation:class="title" presentation:user-transformed="true">
          <draw:text-box>
            <text:p text:style-name="P33"><text:span text:style-name="T24">Software libre</text:span></text:p>
          </draw:text-box>
        </draw:frame>
        <draw:frame draw:style-name="gr22" draw:text-style-name="P37" draw:layer="layout" svg:width="22.121cm" svg:height="12.872cm" svg:x="1.336cm" svg:y="3.796cm">
          <draw:text-box>
            <text:p text:style-name="P35"><text:span text:style-name="T25">En parte, antecedente histórico de la cultura libre</text:span></text:p>
            <text:list text:style-name="L3">
              <text:list-item>
                <text:p text:style-name="P35"><text:span text:style-name="T25">Libertad de ejecución</text:span></text:p>
              </text:list-item>
              <text:list-item>
                <text:p text:style-name="P35"><text:span text:style-name="T25">Libertad de estudio y modificación</text:span></text:p>
              </text:list-item>
              <text:list-item>
                <text:p text:style-name="P35"><text:span text:style-name="T25">Libertad de copia</text:span></text:p>
              </text:list-item>
              <text:list-item>
                <text:p text:style-name="P35"><text:span text:style-name="T25">Libertad de copia de las modificaciones</text:span></text:p>
              </text:list-item>
            </text:list>
            <text:p text:style-name="P36"><text:span text:style-name="T26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38" draw:layer="layout" svg:width="12.954cm" svg:height="2.181cm" svg:x="0.853cm" svg:y="0.762cm">
          <draw:text-box>
            <text:p><text:span text:style-name="T27">Datos abiertos</text:span></text:p>
          </draw:text-box>
        </draw:frame>
        <draw:frame draw:style-name="gr24" draw:text-style-name="P42" draw:layer="layout" svg:width="23.876cm" svg:height="11.359cm" svg:x="0.762cm" svg:y="4.318cm">
          <draw:text-box>
            <text:p text:style-name="P39"><text:span text:style-name="T28">“</text:span><text:span text:style-name="T28">Datos que cualquiera puede usar, modificar y compartir para cualquier propósito”</text:span></text:p>
            <text:p text:style-name="P40"><text:span text:style-name="T29"><text:a xlink:href="http://opendefinition.org/" xlink:type="simple">http://opendefinition.org</text:a></text:span></text:p>
            <text:p text:style-name="P41"><text:span text:style-name="T28"/></text:p>
            <text:p text:style-name="P41"><text:span text:style-name="T28">“</text:span><text:span text:style-name="T28">Datos libremente disponibles para cualquiera, que se pueden utilizar y republicar, sin restricciones de patentes, derechos de autor, ni de otro tipo.”</text:span></text:p>
            <text:p text:style-name="P36"><text:span text:style-name="T29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38" draw:layer="layout" svg:width="12.954cm" svg:height="2.181cm" svg:x="1.016cm" svg:y="0.613cm">
          <draw:text-box>
            <text:p><text:span text:style-name="T27">Ciencia abierta</text:span></text:p>
          </draw:text-box>
        </draw:frame>
        <draw:frame draw:style-name="gr25" draw:text-style-name="P37" draw:layer="layout" svg:width="22.121cm" svg:height="12.313cm" svg:x="1.501cm" svg:y="4.26cm">
          <draw:text-box>
            <text:p text:style-name="P35"><text:span text:style-name="T25">Hacer la investigación científica y sus resultados accesibles a todos los niveles de la sociedad</text:span></text:p>
            <text:list text:style-name="L3">
              <text:list-item>
                <text:p text:style-name="P35"><text:span text:style-name="T25">Publicaciones</text:span></text:p>
              </text:list-item>
              <text:list-item>
                <text:p text:style-name="P35"><text:span text:style-name="T25">Datos</text:span></text:p>
              </text:list-item>
              <text:list-item>
                <text:p text:style-name="P35"><text:span text:style-name="T25">Muestras físicas</text:span></text:p>
              </text:list-item>
              <text:list-item>
                <text:p text:style-name="P35"><text:span text:style-name="T25">Software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8">
        <draw:frame draw:name="Título 13_10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1.778cm">
          <draw:text-box>
            <text:p text:style-name="P16"><text:span text:style-name="T10">Implicacion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Título 13_2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0" draw:style-name="gr8" draw:text-style-name="P13" draw:layer="layout" svg:width="23.452cm" svg:height="2.487cm" svg:x="0.677cm" svg:y="0.423cm">
          <draw:text-box>
            <text:p text:style-name="P2"><text:span text:style-name="T30">¿Puedo utilizar una obra libre?</text:span><text:span text:style-name="T31"> </text:span></text:p>
          </draw:text-box>
        </draw:frame>
        <draw:frame draw:style-name="gr26" draw:text-style-name="P43" draw:layer="layout" svg:width="23.876cm" svg:height="12.077cm" svg:x="0.254cm" svg:y="4.828cm">
          <draw:text-box>
            <text:p text:style-name="P22"><text:span text:style-name="T32">Sí</text:span></text:p>
            <text:p text:style-name="P22"><text:span text:style-name="T32">Siempre</text:span></text:p>
            <text:p text:style-name="P22"><text:span text:style-name="T32">Sin pedir permiso</text:span></text:p>
            <text:p><text:span text:style-name="T33"/></text:p>
            <text:p><text:span text:style-name="T33">...reconociendo autoría</text:span></text:p>
            <text:p><text:span text:style-name="T33"><text:tab/></text:span><text:span text:style-name="T33">(detalles en la licencia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Título 13_2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9" draw:style-name="gr8" draw:text-style-name="P13" draw:layer="layout" svg:width="22.437cm" svg:height="2.487cm" svg:x="0.677cm" svg:y="0.423cm">
          <draw:text-box>
            <text:p text:style-name="P2"><text:span text:style-name="T34">Aplicabilidad general</text:span><text:span text:style-name="T31"> </text:span></text:p>
          </draw:text-box>
        </draw:frame>
        <draw:frame draw:style-name="gr27" draw:text-style-name="P44" draw:layer="layout" svg:width="23.876cm" svg:height="11.428cm" svg:x="0.254cm" svg:y="4.828cm">
          <draw:text-box>
            <text:list text:style-name="L2">
              <text:list-item>
                <text:p><text:span text:style-name="T33">Obras libres por motivos éticos</text:span></text:p>
              </text:list-item>
            </text:list>
            <text:p><text:span text:style-name="T33"><text:tab/></text:span><text:span text:style-name="T33">(el conocimiento debe ser libre)</text:span></text:p>
            <text:list text:continue-numbering="true" text:style-name="L2">
              <text:list-item>
                <text:p><text:span text:style-name="T33">Obras libres por motivos prácticos</text:span></text:p>
              </text:list-item>
            </text:list>
            <text:p><text:span text:style-name="T33"><text:tab/></text:span><text:span text:style-name="T33">(consigo mejor mis fines así)</text:span></text:p>
            <text:p><text:span text:style-name="T35"/></text:p>
            <text:p><text:span text:style-name="T33">Se aplica tanto a obras producidas como a obras “consumidas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Título 13_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3" draw:style-name="gr8" draw:text-style-name="P13" draw:layer="layout" svg:width="23.453cm" svg:height="2.487cm" svg:x="0.677cm" svg:y="0.423cm">
          <draw:text-box>
            <text:p text:style-name="P2"><text:span text:style-name="T36">Aplicabilidad (en una Universidad) </text:span></text:p>
          </draw:text-box>
        </draw:frame>
        <draw:frame draw:style-name="gr28" draw:text-style-name="P44" draw:layer="layout" svg:width="20.208cm" svg:height="10.205cm" svg:x="1.016cm" svg:y="5.08cm">
          <draw:text-box>
            <text:list text:style-name="L2">
              <text:list-item>
                <text:p><text:span text:style-name="T35">Desarrollo y resultados de la investigación (ciencia abierta)</text:span></text:p>
              </text:list-item>
              <text:list-item>
                <text:p><text:span text:style-name="T37">Materiales docentes y resultados del aprendizaje</text:span></text:p>
              </text:list-item>
              <text:list-item>
                <text:p><text:span text:style-name="T35">Publicaciones institucionales y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Título 13_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4" draw:style-name="gr8" draw:text-style-name="P13" draw:layer="layout" svg:width="22.437cm" svg:height="2.487cm" svg:x="0.677cm" svg:y="0.423cm">
          <draw:text-box>
            <text:p text:style-name="P2"><text:span text:style-name="T38">Ejemplos (en una Universidad)</text:span><text:span text:style-name="T31"> </text:span></text:p>
          </draw:text-box>
        </draw:frame>
        <draw:frame draw:style-name="gr29" draw:text-style-name="P44" draw:layer="layout" svg:width="20.208cm" svg:height="10.205cm" svg:x="1.016cm" svg:y="5.08cm">
          <draw:text-box>
            <text:list text:style-name="L2">
              <text:list-item>
                <text:p><text:span text:style-name="T35">Diarios de investigación</text:span></text:p>
              </text:list-item>
              <text:list-item>
                <text:p><text:span text:style-name="T35">Artículos revisados por pares</text:span></text:p>
              </text:list-item>
              <text:list-item>
                <text:p><text:span text:style-name="T35">Apuntes para una asignatura</text:span></text:p>
              </text:list-item>
              <text:list-item>
                <text:p><text:span text:style-name="T35">Trabajos de alumnos</text:span></text:p>
              </text:list-item>
              <text:list-item>
                <text:p><text:span text:style-name="T35">Memorias de funcionamiento</text:span></text:p>
              </text:list-item>
              <text:list-item>
                <text:p><text:span text:style-name="T35">Estudios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Título 13_1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8" draw:text-style-name="P13" draw:layer="layout" svg:width="22.437cm" svg:height="2.487cm" svg:x="0.677cm" svg:y="0.423cm">
          <draw:text-box>
            <text:p text:style-name="P2"><text:span text:style-name="T34">Oportunidades (como autor) </text:span></text:p>
          </draw:text-box>
        </draw:frame>
        <draw:frame draw:style-name="gr30" draw:text-style-name="P44" draw:layer="layout" svg:width="20.208cm" svg:height="11.627cm" svg:x="1.016cm" svg:y="4.629cm">
          <draw:text-box>
            <text:list text:style-name="L2">
              <text:list-item>
                <text:p><text:span text:style-name="T35">Visibilidad: quien usa tu obra, ve quién es el autor</text:span></text:p>
              </text:list-item>
              <text:list-item>
                <text:p><text:span text:style-name="T35">Evolución: quizás haya quien haga evolucionar tu trabajo</text:span></text:p>
              </text:list-item>
              <text:list-item>
                <text:p><text:span text:style-name="T35">Colaboración: ayudas difundir y generar conocimiento</text:span></text:p>
              </text:list-item>
              <text:list-item>
                <text:p><text:span text:style-name="T35">Preservación: tu obra queda archivad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Título 13_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5" draw:style-name="gr8" draw:text-style-name="P13" draw:layer="layout" svg:width="23.707cm" svg:height="2.487cm" svg:x="0.677cm" svg:y="0.423cm">
          <draw:text-box>
            <text:p text:style-name="P2"><text:span text:style-name="T31">¿Dónde colocar los materiales libres? </text:span></text:p>
          </draw:text-box>
        </draw:frame>
        <draw:frame draw:style-name="gr31" draw:text-style-name="P44" draw:layer="layout" svg:width="23.114cm" svg:height="13.058cm" svg:x="0.879cm" svg:y="3.855cm">
          <draw:text-box>
            <text:p><text:span text:style-name="T39">Fácil: En cualquier sitio</text:span></text:p>
            <text:p><text:span text:style-name="T35"/></text:p>
            <text:p><text:span text:style-name="T39">Pero también hay sitios específicos:</text:span></text:p>
            <text:list text:style-name="L2">
              <text:list-item>
                <text:p><text:span text:style-name="T39">Imágenes: Flickr, Wikimedia Commons</text:span></text:p>
              </text:list-item>
              <text:list-item>
                <text:p><text:span text:style-name="T39">Audio: Internet Archive, SoundCloud</text:span></text:p>
              </text:list-item>
              <text:list-item>
                <text:p><text:span text:style-name="T39">Video: Internet Archive, Vimeo</text:span></text:p>
              </text:list-item>
            </text:list>
            <text:p><text:span text:style-name="T39"/></text:p>
            <text:p><text:span text:style-name="T39">Siempre que se pueda: en archivo abierto</text:span></text:p>
            <text:p><text:span text:style-name="T35"/></text:p>
            <text:p text:style-name="P22"><text:span text:style-name="T40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Título 13_ 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 1" draw:style-name="gr8" draw:text-style-name="P13" draw:layer="layout" svg:width="24.723cm" svg:height="2.487cm" svg:x="0.294cm" svg:y="0.388cm">
          <draw:text-box>
            <text:p text:style-name="P2"><text:span text:style-name="T31">¿Dónde colocar los materiales libres? (2)</text:span></text:p>
          </draw:text-box>
        </draw:frame>
        <draw:frame draw:style-name="gr32" draw:text-style-name="P44" draw:layer="layout" svg:width="23.114cm" svg:height="12.728cm" svg:x="0.879cm" svg:y="3.855cm">
          <draw:text-box>
            <text:p><text:span text:style-name="T35">Especialmente interesante:</text:span></text:p>
            <text:p><text:span text:style-name="T35"/></text:p>
            <text:p text:style-name="P16"><text:span text:style-name="T35">Archivos abiertos</text:span></text:p>
            <text:p><text:span text:style-name="T35"/></text:p>
            <text:list text:style-name="L2">
              <text:list-item>
                <text:p text:style-name="P31"><text:span text:style-name="T41">Estándares de acceso adecuados (ejemplo: Open Archive Definitions)</text:span></text:p>
              </text:list-item>
              <text:list-item>
                <text:p text:style-name="P31"><text:span text:style-name="T41">Mantenido por una organización “fiable”</text:span></text:p>
              </text:list-item>
              <text:list-item>
                <text:p text:style-name="P31"><text:span text:style-name="T41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6.35cm">
          <draw:text-box>
            <text:p text:style-name="P16"><text:span text:style-name="T10">Situación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0" presentation:style-name="pr2" draw:text-style-name="P24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45" draw:layer="layout" svg:width="24.13cm" svg:height="2.181cm" svg:x="1.016cm" svg:y="1.121cm">
          <draw:text-box>
            <text:p><text:span text:style-name="T42">Contexto: LOSU</text:span></text:p>
          </draw:text-box>
        </draw:frame>
        <draw:frame draw:style-name="gr6" draw:text-style-name="P46" draw:layer="layout" svg:width="25.399cm" svg:height="9.372cm" svg:x="0.043cm" svg:y="4.894cm">
          <draw:image xlink:href="Pictures/10000001000006900000026C51375833.png" xlink:type="simple" xlink:show="embed" xlink:actuate="onLoad" draw:mime-type="image/png">
            <text:p/>
          </draw:image>
        </draw:frame>
        <draw:frame draw:style-name="gr33" draw:text-style-name="P47" draw:layer="layout" svg:width="16.616cm" svg:height="0.962cm" svg:x="8.558cm" svg:y="15.494cm">
          <draw:text-box>
            <text:p><text:span text:style-name="T43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8">
        <draw:frame draw:name="Título 11" presentation:style-name="pr2" draw:text-style-name="P24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45" draw:layer="layout" svg:width="24.13cm" svg:height="2.181cm" svg:x="1.016cm" svg:y="1.121cm">
          <draw:text-box>
            <text:p><text:span text:style-name="T42">Contexto: LOSU</text:span></text:p>
          </draw:text-box>
        </draw:frame>
        <draw:frame draw:style-name="gr6" draw:text-style-name="P46" draw:layer="layout" svg:width="21.039cm" svg:height="12.572cm" svg:x="0.297cm" svg:y="2.794cm">
          <draw:image xlink:href="Pictures/1000000100000690000003EC23375696.png" xlink:type="simple" xlink:show="embed" xlink:actuate="onLoad" draw:mime-type="image/png">
            <text:p/>
          </draw:image>
        </draw:frame>
        <draw:frame draw:style-name="gr33" draw:text-style-name="P47" draw:layer="layout" svg:width="16.616cm" svg:height="0.962cm" svg:x="8.557cm" svg:y="15.494cm">
          <draw:text-box>
            <text:p><text:span text:style-name="T43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8" draw:layer="layout" svg:width="23.876cm" svg:height="3.095cm" svg:x="0.508cm" svg:y="1.121cm">
          <draw:text-box>
            <text:p><text:span text:style-name="T44">Declaración del Consejo de Gobierno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<text:s/></text:span></text:p>
          </draw:text-box>
        </draw:frame>
        <draw:frame draw:style-name="gr6" draw:text-style-name="P10" draw:layer="layout" svg:width="25.399cm" svg:height="12.075cm" svg:x="-0.021cm" svg:y="3.257cm">
          <draw:image xlink:href="Pictures/10000001000005400000027F93BCAEE3.png" xlink:type="simple" xlink:show="embed" xlink:actuate="onLoad" draw:mime-type="image/png">
            <text:p/>
          </draw:image>
        </draw:frame>
        <draw:frame draw:style-name="gr36" draw:text-style-name="P14" draw:layer="layout" svg:width="24.632cm" svg:height="0.806cm" svg:x="0.383cm" svg:y="15.454cm">
          <draw:text-box>
            <text:p><text:span text:style-name="T46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_1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8" draw:layer="layout" svg:width="23.876cm" svg:height="3.095cm" svg:x="0.508cm" svg:y="1.121cm">
          <draw:text-box>
            <text:p><text:span text:style-name="T44">Declaración del Consejo de Gobierno</text:span></text:p>
          </draw:text-box>
        </draw:frame>
        <draw:frame draw:style-name="gr37" draw:text-style-name="P49" draw:layer="layout" svg:width="18.299cm" svg:height="1.119cm" svg:x="6.096cm" svg:y="14.732cm">
          <draw:text-box>
            <text:p text:style-name="P22"><text:span text:style-name="T47"><text:a xlink:href="https://ofilibre.gitlab.io/blog/declaracion-pub-abierta/" xlink:type="simple">https://ofilibre.gitlab.io/blog/declaracion-pub-abierta/</text:a></text:span></text:p>
          </draw:text-box>
        </draw:frame>
        <draw:frame draw:style-name="gr6" draw:text-style-name="P10" draw:layer="layout" svg:width="24.473cm" svg:height="8.382cm" svg:x="0cm" svg:y="4.318cm">
          <draw:image xlink:href="Pictures/100000010000051C000001C09DD8C50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8" draw:layer="layout" svg:width="17.018cm" svg:height="3.095cm" svg:x="0.508cm" svg:y="1.121cm">
          <draw:text-box>
            <text:p><text:span text:style-name="T44">OfiLibre URJC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Oficina de conocimiento y cultura libres </text:span></text:p>
          </draw:text-box>
        </draw:frame>
        <draw:frame draw:style-name="gr38" draw:text-style-name="P51" draw:layer="layout" svg:width="23.876cm" svg:height="7.705cm" svg:x="0.762cm" svg:y="7.62cm">
          <draw:text-box>
            <text:p text:style-name="P50"><text:span text:style-name="T48">“</text:span><text:span text:style-name="T48">informar, promocionar, coordinar y facilitar en sus ámbitos de actuación, y en colaboración con todos los agentes de la Universidad”</text:span></text:p>
            <text:p text:style-name="P40"><text:span text:style-name="T49"><text:a xlink:href="https://ofilibre.gitlab.io/" xlink:type="simple">https://ofilibre.gitlab.i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8" draw:layer="layout" svg:width="17.018cm" svg:height="3.095cm" svg:x="0.508cm" svg:y="1.121cm">
          <draw:text-box>
            <text:p><text:span text:style-name="T44">Biblioteca URJC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<text:s/></text:span></text:p>
          </draw:text-box>
        </draw:frame>
        <draw:frame draw:style-name="gr39" draw:text-style-name="P52" draw:layer="layout" svg:width="23.876cm" svg:height="11.631cm" svg:x="0.557cm" svg:y="5.003cm">
          <draw:text-box>
            <text:p text:style-name="P41"><text:span text:style-name="T49">Apoyo a las obras libres</text:span></text:p>
            <text:p text:style-name="P41"><text:span text:style-name="T49">Archivo abierto: BURJC Digital</text:span></text:p>
            <text:list text:style-name="L1">
              <text:list-item>
                <text:p text:style-name="P41"><text:span text:style-name="T49">Publicación de TFG, TFM y tesis</text:span></text:p>
              </text:list-item>
              <text:list-item>
                <text:p text:style-name="P41"><text:span text:style-name="T49">Publicación de materiales docentes</text:span></text:p>
              </text:list-item>
              <text:list-item>
                <text:p text:style-name="P41"><text:span text:style-name="T49">Publicación de resultados de investigación</text:span></text:p>
              </text:list-item>
            </text:list>
            <text:p text:style-name="P40"><text:span text:style-name="T50"><text:a xlink:href="https://burjcdigital.urjc.es/" xlink:type="simple">https://burjcdigital.urjc.es/</text:a></text:span></text:p>
            <text:p text:style-name="P40"><text:span text:style-name="T50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_11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0" draw:text-style-name="P38" draw:layer="layout" svg:width="21.59cm" svg:height="2.143cm" svg:x="0.681cm" svg:y="0.488cm">
          <draw:text-box>
            <text:p><text:span text:style-name="T27">Otras plataformas URJC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<text:s/></text:span></text:p>
          </draw:text-box>
        </draw:frame>
        <draw:frame draw:style-name="gr41" draw:text-style-name="P52" draw:layer="layout" svg:width="23.876cm" svg:height="12.242cm" svg:x="0.463cm" svg:y="4.107cm">
          <draw:text-box>
            <text:p text:style-name="P41"><text:span text:style-name="T48">TV URJC</text:span></text:p>
            <text:p text:style-name="P41"><text:span text:style-name="T48">URJCx</text:span></text:p>
            <text:p text:style-name="P41"><text:span text:style-name="T48">E-Ciencia Datos URJC</text:span></text:p>
            <text:p text:style-name="P41"><text:span text:style-name="T48"/></text:p>
            <text:p text:style-name="P40"><text:span text:style-name="T51"><text:a xlink:href="https://tv.urjc.es/" xlink:type="simple">https://tv.urjc.es/</text:a></text:span></text:p>
            <text:p text:style-name="P40"><text:span text:style-name="T51"><text:a xlink:href="https://urjcx.urjc.es/" xlink:type="simple">https://urjcx.urjc.es/</text:a></text:span></text:p>
            <text:p text:style-name="P40"><text:span text:style-name="T51"><text:a xlink:href="https://edatos.consorciomadrono.es/dataverse/URJC" xlink:type="simple">https://edatos.consorciomadrono.es/dataverse/URJC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8">
        <draw:frame draw:name="Título 13_ 4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2" draw:text-style-name="P38" draw:layer="layout" svg:width="23.703cm" svg:height="4.035cm" svg:x="0.681cm" svg:y="0.488cm">
          <draw:text-box>
            <text:p><text:span text:style-name="T27">Otras plataformas URJC (2)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<text:s/></text:span></text:p>
          </draw:text-box>
        </draw:frame>
        <draw:frame draw:style-name="gr43" draw:text-style-name="P52" draw:layer="layout" svg:width="23.876cm" svg:height="12.242cm" svg:x="0.463cm" svg:y="4.107cm">
          <draw:text-box>
            <text:p text:style-name="P41"><text:span text:style-name="T48">Plataforma de revistas</text:span></text:p>
            <text:p text:style-name="P41"><text:span text:style-name="T48">Plataforma de monografías</text:span></text:p>
            <text:p text:style-name="P41"><text:span text:style-name="T48"/></text:p>
            <text:p text:style-name="P40"><text:span text:style-name="T51"><text:a xlink:href="https://revistas.urjc.es/" xlink:type="simple">https://revistas.urjc.es</text:a></text:span></text:p>
            <text:p text:style-name="P40"><text:span text:style-name="T51"/></text:p>
            <text:p text:style-name="P40"><text:span text:style-name="T51"><text:a xlink:href="https://monografias.urjc.es/" xlink:type="simple">https://monografias.urjc.es</text:a></text:span></text:p>
            <text:p text:style-name="P40"><text:span text:style-name="T51"/></text:p>
          </draw:text-box>
        </draw:frame>
        <presentation:notes draw:style-name="dp4">
          <draw:page-thumbnail draw:style-name="gr7" draw:layer="layout" svg:width="13.968cm" svg:height="10.476cm" svg:x="3.81cm" svg:y="2.123cm" draw:page-number="3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8">
        <draw:frame draw:name="Título 13_ 2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4" draw:text-style-name="P38" draw:layer="layout" svg:width="23.957cm" svg:height="2.56cm" svg:x="0.681cm" svg:y="0.488cm">
          <draw:text-box>
            <text:p><text:span text:style-name="T52">Consejo de publicación abierta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<text:s/></text:span></text:p>
          </draw:text-box>
        </draw:frame>
        <draw:frame draw:style-name="gr45" draw:text-style-name="P52" draw:layer="layout" svg:width="23.876cm" svg:height="10.371cm" svg:x="0.463cm" svg:y="5.631cm">
          <draw:text-box>
            <text:p text:style-name="P41"><text:span text:style-name="T49">Composición:</text:span></text:p>
            <text:list text:style-name="L1">
              <text:list-item>
                <text:p text:style-name="P41"><text:span text:style-name="T49">Vicerrectora de Comunidad Campus, Cultura y Deporte</text:span></text:p>
              </text:list-item>
              <text:list-item>
                <text:p text:style-name="P41"><text:span text:style-name="T49">Representantes de todos los centros</text:span></text:p>
              </text:list-item>
              <text:list-item>
                <text:p text:style-name="P41"><text:span text:style-name="T49">Expertos</text:span></text:p>
              </text:list-item>
              <text:list-item>
                <text:p text:style-name="P41"><text:span text:style-name="T49">OfiLibre, Biblioteca, Publicaciones, CIED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8">
        <draw:frame draw:name="Título 13_ 3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0" draw:text-style-name="P38" draw:layer="layout" svg:width="21.59cm" svg:height="2.143cm" svg:x="0.681cm" svg:y="0.488cm">
          <draw:text-box>
            <text:p><text:span text:style-name="T27">Programas URJC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<text:s/></text:span></text:p>
          </draw:text-box>
        </draw:frame>
        <draw:frame draw:style-name="gr46" draw:text-style-name="P52" draw:layer="layout" svg:width="24.892cm" svg:height="13.481cm" svg:x="0cm" svg:y="4.107cm">
          <draw:text-box>
            <text:p text:style-name="P41"><text:span text:style-name="T51">Asignaturas en abierto</text:span></text:p>
            <text:p text:style-name="P41"><text:span text:style-name="T51">Financiación publicación en acceso abierto (Investigación)</text:span></text:p>
            <text:p text:style-name="P41"><text:span text:style-name="T51">BURJC Digital y apoyo al acceso abierto (Biblioteca)</text:span></text:p>
            <text:p text:style-name="P41"><text:span text:style-name="T51">Revistas y monografías en acceso abierto (Editorial)</text:span></text:p>
            <text:p text:style-name="P41"><text:span text:style-name="T51">Jornadas de Cultura Libre y Café con OfiLibre</text:span></text:p>
            <text:p text:style-name="P41"><text:span text:style-name="T51">Publicación de tesis y TFGs en acceso abierto</text:span></text:p>
            <text:p text:style-name="P41"><text:span text:style-name="T51">Formación sobre publicación en abierto, ciencia abierta</text:span><text:span text:style-name="T48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5" draw:text-style-name="P48" draw:layer="layout" svg:width="22.422cm" svg:height="1.609cm" svg:x="0.692cm" svg:y="4.233cm">
          <draw:text-box>
            <text:p><text:span text:style-name="T45"><text:s/></text:span></text:p>
          </draw:text-box>
        </draw:frame>
        <draw:frame draw:style-name="gr47" draw:text-style-name="P51" draw:layer="layout" svg:width="23.876cm" svg:height="10.745cm" svg:x="0.557cm" svg:y="5.003cm">
          <draw:text-box>
            <text:p text:style-name="P50"><text:span text:style-name="T48">¿Te interesan las obras libres?</text:span></text:p>
            <text:p text:style-name="P50"><text:span text:style-name="T48"/></text:p>
            <text:p text:style-name="P50"><text:span text:style-name="T53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draw:name="Marcador de contenido 6" presentation:style-name="pr5" draw:text-style-name="P53" draw:layer="layout" svg:width="23.114cm" svg:height="8.576cm" svg:x="0.254cm" svg:y="6.858cm" presentation:class="outline" presentation:user-transformed="true">
          <draw:text-box>
            <text:p text:style-name="P22"><text:span text:style-name="T54">©2019-2025 OfiLibre URJC</text:span></text:p>
            <text:p text:style-name="P22"><text:span text:style-name="T54">Algunos derechos reservados.</text:span></text:p>
            <text:p text:style-name="P22"><text:span text:style-name="T54">Este documento se distribuye bajo la licencia “Atribución-CompartirIgual 4.0 Internacional” de Creative Commons, disponible en</text:span></text:p>
            <text:p><text:span text:style-name="T55"><text:a xlink:href="https://creativecommons.org/licenses/by-sa/4.0/deed.es" xlink:type="simple">https://creativecommons.org/licenses/by-sa/4.0/deed.es</text:a></text:span></text:p>
            <text:p text:style-name="P22"><text:span text:style-name="T54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/>
    <style:font-face style:name="Arial Black1" svg:font-family="'Arial Black'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ook" xlink:href="Pictures/100000000000078000000387F062883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 loext:decorative="false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 loext:decorative="false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Mgr8" style:family="graphic" style:parent-style-name="standard">
      <style:graphic-properties draw:stroke="none" draw:fill="none" draw:fill-color="#ffffff" fo:min-height="10.798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24cm" fo:padding-top="0.127cm" fo:padding-bottom="0.127cm" fo:padding-left="0.254cm" fo:padding-right="0.254cm" fo:wrap-option="wrap" loext:decorative="false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Mgr12" style:family="graphic" style:parent-style-name="standard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2.037cm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4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font-independent-line-spacing="true"/>
    </style:style>
    <style:style style:name="MP17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8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none" draw:fill-color="#ffffff"/>
    </style:style>
    <style:style style:name="MP25" style:family="paragraph">
      <loext:graphic-properties draw:fill="none"/>
      <style:paragraph-properties fo:text-align="center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MP27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8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ffff" loext:opacity="100%" fo:font-size="14pt" style:font-size-asian="14pt" style:font-size-complex="14pt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4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4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13">5/13/25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7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5-05-13">5/13/25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2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3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3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3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4" draw:layer="backgroundobjects" svg:width="22.859cm" svg:height="11.048cm" svg:x="1.27cm" svg:y="4.457cm">
        <draw:text-box>
          <text:p/>
        </draw:text-box>
      </draw:frame>
      <draw:frame draw:style-name="Mgr9" draw:text-style-name="MP25" draw:layer="backgroundobjects" svg:width="8.697cm" svg:height="2.124cm" svg:x="0.29cm" svg:y="16.839cm">
        <draw:image xlink:href="Pictures/1000000100000333000000C8C39BB24A.png" xlink:type="simple" xlink:show="embed" xlink:actuate="onLoad" draw:mime-type="image/png">
          <text:p/>
        </draw:image>
      </draw:frame>
      <draw:frame draw:name="CuadroTexto 8_19" draw:style-name="Mgr10" draw:text-style-name="MP26" draw:layer="backgroundobjects" svg:width="12.109cm" svg:height="1.778cm" svg:x="13.208cm" svg:y="17.018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frame draw:name="Subtítulo 2_13" draw:style-name="Mgr11" draw:text-style-name="MP27" draw:layer="backgroundobjects" svg:width="14.16cm" svg:height="1.12cm" svg:x="0cm" svg:y="3.171cm">
        <draw:text-box>
          <text:p/>
        </draw:text-box>
      </draw:frame>
      <draw:frame draw:style-name="Mgr12" draw:text-style-name="MP22" draw:layer="backgroundobjects" svg:width="3.205cm" svg:height="2.032cm" svg:x="8.987cm" svg:y="16.875cm">
        <draw:text-box>
          <text:p text:style-name="MP28"><text:span text:style-name="MT31">2025-05-13</text:span></text:p>
          <text:p text:style-name="MP28"><text:span text:style-name="MT31"/></text:p>
          <text:p text:style-name="MP28"><text:span text:style-name="MT31"><text:page-number>&lt;number&gt;</text:page-number></text:span><text:span text:style-name="MT31">/</text:span><text:span text:style-name="MT31"><text:page-count>39</text:page-count></text:span></text:p>
        </draw:text-box>
      </draw:frame>
      <draw:custom-shape draw:name="Rectangle 6" draw:style-name="Mgr5" draw:text-style-name="MP17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5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6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6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layer="backgroundobjects" svg:width="22.859cm" svg:height="3.18cm" svg:x="1.27cm" svg:y="6.604cm" presentation:class="title">
        <draw:text-box>
          <text:p><text:span text:style-name="MT32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3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5" draw:layer="backgroundobjects" svg:width="8.697cm" svg:height="2.124cm" svg:x="0.291cm" svg:y="16.839cm">
        <draw:image xlink:href="Pictures/1000000100000333000000C8C39BB24A.png" xlink:type="simple" xlink:show="embed" xlink:actuate="onLoad" draw:mime-type="image/png">
          <text:p/>
        </draw:image>
      </draw:frame>
      <draw:frame presentation:style-name="Mpr118" draw:text-style-name="MP22" draw:layer="backgroundobjects" svg:width="2.766cm" svg:height="2.032cm" svg:x="9.144cm" svg:y="16.857cm">
        <draw:text-box>
          <text:p text:style-name="MP28"><text:span text:style-name="MT31">2025-05-13</text:span></text:p>
          <text:p text:style-name="MP28"><text:span text:style-name="MT31"/></text:p>
          <text:p text:style-name="MP28"><text:span text:style-name="MT31"><text:page-number>&lt;number&gt;</text:page-number></text:span><text:span text:style-name="MT31">/</text:span><text:span text:style-name="MT31"><text:page-count>39</text:page-count></text:span></text:p>
        </draw:text-box>
      </draw:frame>
      <draw:frame draw:name="CuadroTexto 8_19" draw:style-name="Mgr13" draw:text-style-name="MP26" draw:layer="backgroundobjects" svg:width="13.742cm" svg:height="2.291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draw:custom-shape draw:name="Rectangle 6" draw:style-name="Mgr5" draw:text-style-name="MP17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9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20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20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>Obras Libres: uso y disfrute</dc:title>
    <meta:initial-creator>Manuel Gertrudix Barrio</meta:initial-creator>
    <meta:creation-date>2019-01-21T12:01:12Z</meta:creation-date>
    <dc:date>2025-05-13T01:07:47.689875002</dc:date>
    <meta:editing-cycles>54</meta:editing-cycles>
    <meta:editing-duration>PT16H11M17S</meta:editing-duration>
    <dc:creator>Jesus Gonzalez-Barahona</dc:creator>
    <meta:document-statistic meta:object-count="446"/>
    <meta:template xlink:type="simple" xlink:actuate="onRequest" xlink:title="" xlink:href="../Downloads/presentaciones/Ofilibre-presentacion.odp/Esencial"/>
  </office:meta>
</office:document-meta>
</file>