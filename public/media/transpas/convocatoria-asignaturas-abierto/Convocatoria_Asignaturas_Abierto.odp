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000000071C893EDEA.png" manifest:media-type="image/png"/>
  <manifest:file-entry manifest:full-path="Pictures/1000000100000333000000C8C39BB24A.png" manifest:media-type="image/png"/>
  <manifest:file-entry manifest:full-path="Pictures/100000000000078000000387F062883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559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99cm" fo:min-width="23.19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83cm" fo:min-width="23.42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4" style:family="graphic" style:parent-style-name="standard">
      <style:graphic-properties svg:stroke-color="#ffffff" draw:fill-color="#ffffff" fo:min-height="11.659cm" loext:decorative="false"/>
      <style:paragraph-properties style:writing-mode="lr-tb"/>
    </style:style>
    <style:style style:name="gr15" style:family="graphic" style:parent-style-name="standard">
      <style:graphic-properties svg:stroke-color="#ffffff" draw:fill-color="#ffffff" fo:min-height="11.026cm" loext:decorative="false"/>
      <style:paragraph-properties style:writing-mode="lr-tb"/>
    </style:style>
    <style:style style:name="gr16" style:family="graphic" style:parent-style-name="standard">
      <style:graphic-properties svg:stroke-color="#ffffff" draw:fill-color="#ffffff" fo:min-height="10.366cm" loext:decorative="false"/>
      <style:paragraph-properties style:writing-mode="lr-tb"/>
    </style:style>
    <style:style style:name="gr17" style:family="graphic" style:parent-style-name="standard">
      <style:graphic-properties svg:stroke-color="#ffffff" draw:fill-color="#ffffff" fo:min-height="11.395cm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fo:min-height="12.571cm" loext:decorative="false"/>
      <style:paragraph-properties style:writing-mode="lr-tb"/>
    </style:style>
    <style:style style:name="gr19" style:family="graphic" style:parent-style-name="standard">
      <style:graphic-properties svg:stroke-color="#ffffff" draw:fill-color="#ffffff" fo:min-height="12.112cm" loext:decorative="false"/>
      <style:paragraph-properties style:writing-mode="lr-tb"/>
    </style:style>
    <style:style style:name="gr20" style:family="graphic" style:parent-style-name="standard">
      <style:graphic-properties svg:stroke-color="#ffffff" draw:fill-color="#ffffff" fo:min-height="12.496cm" loext:decorative="false"/>
      <style:paragraph-properties style:writing-mode="lr-tb"/>
    </style:style>
    <style:style style:name="gr21" style:family="graphic" style:parent-style-name="standard">
      <style:graphic-properties svg:stroke-color="#ffffff" draw:fill-color="#ffffff" fo:min-height="9.656cm" loext:decorative="false"/>
      <style:paragraph-properties style:writing-mode="lr-tb"/>
    </style:style>
    <style:style style:name="gr22" style:family="graphic" style:parent-style-name="standard">
      <style:graphic-properties svg:stroke-color="#ffffff" draw:fill-color="#ffffff" fo:min-height="14.176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fo:min-height="12.601cm" loext:decorative="false"/>
      <style:paragraph-properties style:writing-mode="lr-tb"/>
    </style:style>
    <style:style style:name="gr24" style:family="graphic" style:parent-style-name="standard">
      <style:graphic-properties svg:stroke-color="#ffffff" draw:fill-color="#ffffff" fo:min-height="12.65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fo:min-height="12.005cm" loext:decorative="false"/>
      <style:paragraph-properties style:writing-mode="lr-tb"/>
    </style:style>
    <style:style style:name="gr26" style:family="graphic" style:parent-style-name="standard">
      <style:graphic-properties svg:stroke-color="#ffffff" draw:fill-color="#ffffff" fo:min-height="9.95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359cm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1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_20_1_5f_-notes">
      <style:graphic-properties draw:fill-color="#ffffff" draw:auto-grow-height="true" fo:min-height="12.572cm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4pt" fo:language="es" fo:country="ES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loext:tab-stop-distance="0cm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loext:tab-stop-distance="0cm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loext:tab-stop-distance="0cm" style:font-independent-line-spacing="true">
        <style:tab-stops/>
      </style:paragraph-properties>
      <style:text-properties style:font-name="Liberation Sans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/>
      <style:text-properties fo:language="es" fo:country="ES"/>
    </style:style>
    <style:style style:name="P11" style:family="paragraph">
      <loext:graphic-properties draw:fill-color="#ffffff"/>
      <style:text-properties fo:language="es" fo:country="ES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 fo:language="es" fo:country="ES"/>
    </style:style>
    <style:style style:name="P14" style:family="paragraph">
      <loext:graphic-properties draw:fill="none" draw:fill-color="#ffffff"/>
      <style:text-properties fo:font-size="18pt" fo:language="es" fo:country="ES"/>
    </style:style>
    <style:style style:name="P15" style:family="paragraph">
      <loext:graphic-properties draw:fill-color="#ffffff"/>
      <style:text-properties fo:font-size="20pt" fo:language="es" fo:country="ES"/>
    </style:style>
    <style:style style:name="P16" style:family="paragraph">
      <style:paragraph-properties fo:margin-left="0cm" fo:margin-right="0cm" fo:margin-top="0.5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language="es" fo:country="ES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20" style:family="paragraph">
      <loext:graphic-properties draw:fill="none" draw:fill-color="#ffffff"/>
      <style:text-properties fo:color="#c9211e" loext:opacity="100%" fo:font-size="36pt" fo:language="es" fo:country="ES" fo:font-weight="bold"/>
    </style:style>
    <style:style style:name="P21" style:family="paragraph">
      <loext:graphic-properties draw:fill-color="#ffffff"/>
      <style:text-properties style:font-name="Liberation Sans" fo:font-size="28pt" fo:language="es" fo:country="ES"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-color="#ffffff"/>
      <style:text-properties style:font-name="Liberation Sans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Liberation Sans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/>
      <style:text-properties fo:color="#000000" loext:opacity="100%" style:font-name="Liberation Sans" fo:font-size="32pt" fo:language="es" fo:country="ES" fo:font-weight="bold"/>
    </style:style>
    <style:style style:name="P27" style:family="paragraph">
      <style:paragraph-properties fo:margin-left="0cm" fo:margin-right="0cm" fo:margin-top="0.5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style:font-name="Liberation Sans" fo:font-size="36pt" fo:language="es" fo:country="ES"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end"/>
    </style:style>
    <style:style style:name="P30" style:family="paragraph">
      <loext:graphic-properties draw:fill="none"/>
      <style:paragraph-properties fo:text-align="end" style:font-independent-line-spacing="true"/>
      <style:text-properties fo:color="#000000" loext:opacity="100%" style:font-name="Liberation Sans" fo:font-size="26pt" fo:language="es" fo:country="ES" style:font-size-asian="26pt" style:font-size-complex="26pt"/>
    </style:style>
    <style:style style:name="P31" style:family="paragraph">
      <loext:graphic-properties draw:fill-color="#ffffff"/>
      <style:text-properties fo:font-size="26.3999996185303pt" fo:language="es" fo:country="E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s" fo:country="ES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s" fo:country="ES" fo:font-style="italic" fo:text-shadow="none" style:text-underline-style="none" fo:font-weight="normal" style:letter-kerning="true" style:font-name-asian="AR PL KaitiM GB1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language="es" fo:country="ES" fo:font-style="italic" fo:text-shadow="none" style:text-underline-style="none" fo:font-weight="normal" style:letter-kerning="true" style:font-name-asian="AR PL KaitiM GB1" style:font-size-asian="21pt" style:font-style-asian="italic" style:font-weight-asian="normal" style:font-name-complex="FreeSan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4" style:family="text">
      <style:text-properties fo:color="#c9211e" loext:opacity="100%" fo:font-size="36pt" fo:language="es" fo:country="ES" fo:font-weight="bold"/>
    </style:style>
    <style:style style:name="T15" style:family="text">
      <style:text-properties style:font-name="Liberation Sans" fo:font-size="48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style:font-name="Liberation Sans" fo:font-size="40pt" fo:language="es" fo:country="E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style:font-name="Liberation Sans" fo:font-size="32pt" fo:language="es" fo:country="ES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18" style:family="text">
      <style:text-properties style:font-name="Liberation Sans" fo:font-size="28pt" fo:language="es" fo:country="E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style:font-name="Liberation Sans" fo:font-size="32pt" fo:language="es" fo:country="ES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20" style:family="text">
      <style:text-properties style:font-name="Liberation Sans" fo:font-size="44pt" fo:language="es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36pt" fo:language="es" fo:country="ES" fo:font-style="normal" fo:text-shadow="none" style:text-underline-style="none" fo:font-weight="bold" style:letter-kerning="true" style:font-name-asian="AR PL KaitiM GB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" fo:font-size="36pt" fo:language="es" fo:country="E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style:font-name="Liberation Sans" fo:font-size="26pt" fo:language="es" fo:country="E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font-name="Liberation Sans" fo:font-size="28pt" fo:language="es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style:font-name="Liberation Sans" fo:font-size="26pt" fo:language="es" fo:country="ES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style:font-name="Liberation Sans" fo:font-size="26pt" fo:language="es" fo:country="ES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27" style:family="text">
      <style:text-properties fo:color="#000000" loext:opacity="100%" style:font-name="Liberation Sans" fo:font-size="32pt" fo:language="es" fo:country="ES" fo:font-weight="bold" style:font-size-asian="40pt" style:font-weight-asian="normal" style:font-size-complex="40pt" style:font-weight-complex="normal"/>
    </style:style>
    <style:style style:name="T28" style:family="text">
      <style:text-properties fo:color="#000000" loext:opacity="100%" style:font-name="Liberation Sans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000000" loext:opacity="100%" style:font-name="Liberation Sans" fo:font-size="44pt" fo:language="es" fo:country="ES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0" style:family="text">
      <style:text-properties fo:color="#000000" loext:opacity="100%" style:font-name="Liberation Sans" fo:font-size="26pt" fo:language="es" fo:country="ES" style:font-size-asian="26pt" style:font-size-complex="26pt"/>
    </style:style>
    <style:style style:name="T31" style:family="text">
      <style:text-properties fo:color="#000000" loext:opacity="100%" style:font-name="Liberation Sans" fo:font-size="24pt" fo:language="es" fo:country="ES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813cm" svg:x="13.88cm" svg:y="11.43cm">
          <draw:text-box>
            <text:p text:style-name="P2"><text:span text:style-name="T1">Oficina de Conocimiento y Cultura </text:span><text:span text:style-name="T1">Libres</text:span></text:p>
            <text:p text:style-name="P2"><text:span text:style-name="T1">Despacho 011 – Rectorado </text:span><text:span text:style-name="T1">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@floss.social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/></text:p>
            <text:p text:style-name="P4"><text:span text:style-name="T2">Fediverso: @jgbarah@floss.social 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Convocatori</text:span><text:span text:style-name="T4">a de </text:span><text:span text:style-name="T4">Asignaturas </text:span><text:span text:style-name="T4">en Abierto </text:span><text:span text:style-name="T4">2025-2026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Presentaciones de OfiLibre</text:span></text:p>
            <text:p text:style-name="P8"><text:span text:style-name="T5">3 de junio de 2025</text:span></text:p>
          </draw:text-box>
        </draw:frame>
        <draw:frame draw:style-name="gr6" draw:text-style-name="P10" draw:layer="layout" svg:width="5.14cm" svg:height="1.814cm" svg:x="20.006cm" svg:y="14.95cm">
          <draw:image xlink:href="Pictures/100000010000014000000071C893EDE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draw:frame draw:name="Título 1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9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4" draw:layer="layout" svg:width="16.002cm" svg:height="8.783cm" svg:x="6.096cm" svg:y="5.334cm">
          <draw:text-box>
            <text:list text:style-name="L1">
              <text:list-item>
                <text:p><text:span text:style-name="T8">Descripción </text:span><text:span text:style-name="T8">general</text:span></text:p>
              </text:list-item>
              <text:list-item>
                <text:p><text:span text:style-name="T8">Evaluación y </text:span><text:span text:style-name="T8">efectos</text:span></text:p>
              </text:list-item>
              <text:list-item>
                <text:p><text:span text:style-name="T8">Recursos de </text:span><text:span text:style-name="T8">apoyo</text:span></text:p>
              </text:list-item>
              <text:list-item>
                <text:p><text:span text:style-name="T8">Temas </text:span><text:span text:style-name="T8">complementa</text:span><text:span text:style-name="T8">rios:</text:span></text:p>
                <text:list>
                  <text:list-item>
                    <text:p><text:span text:style-name="T8">Acceso </text:span><text:span text:style-name="T8">Abierto</text:span></text:p>
                  </text:list-item>
                  <text:list-item>
                    <text:p><text:span text:style-name="T8">Licenci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8">
        <draw:frame draw:name="Título 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8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9">Documentació</text:span><text:span text:style-name="T9">n fundamental</text:span><text:span text:style-name="T6"> </text:span><text:span text:style-name="T6"><text:s/></text:span><text:span text:style-name="T7"><text:s/></text:span></text:p>
          </draw:text-box>
        </draw:frame>
        <draw:frame draw:style-name="gr10" draw:text-style-name="P17" draw:layer="layout" svg:width="23.693cm" svg:height="11.449cm" svg:x="0.254cm" svg:y="4.572cm">
          <draw:text-box>
            <text:list text:style-name="L1">
              <text:list-item>
                <text:p text:style-name="P16"><text:span text:style-name="T10">Convocatoria</text:span></text:p>
              </text:list-item>
            </text:list>
            <text:p text:style-name="P16"><text:span text:style-name="T11"><text:a xlink:href="https://ofilibre.urjc.es/documentos/convocatoria-asignaturas-abierto-2025-2026.pdf" xlink:type="simple">https://ofilibre.urjc.es/documentos/convocatoria-asignaturas-abierto-2025-2026.pdf</text:a></text:span></text:p>
            <text:p text:style-name="P16"><text:span text:style-name="T11"/></text:p>
            <text:list text:continue-numbering="true" text:style-name="L1">
              <text:list-item>
                <text:p text:style-name="P16"><text:span text:style-name="T10">Formularios de </text:span><text:span text:style-name="T10">solicitud</text:span></text:p>
              </text:list-item>
            </text:list>
            <text:p text:style-name="P16"><text:span text:style-name="T12"><text:a xlink:href="https://sede.urjc.es/convocatorias" xlink:type="simple">https://sede.urjc.es/convocatorias</text:a></text:span></text:p>
            <text:p text:style-name="P16"><text:span text:style-name="T12"/></text:p>
            <text:list text:continue-numbering="true" text:style-name="L1">
              <text:list-item>
                <text:p text:style-name="P16"><text:span text:style-name="T10">Información de </text:span><text:span text:style-name="T10">apoyo</text:span></text:p>
              </text:list-item>
            </text:list>
            <text:p text:style-name="P16"><text:span text:style-name="T12"><text:a xlink:href="https://ofilibre.urjc.es/guias/convocatoria-asignaturas-abierto/" xlink:type="simple">https://ofilibre.urjc.es/guias/convocatoria-asignaturas-abierto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4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6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9">Un poco de </text:span><text:span text:style-name="T9">historia</text:span><text:span text:style-name="T6"> <text:s/></text:span><text:span text:style-name="T7"><text:s/></text:span></text:p>
          </draw:text-box>
        </draw:frame>
        <draw:frame draw:style-name="gr11" draw:text-style-name="P17" draw:layer="layout" svg:width="23.933cm" svg:height="11.233cm" svg:x="0.254cm" svg:y="4.826cm">
          <draw:text-box>
            <text:list text:style-name="L1">
              <text:list-item>
                <text:p text:style-name="P16"><text:span text:style-name="T10">Cuarta </text:span><text:span text:style-name="T10">convocatoria</text:span></text:p>
              </text:list-item>
              <text:list-item>
                <text:p text:style-name="P16"><text:span text:style-name="T10">Convocatorias </text:span><text:span text:style-name="T10">anteriores:</text:span></text:p>
                <text:list>
                  <text:list-item>
                    <text:p text:style-name="P16"><text:span text:style-name="T10">Más de 100 </text:span><text:span text:style-name="T10">asignaturas </text:span><text:span text:style-name="T10">en abierto</text:span></text:p>
                  </text:list-item>
                  <text:list-item>
                    <text:p text:style-name="P16"><text:span text:style-name="T10">Más de 200 </text:span><text:span text:style-name="T10">docentes</text:span></text:p>
                  </text:list-item>
                </text:list>
              </text:list-item>
            </text:list>
            <text:p text:style-name="P16"><text:span text:style-name="T12"/></text:p>
            <text:p text:style-name="P16"><text:span text:style-name="T12"><text:a xlink:href="https://online.urjc.es/es/para-futuros-estudiantes/asignaturas-en-abierto" xlink:type="simple">https://online.urjc.es/es/para-futuros-estudiantes/asignaturas-en-abiert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_5f_" presentation:presentation-page-layout-name="AL1T18">
        <draw:frame draw:name="Título 13_ 1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0.828cm" svg:height="5.925cm" svg:x="2.032cm" svg:y="4.318cm">
          <draw:text-box>
            <text:p text:style-name="P18"><text:span text:style-name="T13">Descri</text:span><text:span text:style-name="T13">pción </text:span><text:span text:style-name="T13">genera</text:span><text:span text:style-name="T13">l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Título 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1.59cm" svg:height="3.095cm" svg:x="0.508cm" svg:y="1.099cm">
          <draw:text-box>
            <text:p><text:span text:style-name="T14">Objeto</text:span></text:p>
          </draw:text-box>
        </draw:frame>
        <draw:frame draw:style-name="gr14" draw:text-style-name="P21" draw:layer="layout" svg:width="22.889cm" svg:height="11.909cm" svg:x="1.016cm" svg:y="4.37cm">
          <draw:text-box>
            <text:p><text:span text:style-name="T15">“</text:span><text:span text:style-name="T15">Reconoce</text:span><text:span text:style-name="T15">r la </text:span><text:span text:style-name="T15">publicación </text:span><text:span text:style-name="T15">en acceso </text:span><text:span text:style-name="T15">abierto de </text:span><text:span text:style-name="T15">materiales </text:span><text:span text:style-name="T15">docentes </text:span><text:span text:style-name="T15">de </text:span><text:span text:style-name="T15">asignatura</text:span><text:span text:style-name="T15">s </text:span><text:span text:style-name="T15">impartidas </text:span><text:span text:style-name="T15">en grado y </text:span><text:span text:style-name="T15">máster de </text:span><text:span text:style-name="T15">la URJC </text:span><text:span text:style-name="T15">durante el </text:span><text:span text:style-name="T15">curso </text:span><text:span text:style-name="T15">académico </text:span><text:span text:style-name="T15">2025-</text:span><text:span text:style-name="T15">2026”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1.59cm" svg:height="3.095cm" svg:x="0.508cm" svg:y="1.099cm">
          <draw:text-box>
            <text:p><text:span text:style-name="T14">Esfuerzo </text:span><text:span text:style-name="T14">extra por los </text:span><text:span text:style-name="T14">docentes</text:span></text:p>
          </draw:text-box>
        </draw:frame>
        <draw:frame draw:style-name="gr15" draw:text-style-name="P22" draw:layer="layout" svg:width="24.384cm" svg:height="11.276cm" svg:x="0.374cm" svg:y="5.174cm">
          <draw:text-box>
            <text:list text:style-name="L1">
              <text:list-item>
                <text:p><text:span text:style-name="T16">Comprobaci</text:span><text:span text:style-name="T16">ón de </text:span><text:span text:style-name="T16">autoría y </text:span><text:span text:style-name="T16">derechos</text:span></text:p>
              </text:list-item>
              <text:list-item>
                <text:p><text:span text:style-name="T16">Preparación </text:span><text:span text:style-name="T16">para </text:span><text:span text:style-name="T16">publicar</text:span></text:p>
              </text:list-item>
              <text:list-item>
                <text:p><text:span text:style-name="T16">Elaboración </text:span><text:span text:style-name="T16">por </text:span><text:span text:style-name="T16">adelantado</text:span></text:p>
              </text:list-item>
              <text:list-item>
                <text:p><text:span text:style-name="T16">Comprender </text:span><text:span text:style-name="T16">licencias y </text:span><text:span text:style-name="T16">efectos</text:span></text:p>
              </text:list-item>
              <text:list-item>
                <text:p><text:span text:style-name="T16">Licenciar </text:span><text:span text:style-name="T16">materiales</text:span></text:p>
              </text:list-item>
              <text:list-item>
                <text:p><text:span text:style-name="T16">Depositar en </text:span><text:span text:style-name="T16">archivo </text:span><text:span text:style-name="T16">abierto</text:span></text:p>
              </text:list-item>
              <text:list-item>
                <text:p><text:span text:style-name="T16">Enlazar en </text:span><text:span text:style-name="T16">aula virtual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1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1.59cm" svg:height="3.095cm" svg:x="0.508cm" svg:y="1.099cm">
          <draw:text-box>
            <text:p><text:span text:style-name="T14">Grandes </text:span><text:span text:style-name="T14">beneficios</text:span></text:p>
          </draw:text-box>
        </draw:frame>
        <draw:frame draw:style-name="gr15" draw:text-style-name="P22" draw:layer="layout" svg:width="24.384cm" svg:height="11.276cm" svg:x="0.374cm" svg:y="5.174cm">
          <draw:text-box>
            <text:list text:style-name="L1">
              <text:list-item>
                <text:p><text:span text:style-name="T16">Docentes: </text:span><text:span text:style-name="T16">más </text:span><text:span text:style-name="T16">visibilidad, </text:span><text:span text:style-name="T16">posibles </text:span><text:span text:style-name="T16">colaboracion</text:span><text:span text:style-name="T16">es con </text:span><text:span text:style-name="T16">terceros</text:span></text:p>
              </text:list-item>
              <text:list-item>
                <text:p><text:span text:style-name="T16">Estudiantes: </text:span><text:span text:style-name="T16">mejor </text:span><text:span text:style-name="T16">disponibilida</text:span><text:span text:style-name="T16">d</text:span></text:p>
              </text:list-item>
              <text:list-item>
                <text:p><text:span text:style-name="T16">Universidad: </text:span><text:span text:style-name="T16">visibilidad, </text:span><text:span text:style-name="T16">efectos de </text:span><text:span text:style-name="T16">mejora de </text:span><text:span text:style-name="T16">calidad</text:span></text:p>
              </text:list-item>
              <text:list-item>
                <text:p><text:span text:style-name="T16">Sociedad: </text:span><text:span text:style-name="T16">materiales </text:span><text:span text:style-name="T16">académicos </text:span><text:span text:style-name="T16">ampliament</text:span><text:span text:style-name="T16">e </text:span><text:span text:style-name="T16">disponib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Título 11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1.59cm" svg:height="3.095cm" svg:x="0.508cm" svg:y="1.099cm">
          <draw:text-box>
            <text:p><text:span text:style-name="T14">La </text:span><text:span text:style-name="T14">convocatoria</text:span></text:p>
          </draw:text-box>
        </draw:frame>
        <draw:frame draw:style-name="gr16" draw:text-style-name="P22" draw:layer="layout" svg:width="24.384cm" svg:height="10.616cm" svg:x="0.374cm" svg:y="5.174cm">
          <draw:text-box>
            <text:list text:style-name="L1">
              <text:list-item>
                <text:p><text:span text:style-name="T17">Vicerrectorados </text:span><text:span text:style-name="T17">(etapa </text:span><text:span text:style-name="T17">anterior):</text:span></text:p>
                <text:list>
                  <text:list-item>
                    <text:p><text:span text:style-name="T17">Transformació</text:span><text:span text:style-name="T17">n y Educación </text:span><text:span text:style-name="T17">Digital</text:span></text:p>
                  </text:list-item>
                  <text:list-item>
                    <text:p><text:span text:style-name="T17">Ordenación </text:span><text:span text:style-name="T17">Académica</text:span></text:p>
                  </text:list-item>
                  <text:list-item>
                    <text:p><text:span text:style-name="T17">Comunidad </text:span><text:span text:style-name="T17">Campus, </text:span><text:span text:style-name="T17">Cultura y </text:span><text:span text:style-name="T17">Deporte</text:span></text:p>
                  </text:list-item>
                </text:list>
              </text:list-item>
              <text:list-item>
                <text:p><text:span text:style-name="T17">Con el apoyo </text:span><text:span text:style-name="T17">directo de:</text:span></text:p>
                <text:list>
                  <text:list-item>
                    <text:p><text:span text:style-name="T17">Publicaciones</text:span></text:p>
                  </text:list-item>
                  <text:list-item>
                    <text:p><text:span text:style-name="T17">Biblioteca</text:span></text:p>
                  </text:list-item>
                  <text:list-item>
                    <text:p><text:span text:style-name="T17">CI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Título 1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1.59cm" svg:height="3.095cm" svg:x="0.508cm" svg:y="1.099cm">
          <draw:text-box>
            <text:p><text:span text:style-name="T14">Presentación </text:span><text:span text:style-name="T14">y fechas</text:span></text:p>
          </draw:text-box>
        </draw:frame>
        <draw:frame draw:style-name="gr17" draw:text-style-name="P22" draw:layer="layout" svg:width="24.384cm" svg:height="11.645cm" svg:x="0.374cm" svg:y="5.174cm">
          <draw:text-box>
            <text:list text:style-name="L1">
              <text:list-item>
                <text:p><text:span text:style-name="T17">Convocatoria </text:span><text:span text:style-name="T17">en la sede </text:span><text:span text:style-name="T17">virtual de la </text:span><text:span text:style-name="T17">URJC</text:span></text:p>
              </text:list-item>
              <text:list-item>
                <text:p><text:span text:style-name="T17">Asignaturas </text:span><text:span text:style-name="T17">primer </text:span><text:span text:style-name="T17">cuatrimestre:</text:span></text:p>
              </text:list-item>
            </text:list>
            <text:p><text:span text:style-name="T17"><text:tab/></text:span><text:span text:style-name="T17"><text:tab/></text:span><text:span text:style-name="T17"><text:tab/></text:span><text:span text:style-name="T17">17 de </text:span><text:span text:style-name="T17">noviembre 2025</text:span></text:p>
            <text:list text:continue-numbering="true" text:style-name="L1">
              <text:list-item>
                <text:p><text:span text:style-name="T17">Asignaturas </text:span><text:span text:style-name="T17">segundo </text:span><text:span text:style-name="T17">cuatrimestre:</text:span></text:p>
              </text:list-item>
            </text:list>
            <text:p><text:span text:style-name="T17"><text:tab/></text:span><text:span text:style-name="T17"><text:tab/></text:span><text:span text:style-name="T17"><text:tab/></text:span><text:span text:style-name="T17">16 de </text:span><text:span text:style-name="T17">febrero 2026</text:span></text:p>
            <text:list text:continue-numbering="true" text:style-name="L1">
              <text:list-item>
                <text:p><text:span text:style-name="T17">Depósito </text:span><text:span text:style-name="T17">previo:</text:span></text:p>
              </text:list-item>
            </text:list>
            <text:p><text:span text:style-name="T17"><text:tab/></text:span><text:span text:style-name="T17"><text:tab/></text:span><text:span text:style-name="T17"><text:tab/></text:span><text:span text:style-name="T17">Atención </text:span><text:span text:style-name="T17">a los retrasos </text:span><text:span text:style-name="T17">debidos al </text:span><text:span text:style-name="T17">proceso de </text:span><text:span text:style-name="T17">depósito </text:span><text:span text:style-name="T17">(depositar al </text:span><text:span text:style-name="T17">menos dos días </text:span><text:span text:style-name="T17">antes del plazo </text:span><text:span text:style-name="T17">final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Título 15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Materiales </text:span><text:span text:style-name="T14">presentables </text:span><text:span text:style-name="T14">a la </text:span><text:span text:style-name="T14">convocatoria</text:span></text:p>
          </draw:text-box>
        </draw:frame>
        <draw:frame draw:style-name="gr16" draw:text-style-name="P22" draw:layer="layout" svg:width="24.384cm" svg:height="10.616cm" svg:x="0.374cm" svg:y="5.174cm">
          <draw:text-box>
            <text:list text:style-name="L1">
              <text:list-item>
                <text:p><text:span text:style-name="T17">Materiales </text:span><text:span text:style-name="T17">utilizados en </text:span><text:span text:style-name="T17">docencia oficial </text:span><text:span text:style-name="T17">en grado o </text:span><text:span text:style-name="T17">máster </text:span><text:span text:style-name="T17">universitario</text:span></text:p>
              </text:list-item>
              <text:list-item>
                <text:p><text:span text:style-name="T17">Utilizados </text:span><text:span text:style-name="T17">durante curso </text:span><text:span text:style-name="T17">2025-2026</text:span></text:p>
              </text:list-item>
              <text:list-item>
                <text:p><text:span text:style-name="T17">Depositados en </text:span><text:span text:style-name="T17">archivos </text:span><text:span text:style-name="T17">abiertos de la </text:span><text:span text:style-name="T17">Universidad</text:span></text:p>
              </text:list-item>
              <text:list-item>
                <text:p><text:span text:style-name="T17">Organizados </text:span><text:span text:style-name="T17">por asignatura </text:span><text:span text:style-name="T17">“agrupada”</text:span></text:p>
              </text:list-item>
              <text:list-item>
                <text:p><text:span text:style-name="T17">Sustancialment</text:span><text:span text:style-name="T17">e diferentes de </text:span><text:span text:style-name="T17">materiales en </text:span><text:span text:style-name="T17">abierto </text:span><text:span text:style-name="T17">covnocatorias </text:span><text:span text:style-name="T17">2023-2024 y </text:span><text:span text:style-name="T17">2024-2025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6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Categorías de </text:span><text:span text:style-name="T14">materiales</text:span></text:p>
          </draw:text-box>
        </draw:frame>
        <draw:frame draw:style-name="gr18" draw:text-style-name="P22" draw:layer="layout" svg:width="24.384cm" svg:height="12.821cm" svg:x="0.254cm" svg:y="3.943cm">
          <draw:text-box>
            <text:list text:style-name="L1">
              <text:list-item>
                <text:p><text:span text:style-name="T18">0: Guía de estudio</text:span></text:p>
              </text:list-item>
              <text:list-item>
                <text:p><text:span text:style-name="T18">1: Apuntes</text:span></text:p>
              </text:list-item>
              <text:list-item>
                <text:p><text:span text:style-name="T18">2: Presentaciones </text:span><text:span text:style-name="T18">o transparencias</text:span></text:p>
              </text:list-item>
              <text:list-item>
                <text:p><text:span text:style-name="T18">3: Ejercicios, </text:span><text:span text:style-name="T18">problemas, </text:span><text:span text:style-name="T18">trabajos, </text:span><text:span text:style-name="T18">proyectos y/o </text:span><text:span text:style-name="T18">pruebas de </text:span><text:span text:style-name="T18">evaluación</text:span></text:p>
              </text:list-item>
              <text:list-item>
                <text:p><text:span text:style-name="T18">4: Videos</text:span></text:p>
              </text:list-item>
              <text:list-item>
                <text:p><text:span text:style-name="T18">5: Audios </text:span><text:span text:style-name="T18">(podcasts)</text:span></text:p>
              </text:list-item>
              <text:list-item>
                <text:p><text:span text:style-name="T18">6: Programas de </text:span><text:span text:style-name="T18">ordenador</text:span></text:p>
              </text:list-item>
              <text:list-item>
                <text:p><text:span text:style-name="T18">7: Materiales </text:span><text:span text:style-name="T18">específicos para </text:span><text:span text:style-name="T18">el aula virtual </text:span><text:span text:style-name="T18">(lecciones, tests, </text:span><text:span text:style-name="T18">o glosarios </text:span><text:span text:style-name="T18">Moodle, H5P, etc.) </text:span></text:p>
              </text:list-item>
              <text:list-item>
                <text:p><text:span text:style-name="T18">8: Otros </text:span><text:span text:style-name="T18">materiales </text:span><text:span text:style-name="T18">(ilustraciones...)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Título 14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Categorías de </text:span><text:span text:style-name="T14">materiales</text:span></text:p>
          </draw:text-box>
        </draw:frame>
        <draw:frame draw:style-name="gr18" draw:text-style-name="P24" draw:layer="layout" svg:width="24.384cm" svg:height="12.821cm" svg:x="0.254cm" svg:y="3.943cm">
          <draw:text-box>
            <text:list text:style-name="L1">
              <text:list-header>
                <text:p text:style-name="P23"><text:span text:style-name="T19">Un solo </text:span><text:span text:style-name="T19">material </text:span><text:span text:style-name="T19">(documento) </text:span><text:span text:style-name="T19">por categoría, </text:span><text:span text:style-name="T19">salvo videos y </text:span><text:span text:style-name="T19">audios (una </text:span><text:span text:style-name="T19">colección).</text:span></text:p>
              </text:list-header>
            </text:list>
            <text:p text:style-name="P23"><text:span text:style-name="T19"/></text:p>
            <text:p text:style-name="P23"><text:span text:style-name="T19">También se </text:span><text:span text:style-name="T19">pueden </text:span><text:span text:style-name="T19">combinar los </text:span><text:span text:style-name="T19">materiales de </text:span><text:span text:style-name="T19">varias </text:span><text:span text:style-name="T19">categorías en </text:span><text:span text:style-name="T19">un solo </text:span><text:span text:style-name="T19">documento.</text:span></text:p>
            <text:p text:style-name="P23"><text:span text:style-name="T19"/></text:p>
            <text:p text:style-name="P23"><text:span text:style-name="T19">No se pueden </text:span><text:span text:style-name="T19">entregar varios </text:span><text:span text:style-name="T19">documentos </text:span><text:span text:style-name="T19">para una sola </text:span><text:span text:style-name="T19">categoría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1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Característ</text:span><text:span text:style-name="T14">icas de </text:span><text:span text:style-name="T14">materiales</text:span></text:p>
          </draw:text-box>
        </draw:frame>
        <draw:frame draw:style-name="gr19" draw:text-style-name="P22" draw:layer="layout" svg:width="24.384cm" svg:height="12.362cm" svg:x="0.374cm" svg:y="3.81cm">
          <draw:text-box>
            <text:list text:style-name="L1">
              <text:list-item>
                <text:p><text:span text:style-name="T18">Actualizados para el curso 2025-2026</text:span></text:p>
              </text:list-item>
              <text:list-item>
                <text:p><text:span text:style-name="T18">Licenciado con</text:span></text:p>
                <text:list>
                  <text:list-item>
                    <text:p><text:span text:style-name="T18">Creative Commons Atribución, o</text:span></text:p>
                  </text:list-item>
                  <text:list-item>
                    <text:p><text:span text:style-name="T18">Creative Commons Atribución-CompartirIgual</text:span></text:p>
                  </text:list-item>
                </text:list>
              </text:list-item>
              <text:list-item>
                <text:p><text:span text:style-name="T18">Buenas prácticas sobre derechos de autor</text:span></text:p>
              </text:list-item>
              <text:list-item>
                <text:p><text:span text:style-name="T18">Depósito en:</text:span></text:p>
                <text:list>
                  <text:list-item>
                    <text:p><text:span text:style-name="T18">BURJC-Digital (materiales bibliográficos)</text:span></text:p>
                  </text:list-item>
                  <text:list-item>
                    <text:p><text:span text:style-name="T18">TV URJC (videos)</text:span></text:p>
                  </text:list-item>
                  <text:list-item>
                    <text:p><text:span text:style-name="T18">Software y otras categorías: procedimientos específicos.</text:span></text:p>
                  </text:list-item>
                </text:list>
              </text:list-item>
              <text:list-item>
                <text:p><text:span text:style-name="T18">Atención a los “Aspectos formales” (apartado 4.5)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Título 5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Asignaturas </text:span><text:span text:style-name="T14">“agrupadas”</text:span></text:p>
          </draw:text-box>
        </draw:frame>
        <draw:frame draw:style-name="gr20" draw:text-style-name="P22" draw:layer="layout" svg:width="24.261cm" svg:height="14.177cm" svg:x="0.254cm" svg:y="3.845cm">
          <draw:text-box>
            <text:p><text:span text:style-name="T17">Se presentará </text:span><text:span text:style-name="T17">una “asignatura </text:span><text:span text:style-name="T17">agrupada” si:</text:span></text:p>
            <text:list text:style-name="L1">
              <text:list-item>
                <text:list>
                  <text:list-item>
                    <text:p><text:span text:style-name="T17">Las </text:span><text:span text:style-name="T17">asignaturas </text:span><text:span text:style-name="T17">son </text:span><text:span text:style-name="T17">temáticament</text:span><text:span text:style-name="T17">e similares, </text:span><text:span text:style-name="T17">y...</text:span></text:p>
                  </text:list-item>
                  <text:list-item>
                    <text:p><text:span text:style-name="T17">...proponen </text:span><text:span text:style-name="T17">conjuntos de </text:span><text:span text:style-name="T17">materiales </text:span><text:span text:style-name="T17">similares, </text:span><text:span text:style-name="T17">producidos </text:span><text:span text:style-name="T17">por los </text:span><text:span text:style-name="T17">mismos </text:span><text:span text:style-name="T17">autores y </text:span><text:span text:style-name="T17">autoras</text:span></text:p>
                  </text:list-item>
                </text:list>
              </text:list-item>
            </text:list>
            <text:p><text:span text:style-name="T17">Efectos de la </text:span><text:span text:style-name="T17">agrupación:</text:span></text:p>
            <text:list text:continue-numbering="true" text:style-name="L1">
              <text:list-item>
                <text:list>
                  <text:list-item>
                    <text:p><text:span text:style-name="T17">Solicitud única</text:span></text:p>
                  </text:list-item>
                  <text:list-item>
                    <text:p><text:span text:style-name="T17">Baremación </text:span><text:span text:style-name="T17">conjunta</text:span></text:p>
                  </text:list-item>
                  <text:list-item>
                    <text:p><text:span text:style-name="T17">Efecto sobre </text:span><text:span text:style-name="T17">algunos </text:span><text:span text:style-name="T17">incentivos</text:span></text:p>
                  </text:list-item>
                  <text:list-item>
                    <text:p><text:span text:style-name="T17">Creación de </text:span><text:span text:style-name="T17">una sola </text:span><text:span text:style-name="T17">asignatura en </text:span><text:span text:style-name="T17">abier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_5f_" presentation:presentation-page-layout-name="AL1T18">
        <draw:frame draw:name="Título 13_ 6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0.828cm" svg:height="5.925cm" svg:x="2.032cm" svg:y="4.318cm">
          <draw:text-box>
            <text:p text:style-name="P18"><text:span text:style-name="T13">Evalua</text:span><text:span text:style-name="T13">ción y </text:span><text:span text:style-name="T13">efecto</text:span><text:span text:style-name="T13">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Título 2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Clasificación </text:span><text:span text:style-name="T14">de </text:span><text:span text:style-name="T14">asignaturas</text:span></text:p>
          </draw:text-box>
        </draw:frame>
        <draw:frame draw:style-name="gr21" draw:text-style-name="P22" draw:layer="layout" svg:width="24.621cm" svg:height="9.906cm" svg:x="0.374cm" svg:y="5.334cm">
          <draw:text-box>
            <text:list text:style-name="L1">
              <text:list-item>
                <text:p><text:span text:style-name="T20">“</text:span><text:span text:style-name="T20">Asignatura</text:span><text:span text:style-name="T20">s sin </text:span><text:span text:style-name="T20">materiales </text:span><text:span text:style-name="T20">suficientes” </text:span><text:span text:style-name="T20">(menos de </text:span><text:span text:style-name="T20">28 puntos)</text:span></text:p>
              </text:list-item>
              <text:list-item>
                <text:p><text:span text:style-name="T20">“</text:span><text:span text:style-name="T20">Asignatura</text:span><text:span text:style-name="T20">s con </text:span><text:span text:style-name="T20">materiales </text:span><text:span text:style-name="T20">relevantes </text:span><text:span text:style-name="T20">en Acceso </text:span><text:span text:style-name="T20">Abierto”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Título 25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Baremación</text:span></text:p>
          </draw:text-box>
        </draw:frame>
        <draw:frame draw:style-name="gr22" draw:text-style-name="P22" draw:layer="layout" svg:width="25.4cm" svg:height="14.426cm" svg:x="0.062cm" svg:y="2.45cm">
          <draw:text-box>
            <text:list text:style-name="L1">
              <text:list-item>
                <text:p><text:span text:style-name="T16">Rúbrica de </text:span><text:span text:style-name="T16">evaluación </text:span><text:span text:style-name="T16">(Anexo III)</text:span></text:p>
              </text:list-item>
              <text:list-item>
                <text:p><text:span text:style-name="T16">Criterios </text:span><text:span text:style-name="T16">principales:</text:span></text:p>
                <text:list>
                  <text:list-item>
                    <text:p><text:span text:style-name="T16">Cobertura </text:span><text:span text:style-name="T16">de temario</text:span></text:p>
                  </text:list-item>
                  <text:list-item>
                    <text:p><text:span text:style-name="T16">Nivel de </text:span><text:span text:style-name="T16">detalle</text:span></text:p>
                  </text:list-item>
                </text:list>
              </text:list-item>
              <text:list-item>
                <text:p><text:span text:style-name="T16">Guía de </text:span><text:span text:style-name="T16">estudio: </text:span><text:span text:style-name="T16">obligatoria, </text:span><text:span text:style-name="T16">no puntúa</text:span></text:p>
              </text:list-item>
              <text:list-item>
                <text:p><text:span text:style-name="T16">Otras </text:span><text:span text:style-name="T16">categorías: </text:span><text:span text:style-name="T16">entre 0 y 14</text:span></text:p>
              </text:list-item>
              <text:list-item>
                <text:p><text:span text:style-name="T16">Asignatura: </text:span><text:span text:style-name="T16">suma de las </text:span><text:span text:style-name="T16">5 mejores </text:span><text:span text:style-name="T16">categoría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Título 21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Asignaturas </text:span><text:span text:style-name="T14">sin materiales </text:span><text:span text:style-name="T14">suficientes</text:span></text:p>
          </draw:text-box>
        </draw:frame>
        <draw:frame draw:style-name="gr21" draw:text-style-name="P22" draw:layer="layout" svg:width="24.384cm" svg:height="9.906cm" svg:x="0.374cm" svg:y="5.334cm">
          <draw:text-box>
            <text:list text:style-name="L1">
              <text:list-item>
                <text:p><text:span text:style-name="T20">Baremació</text:span><text:span text:style-name="T20">n inferior a </text:span><text:span text:style-name="T20">28</text:span></text:p>
              </text:list-item>
              <text:list-item>
                <text:p><text:span text:style-name="T20">Recibirán </text:span><text:span text:style-name="T20">indicacione</text:span><text:span text:style-name="T20">s sobre </text:span><text:span text:style-name="T20">cómo </text:span><text:span text:style-name="T20">mejorar </text:span><text:span text:style-name="T20">para </text:span><text:span text:style-name="T20">futuras </text:span><text:span text:style-name="T20">convocatori</text:span><text:span text:style-name="T20">a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8">
        <draw:frame draw:name="Título 2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Asignaturas </text:span><text:span text:style-name="T14">con </text:span><text:span text:style-name="T14">materiales </text:span><text:span text:style-name="T14">relevantes en </text:span><text:span text:style-name="T14">Acceso </text:span><text:span text:style-name="T14">Abierto</text:span></text:p>
          </draw:text-box>
        </draw:frame>
        <draw:frame draw:style-name="gr23" draw:text-style-name="P22" draw:layer="layout" svg:width="24.384cm" svg:height="12.851cm" svg:x="0.254cm" svg:y="4.107cm">
          <draw:text-box>
            <text:list text:style-name="L1">
              <text:list-item>
                <text:p><text:span text:style-name="T16">Baremación </text:span><text:span text:style-name="T16">mínima de </text:span><text:span text:style-name="T16">28</text:span></text:p>
              </text:list-item>
              <text:list-item>
                <text:p><text:span text:style-name="T16">Darán lugar </text:span><text:span text:style-name="T16">a la creación </text:span><text:span text:style-name="T16">de una </text:span><text:span text:style-name="T16">asignatura </text:span><text:span text:style-name="T16">en abierto </text:span><text:span text:style-name="T16">en el aula </text:span><text:span text:style-name="T16">virtual</text:span></text:p>
              </text:list-item>
              <text:list-item>
                <text:p><text:span text:style-name="T16">Darán </text:span><text:span text:style-name="T16">derecho a </text:span><text:span text:style-name="T16">incentivo </text:span><text:span text:style-name="T16">económico</text:span></text:p>
              </text:list-item>
              <text:list-item>
                <text:p><text:span text:style-name="T16">Serán </text:span><text:span text:style-name="T16">considerada</text:span><text:span text:style-name="T16">s en otras </text:span><text:span text:style-name="T16">convocatoria</text:span><text:span text:style-name="T16">s (ej: </text:span><text:span text:style-name="T16">Docentia)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8">
        <draw:frame draw:name="Título 2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 text:style-name="P25"><text:span text:style-name="T21">Asignaturas</text:span><text:span text:style-name="T14"> </text:span><text:span text:style-name="T14">con </text:span><text:span text:style-name="T14">materiales </text:span><text:span text:style-name="T14">relevantes en </text:span><text:span text:style-name="T14">Acceso </text:span><text:span text:style-name="T14">Abierto</text:span></text:p>
          </draw:text-box>
        </draw:frame>
        <draw:frame draw:style-name="gr23" draw:text-style-name="P22" draw:layer="layout" svg:width="24.384cm" svg:height="13.049cm" svg:x="0.254cm" svg:y="4.107cm">
          <draw:text-box>
            <text:list text:style-name="L1">
              <text:list-item>
                <text:p><text:span text:style-name="T22">Derecho a </text:span><text:span text:style-name="T22">mantener la </text:span><text:span text:style-name="T22">asignatura </text:span><text:span text:style-name="T22">durante tres </text:span><text:span text:style-name="T22">cursos </text:span><text:span text:style-name="T22">(actualizando </text:span><text:span text:style-name="T22">materiales)</text:span></text:p>
              </text:list-item>
              <text:list-item>
                <text:p><text:span text:style-name="T22">Posibilidad de </text:span><text:span text:style-name="T22">pasar al </text:span><text:span text:style-name="T22">Catálogo de </text:span><text:span text:style-name="T22">Buenas </text:span><text:span text:style-name="T22">Prácticas en </text:span><text:span text:style-name="T22">Materiales </text:span><text:span text:style-name="T22">Docentes en </text:span><text:span text:style-name="T22">Acceso </text:span><text:span text:style-name="T22">Abierto</text:span></text:p>
              </text:list-item>
              <text:list-item>
                <text:p><text:span text:style-name="T22">Derecho a </text:span><text:span text:style-name="T22">publicar </text:span><text:span text:style-name="T22">monografía</text:span></text:p>
              </text:list-item>
              <text:list-item>
                <text:p><text:span text:style-name="T22">Derecho a </text:span><text:span text:style-name="T22">ponencia en </text:span><text:span text:style-name="T22">Jornadas de </text:span><text:span text:style-name="T22">Cultura Libre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Título 24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Incentivo </text:span><text:span text:style-name="T14">económico</text:span></text:p>
          </draw:text-box>
        </draw:frame>
        <draw:frame draw:style-name="gr24" draw:text-style-name="P22" draw:layer="layout" svg:width="25.146cm" svg:height="13.384cm" svg:x="0.053cm" svg:y="4.141cm">
          <draw:text-box>
            <text:list text:style-name="L1">
              <text:list-item>
                <text:p><text:span text:style-name="T18">Calculado al </text:span><text:span text:style-name="T18">terminar los dos </text:span><text:span text:style-name="T18">cuatrimestres</text:span></text:p>
              </text:list-item>
              <text:list-item>
                <text:p><text:span text:style-name="T18">Sólo para autores </text:span><text:span text:style-name="T18">de materiales que </text:span><text:span text:style-name="T18">están en en la </text:span><text:span text:style-name="T18">asignatura según </text:span><text:span text:style-name="T18">POD oficial</text:span></text:p>
              </text:list-item>
              <text:list-item>
                <text:p><text:span text:style-name="T18">Puntos-crédito:</text:span></text:p>
              </text:list-item>
            </text:list>
            <text:p><text:span text:style-name="T18"><text:tab/></text:span><text:span text:style-name="T23">Créditos </text:span><text:span text:style-name="T23">asignatura agrupada </text:span><text:span text:style-name="T23">* baremación</text:span></text:p>
            <text:list text:continue-numbering="true" text:style-name="L1">
              <text:list-item>
                <text:p><text:span text:style-name="T24">Puntos-crédito por </text:span><text:span text:style-name="T24">autor:</text:span></text:p>
              </text:list-item>
            </text:list>
            <text:p><text:span text:style-name="T24"><text:tab/></text:span><text:span text:style-name="T25">Puntos-crédito * </text:span><text:span text:style-name="T25">Porcentaje autoría</text:span></text:p>
            <text:list text:continue-numbering="true" text:style-name="L1">
              <text:list-item>
                <text:p><text:span text:style-name="T18">Importe por </text:span><text:span text:style-name="T18">punto-crédito: </text:span></text:p>
              </text:list-item>
            </text:list>
            <text:p><text:span text:style-name="T23"><text:tab/></text:span><text:span text:style-name="T23">90.000 euros / </text:span><text:span text:style-name="T23">Suma puntos-crédito </text:span><text:span text:style-name="T23">todas asignaturas</text:span></text:p>
            <text:list text:continue-numbering="true" text:style-name="L1">
              <text:list-item>
                <text:p><text:span text:style-name="T18">Cuantía por autor:</text:span></text:p>
              </text:list-item>
            </text:list>
            <text:p><text:span text:style-name="T18"><text:tab/></text:span><text:span text:style-name="T25">Puntos-crédito </text:span><text:span text:style-name="T25">autor * Importe por </text:span><text:span text:style-name="T25">punt-crédito</text:span></text:p>
            <text:list text:continue-numbering="true" text:style-name="L1">
              <text:list-item>
                <text:p><text:span text:style-name="T18">Máximo: 1.00 </text:span><text:span text:style-name="T18">euros / autor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Título 29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Creación de </text:span><text:span text:style-name="T14">nueva </text:span><text:span text:style-name="T14">asignatura</text:span></text:p>
          </draw:text-box>
        </draw:frame>
        <draw:frame draw:style-name="gr15" draw:text-style-name="P22" draw:layer="layout" svg:width="25.146cm" svg:height="11.276cm" svg:x="0.508cm" svg:y="4.472cm">
          <draw:text-box>
            <text:list text:style-name="L1">
              <text:list-item>
                <text:p><text:span text:style-name="T16">Los </text:span><text:span text:style-name="T16">solicitantes </text:span><text:span text:style-name="T16">cuya </text:span><text:span text:style-name="T16">asignatura </text:span><text:span text:style-name="T16">se </text:span><text:span text:style-name="T16">reconozca </text:span><text:span text:style-name="T16">como de </text:span><text:span text:style-name="T16">acceso </text:span><text:span text:style-name="T16">abierto </text:span><text:span text:style-name="T16">tendrán que </text:span><text:span text:style-name="T16">crear una </text:span><text:span text:style-name="T16">nueva </text:span><text:span text:style-name="T16">asignatura </text:span><text:span text:style-name="T16">con los </text:span><text:span text:style-name="T16">contenidos </text:span><text:span text:style-name="T16">en abierto</text:span></text:p>
              </text:list-item>
              <text:list-item>
                <text:p><text:span text:style-name="T16">Una </text:span><text:span text:style-name="T16">asignatura </text:span><text:span text:style-name="T16">en abierto </text:span><text:span text:style-name="T16">por cada </text:span><text:span text:style-name="T16">asignatura </text:span><text:span text:style-name="T16">agrupada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_5f_" presentation:presentation-page-layout-name="AL1T18">
        <draw:frame draw:name="Título 13_ 2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0.828cm" svg:height="5.925cm" svg:x="2.032cm" svg:y="4.318cm">
          <draw:text-box>
            <text:p text:style-name="P18"><text:span text:style-name="T13">Recur</text:span><text:span text:style-name="T13">sos de </text:span><text:span text:style-name="T13">apoyo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8">
        <draw:frame draw:name="Título 26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Materiales de </text:span><text:span text:style-name="T14">apoyo</text:span></text:p>
          </draw:text-box>
        </draw:frame>
        <draw:frame draw:style-name="gr25" draw:text-style-name="P22" draw:layer="layout" svg:width="25.596cm" svg:height="12.255cm" svg:x="0.053cm" svg:y="4.141cm">
          <draw:text-box>
            <text:p><text:span text:style-name="T22">Página de la </text:span><text:span text:style-name="T22">convocatoria:</text:span></text:p>
            <text:p><text:span text:style-name="T22"/></text:p>
            <text:list text:style-name="L1">
              <text:list-item>
                <text:list>
                  <text:list-item>
                    <text:p><text:span text:style-name="T22">Infografía</text:span></text:p>
                  </text:list-item>
                  <text:list-item>
                    <text:p><text:span text:style-name="T22">Presentacio</text:span><text:span text:style-name="T22">nes</text:span></text:p>
                  </text:list-item>
                  <text:list-item>
                    <text:p><text:span text:style-name="T22">Enlaces </text:span><text:span text:style-name="T22">(incluyendo </text:span><text:span text:style-name="T22">solicitud)</text:span></text:p>
                  </text:list-item>
                  <text:list-item>
                    <text:p><text:span text:style-name="T22">Preguntas </text:span><text:span text:style-name="T22">frecuentes</text:span></text:p>
                  </text:list-item>
                </text:list>
              </text:list-item>
            </text:list>
            <text:p><text:span text:style-name="T22"/></text:p>
            <text:p><text:span text:style-name="T26"><text:a xlink:href="https://ofilibre.urjc.es/guias/convocatoria-asignaturas-abierto/" xlink:type="simple">https://ofilibre.urjc.es/guias/convocatoria-asignaturas-abierto/</text:a></text:span></text:p>
            <text:p><text:span text:style-name="T26"/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8">
        <draw:frame draw:name="Título 2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Sesiones de </text:span><text:span text:style-name="T14">apoyo</text:span></text:p>
          </draw:text-box>
        </draw:frame>
        <draw:frame draw:style-name="gr26" draw:text-style-name="P22" draw:layer="layout" svg:width="25.146cm" svg:height="10.205cm" svg:x="0.053cm" svg:y="4.141cm">
          <draw:text-box>
            <text:p><text:span text:style-name="T22">Presentación </text:span><text:span text:style-name="T22">de la </text:span><text:span text:style-name="T22">convocatoria</text:span></text:p>
            <text:p><text:span text:style-name="T22"><text:tab/></text:span><text:span text:style-name="T22">(videoconferen</text:span><text:span text:style-name="T22">cia)</text:span></text:p>
            <text:p><text:span text:style-name="T22"><text:tab/></text:span><text:span text:style-name="T22">3 de mayo </text:span><text:span text:style-name="T22">de 2025</text:span></text:p>
            <text:list text:style-name="L1">
              <text:list-header>
                <text:p><text:span text:style-name="T22"/></text:p>
              </text:list-header>
            </text:list>
            <text:p><text:span text:style-name="T22">Sesiones de </text:span><text:span text:style-name="T22">apoyo</text:span></text:p>
            <text:p><text:span text:style-name="T22"><text:tab/></text:span><text:span text:style-name="T22">(si son </text:span><text:span text:style-name="T22">necesarias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8">
        <draw:frame draw:name="Título 2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2.894cm" svg:height="3.095cm" svg:x="0.474cm" svg:y="0.262cm">
          <draw:text-box>
            <text:p><text:span text:style-name="T14">Contacto</text:span></text:p>
          </draw:text-box>
        </draw:frame>
        <draw:frame draw:style-name="gr21" draw:text-style-name="P22" draw:layer="layout" svg:width="25.146cm" svg:height="9.906cm" svg:x="0.053cm" svg:y="4.141cm">
          <draw:text-box>
            <text:list text:style-name="L1">
              <text:list-header>
                <text:p><text:span text:style-name="T22">Apoyo </text:span><text:span text:style-name="T22">continuo en:</text:span></text:p>
              </text:list-header>
            </text:list>
            <text:p><text:span text:style-name="T22"/></text:p>
            <text:p><text:span text:style-name="T22"/></text:p>
            <text:p text:style-name="P18"><text:span text:style-name="T22">ofilibre@urjc.e</text:span><text:span text:style-name="T22">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Título 13_1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7" draw:text-style-name="P26" draw:layer="layout" svg:width="22.422cm" svg:height="1.609cm" svg:x="0.692cm" svg:y="4.233cm">
          <draw:text-box>
            <text:p><text:span text:style-name="T27"><text:s/></text:span></text:p>
          </draw:text-box>
        </draw:frame>
        <draw:frame draw:style-name="gr28" draw:text-style-name="P28" draw:layer="layout" svg:width="23.876cm" svg:height="10.745cm" svg:x="0.557cm" svg:y="5.003cm">
          <draw:text-box>
            <text:p text:style-name="P27"><text:span text:style-name="T28">¿Te interesan </text:span><text:span text:style-name="T28">la </text:span><text:span text:style-name="T28">convocatoria?</text:span></text:p>
            <text:p text:style-name="P27"><text:span text:style-name="T28"/></text:p>
            <text:p text:style-name="P27"><text:span text:style-name="T29">¡¡¡Ponte en </text:span><text:span text:style-name="T29">marcha!!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Marcador de contenido 6" presentation:style-name="pr5" draw:text-style-name="P30" draw:layer="layout" svg:width="23.114cm" svg:height="8.576cm" svg:x="0.254cm" svg:y="6.858cm" presentation:class="outline" presentation:user-transformed="true">
          <draw:text-box>
            <text:p text:style-name="P29"><text:span text:style-name="T30">©2019-2025 OfiLibre URJC</text:span></text:p>
            <text:p text:style-name="P29"><text:span text:style-name="T30">Algunos derechos reservados.</text:span></text:p>
            <text:p text:style-name="P29"><text:span text:style-name="T30">Este documento se distribuye bajo la licencia “Atribución-CompartirIgual 4.0 Internacional” de Creative Commons, </text:span><text:span text:style-name="T30">disponible en</text:span></text:p>
            <text:p><text:span text:style-name="T31"><text:a xlink:href="https://creativecommons.org/licenses/by-sa/4.0/deed.es" xlink:type="simple">https://creativecommons.org/licenses/by-sa/4.0/deed.es</text:a></text:span></text:p>
            <text:p text:style-name="P29"><text:span text:style-name="T30"/></text:p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ook" xlink:href="Pictures/100000000000078000000387F062883B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 style:writing-mode="lr-tb" loext:decorative="false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 style:writing-mode="lr-tb" loext:decorative="false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Mgr8" style:family="graphic" style:parent-style-name="standard">
      <style:graphic-properties draw:stroke="none" draw:fill="none" draw:fill-color="#ffffff" fo:min-height="10.798cm" loext:decorative="fals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524cm" fo:padding-top="0.127cm" fo:padding-bottom="0.127cm" fo:padding-left="0.254cm" fo:padding-right="0.254cm" fo:wrap-option="wrap" loext:decorative="false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</style:style>
    <style:style style:name="Mgr12" style:family="graphic" style:parent-style-name="standard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2.037cm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4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1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22" style:family="presentation" style:parent-style-name="Default_20_1_5f_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23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4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font-independent-line-spacing="true"/>
    </style:style>
    <style:style style:name="MP17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8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9" style:family="paragraph">
      <style:paragraph-properties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none" draw:fill-color="#ffffff"/>
    </style:style>
    <style:style style:name="MP25" style:family="paragraph">
      <loext:graphic-properties draw:fill="none"/>
      <style:paragraph-properties fo:text-align="center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MP27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MP28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color="#ffffff" loext:opacity="100%" fo:font-size="14pt" style:font-size-asian="14pt" style:font-size-complex="14pt"/>
    </style:style>
    <style:style style:name="MT32" style:family="text">
      <style:text-properties fo:font-size="60pt" style:font-size-asian="60pt" style:font-size-complex="60pt"/>
    </style:style>
    <style:style style:name="MT33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</text:span><text:span text:style-name="MT22">o</text:span><text:span text:style-name="MT22">u</text:span><text:span text:style-name="MT22">r</text:span><text:span text:style-name="MT22">t</text:span><text:span text:style-name="MT22">h</text:span><text:span text:style-name="MT22"> </text:span><text:span text:style-name="MT22">l</text:span><text:span text:style-name="MT22">e</text:span><text:span text:style-name="MT22">v</text:span><text:span text:style-name="MT22">e</text:span><text:span text:style-name="MT22">l</text:span></text:p>
                          <text:list>
                            <text:list-item>
                              <text:p text:style-name="MP9"><text:span text:style-name="MT22">F</text:span><text:span text:style-name="MT22">i</text:span><text:span text:style-name="MT22">f</text:span><text:span text:style-name="MT22">t</text:span><text:span text:style-name="MT22">h</text:span><text:span text:style-name="MT22"> </text:span><text:span text:style-name="MT22">l</text:span><text:span text:style-name="MT22">e</text:span><text:span text:style-name="MT22">v</text:span><text:span text:style-name="MT22">e</text:span><text:span text:style-name="MT22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4" draw:layer="backgroundobjects" svg:width="5.715cm" svg:height="16.254cm" svg:x="18.415cm" svg:y="0.763cm" presentation:class="title">
        <draw:text-box>
          <text:p text:style-name="MP3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Vertical Text Placeholder 2" presentation:style-name="Mpr91" draw:text-style-name="MP4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</text:span><text:span text:style-name="MT22">o</text:span><text:span text:style-name="MT22">u</text:span><text:span text:style-name="MT22">r</text:span><text:span text:style-name="MT22">t</text:span><text:span text:style-name="MT22">h</text:span><text:span text:style-name="MT22"> </text:span><text:span text:style-name="MT22">l</text:span><text:span text:style-name="MT22">e</text:span><text:span text:style-name="MT22">v</text:span><text:span text:style-name="MT22">e</text:span><text:span text:style-name="MT22">l</text:span></text:p>
                          <text:list>
                            <text:list-item>
                              <text:p text:style-name="MP9"><text:span text:style-name="MT22">F</text:span><text:span text:style-name="MT22">i</text:span><text:span text:style-name="MT22">f</text:span><text:span text:style-name="MT22">t</text:span><text:span text:style-name="MT22">h</text:span><text:span text:style-name="MT22"> </text:span><text:span text:style-name="MT22">l</text:span><text:span text:style-name="MT22">e</text:span><text:span text:style-name="MT22">v</text:span><text:span text:style-name="MT22">e</text:span><text:span text:style-name="MT22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5-05-30">5/30/25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5" draw:text-style-name="MP17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8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5-05-30">5/30/25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12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13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13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3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4" draw:layer="backgroundobjects" svg:width="22.859cm" svg:height="11.048cm" svg:x="1.27cm" svg:y="4.457cm">
        <draw:text-box>
          <text:p/>
        </draw:text-box>
      </draw:frame>
      <draw:frame draw:style-name="Mgr9" draw:text-style-name="MP25" draw:layer="backgroundobjects" svg:width="8.697cm" svg:height="2.124cm" svg:x="0.29cm" svg:y="16.839cm">
        <draw:image xlink:href="Pictures/1000000100000333000000C8C39BB24A.png" xlink:type="simple" xlink:show="embed" xlink:actuate="onLoad" draw:mime-type="image/png">
          <text:p/>
        </draw:image>
      </draw:frame>
      <draw:frame draw:name="CuadroTexto 8_19" draw:style-name="Mgr10" draw:text-style-name="MP26" draw:layer="backgroundobjects" svg:width="12.109cm" svg:height="1.778cm" svg:x="13.208cm" svg:y="17.018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</draw:text-box>
      </draw:frame>
      <draw:frame draw:name="Subtítulo 2_13" draw:style-name="Mgr11" draw:text-style-name="MP27" draw:layer="backgroundobjects" svg:width="14.16cm" svg:height="1.12cm" svg:x="0cm" svg:y="3.171cm">
        <draw:text-box>
          <text:p/>
        </draw:text-box>
      </draw:frame>
      <draw:frame draw:style-name="Mgr12" draw:text-style-name="MP22" draw:layer="backgroundobjects" svg:width="3.205cm" svg:height="2.032cm" svg:x="8.987cm" svg:y="16.875cm">
        <draw:text-box>
          <text:p text:style-name="MP28"><text:span text:style-name="MT31">2025-06-03</text:span></text:p>
          <text:p text:style-name="MP28"><text:span text:style-name="MT31"/></text:p>
          <text:p text:style-name="MP28"><text:span text:style-name="MT31"><text:page-number>&lt;number&gt;</text:page-number></text:span><text:span text:style-name="MT31">/</text:span><text:span text:style-name="MT31"><text:page-count>29</text:page-count></text:span></text:p>
        </draw:text-box>
      </draw:frame>
      <draw:custom-shape draw:name="Rectangle 6" draw:style-name="Mgr5" draw:text-style-name="MP17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15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16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16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layer="backgroundobjects" svg:width="22.859cm" svg:height="3.18cm" svg:x="1.27cm" svg:y="6.604cm" presentation:class="title">
        <draw:text-box>
          <text:p><text:span text:style-name="MT32">Click to edit the 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3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5" draw:layer="backgroundobjects" svg:width="8.697cm" svg:height="2.124cm" svg:x="0.291cm" svg:y="16.839cm">
        <draw:image xlink:href="Pictures/1000000100000333000000C8C39BB24A.png" xlink:type="simple" xlink:show="embed" xlink:actuate="onLoad" draw:mime-type="image/png">
          <text:p/>
        </draw:image>
      </draw:frame>
      <draw:frame presentation:style-name="Mpr118" draw:text-style-name="MP22" draw:layer="backgroundobjects" svg:width="2.766cm" svg:height="2.032cm" svg:x="9.144cm" svg:y="16.857cm">
        <draw:text-box>
          <text:p text:style-name="MP28"><text:span text:style-name="MT31">2023-06-26</text:span></text:p>
          <text:p text:style-name="MP28"><text:span text:style-name="MT31"/></text:p>
          <text:p text:style-name="MP28"><text:span text:style-name="MT31"><text:page-number>&lt;number&gt;</text:page-number></text:span><text:span text:style-name="MT31">/</text:span><text:span text:style-name="MT31"><text:page-count>29</text:page-count></text:span></text:p>
        </draw:text-box>
      </draw:frame>
      <draw:frame draw:name="CuadroTexto 8_19" draw:style-name="Mgr13" draw:text-style-name="MP26" draw:layer="backgroundobjects" svg:width="13.742cm" svg:height="2.291cm" svg:x="11.908cm" svg:y="17.074cm">
        <draw:text-box>
          <text:p text:style-name="MP3"><text:span text:style-name="MT33">Oficina de Conocimiento y 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draw:custom-shape draw:name="Rectangle 6" draw:style-name="Mgr5" draw:text-style-name="MP17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19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20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20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21" draw:layer="backgroundobjects" svg:width="22.859cm" svg:height="3.18cm" svg:x="1.27cm" svg:y="6.604cm" presentation:class="title">
        <draw:text-box>
          <text:p><text:span text:style-name="MT32">Click to edit the title text format</text:span></text:p>
        </draw:text-box>
      </draw:frame>
      <draw:frame presentation:style-name="Default_20_1_5f_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3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5" draw:layer="backgroundobjects" svg:width="8.697cm" svg:height="2.124cm" svg:x="0.291cm" svg:y="16.839cm">
        <draw:image xlink:href="Pictures/1000000100000333000000C8C39BB24A.png" xlink:type="simple" xlink:show="embed" xlink:actuate="onLoad" draw:mime-type="image/png">
          <text:p/>
        </draw:image>
      </draw:frame>
      <draw:frame presentation:style-name="Mpr122" draw:text-style-name="MP22" draw:layer="backgroundobjects" svg:width="2.766cm" svg:height="2.032cm" svg:x="9.144cm" svg:y="16.857cm">
        <draw:text-box>
          <text:p text:style-name="MP28"><text:span text:style-name="MT31">2022-06-21</text:span></text:p>
          <text:p text:style-name="MP28"><text:span text:style-name="MT31"/></text:p>
          <text:p text:style-name="MP28"><text:span text:style-name="MT31"><text:page-number>&lt;number&gt;</text:page-number></text:span><text:span text:style-name="MT31">/</text:span><text:span text:style-name="MT31"><text:page-count>29</text:page-count></text:span></text:p>
        </draw:text-box>
      </draw:frame>
      <draw:frame draw:name="CuadroTexto 8_19" draw:style-name="Mgr13" draw:text-style-name="MP26" draw:layer="backgroundobjects" svg:width="13.742cm" svg:height="2.291cm" svg:x="11.908cm" svg:y="17.074cm">
        <draw:text-box>
          <text:p text:style-name="MP3"><text:span text:style-name="MT33">Oficina de Conocimiento y 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draw:custom-shape draw:name="Rectangle 6" draw:style-name="Mgr5" draw:text-style-name="MP17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_5f_-title" draw:layer="backgroundobjects" svg:width="13.968cm" svg:height="10.476cm" svg:x="3.81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123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23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24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24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title>Obras Libres: uso y disfrute</dc:title>
    <meta:initial-creator>Manuel Gertrudix Barrio</meta:initial-creator>
    <meta:creation-date>2019-01-21T12:01:12Z</meta:creation-date>
    <dc:date>2025-05-30T21:27:53.928248595</dc:date>
    <meta:editing-cycles>60</meta:editing-cycles>
    <meta:editing-duration>PT16H37M19S</meta:editing-duration>
    <dc:creator>Jesus Gonzalez-Barahona</dc:creator>
    <meta:print-date>2025-05-30T21:26:19.034811381</meta:print-date>
    <meta:printed-by>PDF files: Jesus Gonzalez-Barahona</meta:printed-by>
    <meta:document-statistic meta:object-count="397"/>
    <meta:template xlink:type="simple" xlink:actuate="onRequest" xlink:title="" xlink:href="../Downloads/presentaciones/Ofilibre-presentacion.odp/Esencial"/>
  </office:meta>
</office:document-meta>
</file>