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D000002C20DC92EEC.png" manifest:media-type="image/png"/>
  <manifest:file-entry manifest:full-path="Pictures/100000010000058C0000033280FCF69E.png" manifest:media-type="image/png"/>
  <manifest:file-entry manifest:full-path="Pictures/1000000100000ED80000082F46A801EB.png" manifest:media-type="image/png"/>
  <manifest:file-entry manifest:full-path="Pictures/100000010000014000000071C893EDEA.png" manifest:media-type="image/png"/>
  <manifest:file-entry manifest:full-path="Pictures/1000000100000224000000D00984F657.png" manifest:media-type="image/png"/>
  <manifest:file-entry manifest:full-path="Pictures/10006070000038A6000015883DB32451.emf" manifest:media-type="image/x-emf"/>
  <manifest:file-entry manifest:full-path="Pictures/10000001000004E00000036662BEFE44.png" manifest:media-type="image/png"/>
  <manifest:file-entry manifest:full-path="Pictures/1000000100000333000000C8C39BB24A.png" manifest:media-type="image/png"/>
  <manifest:file-entry manifest:full-path="Pictures/100000010000058800000378A6A1C932.png" manifest:media-type="image/png"/>
  <manifest:file-entry manifest:full-path="Pictures/100000000000078000000387F06288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 style:font-family-generic="roman" style:font-pitch="variable"/>
    <style:font-face style:name="Arial Black1" svg:font-family="'Arial Black'"/>
    <style:font-face style:name="Arial1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9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1.95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7.801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gr15" style:family="graphic" style:parent-style-name="standard">
      <style:graphic-properties draw:stroke="none" draw:fill="none" fo:min-height="9.097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9.8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9.198cm" loext:decorative="false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1.076cm" loext:decorative="false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 loext:decorative="false"/>
      <style:paragraph-properties style:writing-mode="lr-tb"/>
    </style:style>
    <style:style style:name="gr27" style:family="graphic" style:parent-style-name="standard" style:list-style-name="L3">
      <style:graphic-properties svg:stroke-color="#ffffff" draw:fill-color="#ffffff" fo:min-height="1.528cm" loext:decorative="false"/>
      <style:paragraph-properties style:writing-mode="lr-tb"/>
    </style:style>
    <style:style style:name="gr28" style:family="graphic" style:parent-style-name="standard" style:list-style-name="L3">
      <style:graphic-properties svg:stroke-color="#ffffff" draw:fill-color="#ffffff" fo:min-height="12.782cm" loext:decorative="false"/>
      <style:paragraph-properties style:writing-mode="lr-tb"/>
    </style:style>
    <style:style style:name="gr29" style:family="graphic" style:parent-style-name="standard" style:list-style-name="L3">
      <style:graphic-properties svg:stroke-color="#ffffff" draw:fill-color="#ffffff" fo:min-height="12.782cm" loext:decorative="false"/>
      <style:paragraph-properties style:writing-mode="lr-tb"/>
    </style:style>
    <style:style style:name="gr30" style:family="graphic" style:parent-style-name="standard" style:list-style-name="L3">
      <style:graphic-properties svg:stroke-color="#ffffff" draw:fill-color="#ffffff" fo:min-height="12.78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359cm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265cm" loext:decorative="false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title">
      <style:graphic-properties fo:min-height="2.656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Default-title">
      <style:graphic-properties fo:min-height="3.473cm" loext:decorative="false"/>
      <style:paragraph-properties style:writing-mode="lr-tb"/>
    </style:style>
    <style:style style:name="pr10" style:family="presentation" style:parent-style-name="Default-outline1">
      <style:graphic-properties fo:min-height="5.256cm" loext:decorative="false"/>
      <style:paragraph-properties style:writing-mode="lr-tb"/>
    </style:style>
    <style:style style:name="pr11" style:family="presentation" style:parent-style-name="Default-outline1">
      <style:graphic-properties draw:fill="solid" draw:fill-color="#ffffff" fo:min-height="5.256cm" loext:decorative="false"/>
      <style:paragraph-properties style:writing-mode="lr-tb"/>
    </style:style>
    <style:style style:name="pr12" style:family="presentation" style:parent-style-name="Default-title" style:list-style-name="L1">
      <style:graphic-properties fo:min-height="2.656cm" loext:decorative="false"/>
      <style:paragraph-properties style:writing-mode="lr-tb"/>
    </style:style>
    <style:style style:name="pr13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4" style:family="presentation" style:parent-style-name="Default-title" style:list-style-name="L1">
      <style:graphic-properties fo:min-height="2.656cm" loext:decorative="false"/>
      <style:paragraph-properties style:writing-mode="lr-tb"/>
    </style:style>
    <style:style style:name="pr15" style:family="presentation" style:parent-style-name="Default-title" style:list-style-name="L1">
      <style:graphic-properties fo:min-height="2.656cm" loext:decorative="false"/>
      <style:paragraph-properties style:writing-mode="lr-tb"/>
    </style:style>
    <style:style style:name="pr16" style:family="presentation" style:parent-style-name="Default-title" style:list-style-name="L1">
      <style:graphic-properties fo:min-height="2.656cm" loext:decorative="false"/>
      <style:paragraph-properties style:writing-mode="lr-tb"/>
    </style:style>
    <style:style style:name="pr17" style:family="presentation" style:parent-style-name="Default-title" style:list-style-name="L1">
      <style:graphic-properties fo:min-height="2.656cm" loext:decorative="false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text-properties fo:font-size="18pt"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/>
      <style:text-properties style:font-name="Liberation Sans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2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P23" style:family="paragraph">
      <style:paragraph-properties fo:margin-top="0.5cm" fo:margin-bottom="0cm"/>
    </style:style>
    <style:style style:name="P24" style:family="paragraph">
      <loext:graphic-properties draw:fill="none"/>
      <style:paragraph-properties fo:margin-top="0.5cm" fo:margin-bottom="0cm"/>
      <style:text-properties fo:font-size="32pt" fo:language="es" fo:country="ES" style:font-size-asian="32pt" style:font-size-complex="32pt"/>
    </style:style>
    <style:style style:name="P25" style:family="paragraph">
      <style:text-properties fo:language="es" fo:country="ES"/>
    </style:style>
    <style:style style:name="P26" style:family="paragraph">
      <loext:graphic-properties draw:fill="none"/>
      <style:paragraph-properties fo:text-align="center"/>
      <style:text-properties fo:language="es" fo:country="ES"/>
    </style:style>
    <style:style style:name="P27" style:family="paragraph">
      <loext:graphic-properties draw:fill="none" draw:fill-color="#ffffff"/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/>
      <style:text-properties style:font-name="Liberation Sans" fo:font-size="32pt" fo:language="es" fo:country="ES" style:font-size-asian="32pt" style:font-size-complex="32pt"/>
    </style:style>
    <style:style style:name="P29" style:family="paragraph">
      <loext:graphic-properties draw:fill="solid" draw:fill-color="#ffffff"/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ffff"/>
      <style:text-properties style:font-name="Liberation Sans" fo:font-size="36pt" fo:language="es" fo:country="ES" style:font-size-asian="36pt" style:font-size-complex="36pt"/>
    </style:style>
    <style:style style:name="P31" style:family="paragraph">
      <loext:graphic-properties draw:fill="none" draw:fill-color="#ffffff"/>
      <style:text-properties fo:color="#c9211e" loext:opacity="100%" fo:font-size="36pt" fo:language="es" fo:country="ES" fo:font-weight="bold"/>
    </style:style>
    <style:style style:name="P32" style:family="paragraph">
      <style:paragraph-properties fo:margin-left="0cm" fo:margin-right="0cm" fo:margin-top="0.5cm" fo:margin-bottom="0cm" fo:line-height="100%" fo:text-indent="0cm"/>
    </style:style>
    <style:style style:name="P33" style:family="paragraph">
      <style:paragraph-properties fo:margin-left="0cm" fo:margin-right="0cm" fo:margin-top="0.5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" fo:font-size="26pt" fo:language="es" fo:country="ES"/>
    </style:style>
    <style:style style:name="P35" style:family="paragraph">
      <style:paragraph-properties fo:margin-left="0cm" fo:margin-right="0cm" fo:margin-top="0.5cm" fo:margin-bottom="0cm" fo:line-height="100%" fo:text-align="end" fo:text-indent="0cm"/>
    </style:style>
    <style:style style:name="P36" style:family="paragraph">
      <style:paragraph-properties fo:margin-left="0cm" fo:margin-right="0cm" fo:margin-top="0.5cm" fo:margin-bottom="0cm" fo:line-height="100%" fo:text-align="start" fo:text-indent="0cm"/>
    </style:style>
    <style:style style:name="P37" style:family="paragraph">
      <style:paragraph-properties fo:margin-left="0cm" fo:margin-right="0cm" fo:margin-top="0.8cm" fo:margin-bottom="0cm" fo:line-height="100%" fo:text-align="end" fo:text-indent="0cm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fffff"/>
      <style:paragraph-properties fo:text-align="end"/>
      <style:text-properties fo:language="es" fo:country="ES"/>
    </style:style>
    <style:style style:name="P40" style:family="paragraph">
      <style:paragraph-properties fo:text-align="center"/>
      <style:text-properties fo:language="es" fo:country="ES"/>
    </style:style>
    <style:style style:name="P41" style:family="paragraph">
      <style:paragraph-properties fo:margin-left="0cm" fo:margin-right="0cm" fo:margin-top="0.499cm" fo:margin-bottom="0cm" fo:text-indent="0cm"/>
    </style:style>
    <style:style style:name="P42" style:family="paragraph">
      <loext:graphic-properties draw:fill="none"/>
      <style:text-properties fo:color="#000000" loext:opacity="100%" style:font-name="Liberation Sans" fo:font-size="32pt" fo:language="es" fo:country="ES" fo:font-weight="bold"/>
    </style:style>
    <style:style style:name="P4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" fo:font-size="36pt" fo:language="es" fo:country="ES" fo:font-weight="bold" style:font-size-asian="36pt" style:font-weight-asian="bold" style:font-size-complex="36pt" style:font-weight-complex="bold"/>
    </style:style>
    <style:style style:name="P44" style:family="paragraph">
      <loext:graphic-properties draw:fill="none"/>
      <style:paragraph-properties fo:text-align="end" style:font-independent-line-spacing="true"/>
      <style:text-properties fo:color="#000000" loext:opacity="100%" style:font-name="Liberation Sans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4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6pt" fo:language="es" fo:country="ES" style:font-size-asian="36pt" style:font-size-complex="36pt"/>
    </style:style>
    <style:style style:name="T11" style:family="text">
      <style:text-properties fo:font-size="18pt" fo:language="es" fo:country="ES"/>
    </style:style>
    <style:style style:name="T12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3" style:family="text">
      <style:text-properties style:font-name="Liberation Sans" fo:font-size="40pt" fo:language="es" fo:country="ES" fo:font-style="italic" style:font-size-asian="40pt" style:font-style-asian="italic" style:font-size-complex="40pt" style:font-style-complex="italic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es" fo:country="ES" style:font-size-asian="40pt" style:font-size-complex="40pt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8" style:family="text"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40pt" fo:language="es" fo:country="ES" fo:font-weight="normal" style:font-size-asian="40pt" style:font-weight-asian="normal" style:font-size-complex="40pt" style:font-weight-complex="normal"/>
    </style:style>
    <style:style style:name="T21" style:family="text"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T22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iberation Sans" fo:font-size="36pt" fo:language="es" fo:country="ES" style:font-size-asian="36pt" style:font-size-complex="36pt"/>
    </style:style>
    <style:style style:name="T24" style:family="text">
      <style:text-properties fo:color="#c9211e" loext:opacity="100%" fo:font-size="36pt" fo:language="es" fo:country="ES" fo:font-weight="bold"/>
    </style:style>
    <style:style style:name="T25" style:family="text">
      <style:text-properties fo:color="#000000" loext:opacity="100%" style:font-name="Liberation Sans" fo:font-size="28pt" fo:language="es" fo:country="ES" fo:font-style="italic" style:font-style-asian="italic" style:font-style-complex="italic"/>
    </style:style>
    <style:style style:name="T26" style:family="text">
      <style:text-properties fo:color="#000000" loext:opacity="100%" style:font-name="Liberation Sans" fo:font-size="44pt" fo:language="es" fo:country="ES" fo:font-style="italic" style:font-size-asian="26pt" style:font-style-asian="italic" style:font-size-complex="26pt" style:font-style-complex="italic"/>
    </style:style>
    <style:style style:name="T27" style:family="text">
      <style:text-properties fo:color="#000000" loext:opacity="100%" style:font-name="Liberation Sans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language="es" fo:country="ES"/>
    </style:style>
    <style:style style:name="T29" style:family="text">
      <style:text-properties fo:font-size="24pt" fo:language="es" fo:country="ES" style:font-size-asian="24pt" style:font-size-complex="24pt"/>
    </style:style>
    <style:style style:name="T30" style:family="text">
      <style:text-properties fo:font-size="44pt" fo:language="es" fo:country="ES" style:font-size-asian="44pt" style:font-size-complex="44pt"/>
    </style:style>
    <style:style style:name="T31" style:family="text">
      <style:text-properties fo:font-size="32pt" fo:language="es" fo:country="ES" style:font-size-asian="32pt" style:font-size-complex="32pt"/>
    </style:style>
    <style:style style:name="T32" style:family="text">
      <style:text-properties fo:font-size="60pt" fo:language="es" fo:country="ES" style:font-size-asian="60pt" style:font-size-complex="60pt"/>
    </style:style>
    <style:style style:name="T33" style:family="text">
      <style:text-properties style:font-name="Liberation Sans" fo:font-size="32pt" fo:language="es" fo:country="ES" fo:font-weight="normal" style:font-size-asian="26pt" style:font-weight-asian="normal" style:font-size-complex="26pt" style:font-weight-complex="normal"/>
    </style:style>
    <style:style style:name="T34" style:family="text">
      <style:text-properties style:font-name="Liberation Sans" fo:font-size="24pt" fo:language="es" fo:country="ES" style:font-size-asian="20pt" style:font-size-complex="20pt"/>
    </style:style>
    <style:style style:name="T35" style:family="text">
      <style:text-properties style:font-name="Liberation Sans" fo:font-size="28pt" fo:language="es" fo:country="ES" style:font-size-asian="24pt" style:font-size-complex="24pt"/>
    </style:style>
    <style:style style:name="T36" style:family="text">
      <style:text-properties style:font-name="Liberation Sans" fo:font-size="28pt" fo:language="es" fo:country="ES" style:font-size-asian="28pt" style:font-size-complex="28pt"/>
    </style:style>
    <style:style style:name="T37" style:family="text">
      <style:text-properties fo:color="#000000" loext:opacity="100%" style:font-name="Liberation Sans" fo:font-size="32pt" fo:language="es" fo:country="ES" fo:font-weight="bold" style:font-size-asian="40pt" style:font-weight-asian="normal" style:font-size-complex="40pt" style:font-weight-complex="normal"/>
    </style:style>
    <style:style style:name="T38" style:family="text">
      <style:text-properties fo:color="#000000" loext:opacity="100%" style:font-name="Liberation Sans" fo:font-size="60pt" fo:language="es" fo:country="ES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9" style:family="text">
      <style:text-properties fo:font-size="18pt" fo:language="es" fo:country="ES" style:font-size-asian="18pt" style:font-size-complex="18pt"/>
    </style:style>
    <style:style style:name="T40" style:family="text">
      <style:text-properties fo:color="#000000" loext:opacity="100%" style:font-name="Liberation Sans" fo:font-size="26pt" fo:language="es" fo:country="ES" style:font-size-asian="26pt" style:font-size-complex="26pt"/>
    </style:style>
    <style:style style:name="T41" style:family="text">
      <style:text-properties fo:color="#000000" loext:opacity="100%" style:font-name="Liberation Sans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813cm" svg:x="13.462cm" svg:y="13.208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2"><text:a xlink:href="https://ofilibre.urjc.es/" xlink:type="simple">https://ofilibre.urjc.es</text:a></text:span></text:p>
            <text:p text:style-name="P2"><text:span text:style-name="T2"><text:a xlink:href="mailto:ofilibre@urjc.es" xlink:type="simple">ofilibre@urjc.es</text:a></text:span></text:p>
            <text:p text:style-name="P2"><text:span text:style-name="T2">@OfiLibreURJC@floss.social</text:span></text:p>
            <text:p text:style-name="P2"><text:span text:style-name="T2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3">Jesús M. González Barahona</text:span></text:p>
            <text:p text:style-name="P4"><text:span text:style-name="T3"/></text:p>
            <text:p text:style-name="P4"><text:span text:style-name="T4">Fediverso: @jgbarah@floss.social </text:span></text:p>
          </draw:text-box>
        </draw:frame>
        <draw:frame draw:name="Título 1" draw:style-name="gr4" draw:text-style-name="P7" draw:layer="layout" svg:width="21.345cm" svg:height="5.772cm" svg:x="2.531cm" svg:y="3.048cm">
          <draw:text-box>
            <text:p text:style-name="P6"><text:span text:style-name="T5"><text:line-break/></text:span><text:span text:style-name="T6">Importancia del Software Libre para la Ciencia Abierta</text:span></text:p>
            <text:p text:style-name="P6"><text:span text:style-name="T6"/></text:p>
          </draw:text-box>
        </draw:frame>
        <draw:frame draw:name="Subtítulo 2" draw:style-name="gr5" draw:text-style-name="P9" draw:layer="layout" svg:width="19.605cm" svg:height="3.048cm" svg:x="2.747cm" svg:y="8.128cm">
          <draw:text-box>
            <text:p text:style-name="P8"><text:span text:style-name="T7">El software libre y la ciencia abierta</text:span></text:p>
            <text:p text:style-name="P8"><text:span text:style-name="T7">Curso sobre software libre. Programa Doctorado TIC.</text:span></text:p>
            <text:p text:style-name="P8"><text:span text:style-name="T7">29 de mayo de 2025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3DB32451.emf" xlink:type="simple" xlink:show="embed" xlink:actuate="onLoad" draw:mime-type="image/x-emf">
            <text:p/>
          </draw:image>
          <draw:image xlink:href="Pictures/1000000100000224000000D00984F657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558cm" svg:y="17.018cm">
          <draw:image xlink:href="Pictures/100000010000014000000071C893EDE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8"><text:s text:c="2"/></text:span><text:span text:style-name="T9"><text:s/></text:span></text:p>
          </draw:text-box>
        </draw:frame>
        <draw:frame draw:style-name="gr10" draw:text-style-name="P15" draw:layer="layout" svg:width="19.304cm" svg:height="6.65cm" svg:x="5.588cm" svg:y="9.398cm">
          <draw:text-box>
            <text:list text:style-name="L1">
              <text:list-item>
                <text:p><text:span text:style-name="T10">Ciencia abierta</text:span></text:p>
              </text:list-item>
              <text:list-item>
                <text:p><text:span text:style-name="T10">Software libre y ciencia abierta</text:span></text:p>
              </text:list-item>
              <text:list-item>
                <text:p><text:span text:style-name="T10">Ejemplos de políticas sobre ciencia abierta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2">Ciencia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8"><text:tab/></text:span><text:span text:style-name="T8"> <text:s/></text:span><text:span text:style-name="T9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3">Por primera vez</text:span></text:p>
            <text:p text:style-name="P19"><text:span text:style-name="T13">tenemos herramientas</text:span></text:p>
            <text:p text:style-name="P19"><text:span text:style-name="T13">que nos permiten</text:span></text:p>
            <text:p text:style-name="P19"><text:span text:style-name="T13">colaborar, difundir resultados,</text:span></text:p>
            <text:p text:style-name="P19"><text:span text:style-name="T13">elaborar sobre lo que hacen otros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13" draw:text-style-name="P20" draw:layer="layout" svg:width="24.028cm" svg:height="8.051cm" svg:x="0.508cm" svg:y="6.419cm">
          <draw:text-box>
            <text:p text:style-name="P19"><text:span text:style-name="T13">… </text:span><text:span text:style-name="T13">de forma rápida,</text:span></text:p>
            <text:p text:style-name="P19"><text:span text:style-name="T13">barata,</text:span></text:p>
            <text:p text:style-name="P19"><text:span text:style-name="T13">eficiente,</text:span></text:p>
            <text:p text:style-name="P19"><text:span text:style-name="T13">universa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8"><text:tab/></text:span><text:span text:style-name="T9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0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34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13" draw:text-style-name="P20" draw:layer="layout" svg:width="24.028cm" svg:height="8.051cm" svg:x="0.508cm" svg:y="6.419cm">
          <draw:text-box>
            <text:p text:style-name="P19"><text:span text:style-name="T13">… </text:span><text:span text:style-name="T13">pero las estamos usando</text:span></text:p>
            <text:p text:style-name="P19"><text:span text:style-name="T13">en un contexto heredado,</text:span></text:p>
            <text:p text:style-name="P19"><text:span text:style-name="T13">que no se adapta bien a ellas,</text:span></text:p>
            <text:p text:style-name="P19"><text:span text:style-name="T13">y no permite explotar su potencial.</text:span></text:p>
          </draw:text-box>
        </draw:frame>
        <draw:frame draw:name="Título 5_1" draw:style-name="gr9" draw:text-style-name="P14" draw:layer="layout" svg:width="22.437cm" svg:height="2.487cm" svg:x="0.001cm" svg:y="0.424cm">
          <draw:text-box>
            <text:p text:style-name="P2"><text:span text:style-name="T8"><text:tab/></text:span><text:span text:style-name="T9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8"><text:tab/></text:span><text:span text:style-name="T14">Nuevo enfoque</text:span><text:span text:style-name="T8"> <text:s/></text:span><text:span text:style-name="T9"><text:s/></text:span></text:p>
          </draw:text-box>
        </draw:frame>
        <draw:frame draw:name="Subtítulo 2" draw:style-name="gr14" draw:text-style-name="P22" draw:layer="layout" svg:width="14.16cm" svg:height="1.12cm" svg:x="0cm" svg:y="2.91cm">
          <draw:text-box>
            <text:p/>
          </draw:text-box>
        </draw:frame>
        <draw:frame draw:style-name="gr15" draw:text-style-name="P24" draw:layer="layout" svg:width="23.114cm" svg:height="9.347cm" svg:x="0.508cm" svg:y="5.373cm">
          <draw:text-box>
            <text:p text:style-name="P23"><text:span text:style-name="T15">Si podemos replantear la investigación y la ciencia con las herramientas actuales:</text:span></text:p>
            <text:list text:style-name="L1">
              <text:list-item>
                <text:p text:style-name="P23"><text:span text:style-name="T15">¿Es el esquema tradicional el mejor?</text:span></text:p>
              </text:list-item>
              <text:list-item>
                <text:p text:style-name="P23"><text:span text:style-name="T15">¿Qué nuevas opciones proporciona la tecnología?</text:span></text:p>
              </text:list-item>
              <text:list-item>
                <text:p text:style-name="P23"><text:span text:style-name="T15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28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_7" draw:style-name="gr9" draw:text-style-name="P14" draw:layer="layout" svg:width="24.638cm" svg:height="2.487cm" svg:x="0cm" svg:y="0.423cm">
          <draw:text-box>
            <text:p text:style-name="P2"><text:span text:style-name="T8"><text:tab/></text:span><text:span text:style-name="T14">Ciencia abierta / investigación abierta</text:span><text:span text:style-name="T8"> <text:s/></text:span><text:span text:style-name="T9"><text:s/></text:span></text:p>
          </draw:text-box>
        </draw:frame>
        <draw:frame draw:name="Subtítulo 2_0" draw:style-name="gr14" draw:text-style-name="P22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3.114cm" svg:height="10.113cm" svg:x="0.508cm" svg:y="5.373cm">
          <draw:text-box>
            <text:p text:style-name="P23"><text:span text:style-name="T15">Hagamos la investigación más colaborativa, más accesible, más involucrada en la sociedad</text:span></text:p>
            <text:p text:style-name="P23"><text:span text:style-name="T15"/></text:p>
            <text:p text:style-name="P23"><text:span text:style-name="T15">Afecta a prácticamente todos los aspectos de la actividad investigadora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16">Ciencia Abierta: una taxonomía</text:span></text:p>
          </draw:text-box>
        </draw:frame>
        <draw:frame draw:style-name="gr7" draw:text-style-name="P26" draw:layer="layout" svg:width="25.225cm" svg:height="13.906cm" svg:x="0.254cm" svg:y="2.647cm">
          <draw:image xlink:href="Pictures/1000000100000ED80000082F46A801E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8">
        <draw:frame draw:name="Título 13_30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2">Publicación de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_3" draw:style-name="gr9" draw:text-style-name="P14" draw:layer="layout" svg:width="24.638cm" svg:height="2.487cm" svg:x="0cm" svg:y="0.423cm">
          <draw:text-box>
            <text:p text:style-name="P2"><text:span text:style-name="T8"><text:tab/></text:span><text:span text:style-name="T14">Objetivos</text:span><text:span text:style-name="T8"> <text:s/></text:span><text:span text:style-name="T9"><text:s/></text:span></text:p>
          </draw:text-box>
        </draw:frame>
        <draw:frame draw:name="Subtítulo 2_1" draw:style-name="gr14" draw:text-style-name="P22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3.114cm" svg:height="10.113cm" svg:x="0.508cm" svg:y="5.373cm">
          <draw:text-box>
            <text:p text:style-name="P23"><text:span text:style-name="T15">Hagamos la investigación y sus resultados accesibles a todos los niveles, para otros investigadores (profesionales o aficionados) y para la sociedad en general</text:span></text:p>
            <text:p text:style-name="P23"><text:span text:style-name="T15"/></text:p>
            <text:p text:style-name="P23"><text:span text:style-name="T15">Afecta a publicaciones, datos, materiales de difusión, software, materiales de trabajo, etc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8"><text:tab/></text:span><text:span text:style-name="T17">Berlin Declaration on Open Access</text:span><text:span text:style-name="T8"> <text:s/></text:span><text:span text:style-name="T9"><text:s/></text:span></text:p>
          </draw:text-box>
        </draw:frame>
        <draw:frame draw:style-name="gr17" draw:text-style-name="P27" draw:layer="layout" svg:width="17.526cm" svg:height="1.145cm" svg:x="6.858cm" svg:y="15.111cm">
          <draw:text-box>
            <text:p><text:span text:style-name="T18"><text:a xlink:href="https://openaccess.mpg.de/Berlin-Declaration" xlink:type="simple">https://openaccess.mpg.de/Berlin-Declaration</text:a></text:span></text:p>
          </draw:text-box>
        </draw:frame>
        <draw:frame draw:style-name="gr18" draw:text-style-name="P28" draw:layer="layout" svg:width="23.622cm" svg:height="9.448cm" svg:x="0.512cm" svg:y="4.525cm">
          <draw:text-box>
            <text:p text:style-name="P23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9"><text:span text:style-name="T19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8"><text:tab/></text:span><text:span text:style-name="T14">Condiciones</text:span></text:p>
          </draw:text-box>
        </draw:frame>
        <draw:frame draw:name="Subtítulo 2" draw:style-name="gr14" draw:text-style-name="P22" draw:layer="layout" svg:width="14.16cm" svg:height="1.12cm" svg:x="0cm" svg:y="2.91cm">
          <draw:text-box>
            <text:p/>
          </draw:text-box>
        </draw:frame>
        <draw:frame draw:style-name="gr19" draw:text-style-name="P29" draw:layer="layout" svg:width="23.821cm" svg:height="11.326cm" svg:x="0.421cm" svg:y="4.422cm">
          <draw:text-box>
            <text:list text:style-name="L3">
              <text:list-item>
                <text:p><text:span text:style-name="T20">Derecho de acceso (consulta)</text:span></text:p>
              </text:list-item>
              <text:list-item>
                <text:p><text:span text:style-name="T20">Derecho de copia</text:span></text:p>
              </text:list-item>
              <text:list-item>
                <text:p><text:span text:style-name="T20">Derecho de trabajos derivados</text:span></text:p>
              </text:list-item>
              <text:list-item>
                <text:p><text:span text:style-name="T20">Formatos electrónicos “adecuados”</text:span></text:p>
              </text:list-item>
              <text:list-item>
                <text:p><text:span text:style-name="T20">Depósito en un archivo abierto</text:span></text:p>
              </text:list-item>
            </text:list>
            <text:p><text:span text:style-name="T21"/></text:p>
            <text:p text:style-name="P17"><text:span text:style-name="T20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22">Materiales cubiertos </text:span></text:p>
          </draw:text-box>
        </draw:frame>
        <draw:frame draw:style-name="gr20" draw:text-style-name="P30" draw:layer="layout" svg:width="20.208cm" svg:height="10.205cm" svg:x="1.016cm" svg:y="5.08cm">
          <draw:text-box>
            <text:list text:style-name="L3">
              <text:list-item>
                <text:p><text:span text:style-name="T23">Resultados de investigación (artículos)</text:span></text:p>
              </text:list-item>
              <text:list-item>
                <text:p><text:span text:style-name="T23">Datos crudos y metadatos</text:span></text:p>
              </text:list-item>
              <text:list-item>
                <text:p><text:span text:style-name="T23">Materiales fuente (notas)</text:span></text:p>
              </text:list-item>
              <text:list-item>
                <text:p><text:span text:style-name="T23">Representaciones digitales (gráficos, multimedia)</text:span></text:p>
              </text:list-item>
              <text:list-item>
                <text:p><text:span text:style-name="T23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1" draw:text-style-name="P31" draw:layer="layout" svg:width="10.668cm" svg:height="3.095cm" svg:x="1.016cm" svg:y="1.121cm">
          <draw:text-box>
            <text:p><text:span text:style-name="T24">Archivo abierto</text:span></text:p>
          </draw:text-box>
        </draw:frame>
        <draw:frame draw:style-name="gr22" draw:text-style-name="P30" draw:layer="layout" svg:width="21.844cm" svg:height="11.627cm" svg:x="1.524cm" svg:y="4.747cm">
          <draw:text-box>
            <text:list text:style-name="L3">
              <text:list-item>
                <text:p><text:span text:style-name="T23">Estándares de acceso adecuados (ejemplo: Open Archive Definitions)</text:span></text:p>
              </text:list-item>
              <text:list-item>
                <text:p><text:span text:style-name="T23">Mantenido por una organización “fiable”</text:span></text:p>
              </text:list-item>
              <text:list-item>
                <text:p><text:span text:style-name="T23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31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2">Datos abiert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_5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1" draw:text-style-name="P31" draw:layer="layout" svg:width="21.336cm" svg:height="3.095cm" svg:x="0.508cm" svg:y="1.121cm">
          <draw:text-box>
            <text:p><text:span text:style-name="T24">La importancia de los datos</text:span></text:p>
          </draw:text-box>
        </draw:frame>
        <draw:frame draw:style-name="gr23" draw:text-style-name="P34" draw:layer="layout" svg:width="23.876cm" svg:height="11.359cm" svg:x="0.762cm" svg:y="4.318cm">
          <draw:text-box>
            <text:p text:style-name="P32"><text:span text:style-name="T25">Los datos son fundamentales en muchos campos de investigación:</text:span></text:p>
            <text:list text:style-name="L1">
              <text:list-item>
                <text:p text:style-name="P32"><text:span text:style-name="T25">Modelan los objetos investigados</text:span></text:p>
              </text:list-item>
              <text:list-item>
                <text:p text:style-name="P32"><text:span text:style-name="T25">Se utilizan para extraer resultados (que pueden ser datos también)</text:span></text:p>
              </text:list-item>
              <text:list-item>
                <text:p text:style-name="P32"><text:span text:style-name="T25">Necesarios para reproducir, interpretar, entender</text:span></text:p>
              </text:list-item>
            </text:list>
            <text:p text:style-name="P33"><text:span text:style-name="T26">“</text:span><text:span text:style-name="T26">El detalle está en en los datos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_35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1" draw:text-style-name="P31" draw:layer="layout" svg:width="21.336cm" svg:height="3.095cm" svg:x="0.508cm" svg:y="1.121cm">
          <draw:text-box>
            <text:p><text:span text:style-name="T24">Datos abiertos (open data)</text:span></text:p>
          </draw:text-box>
        </draw:frame>
        <draw:frame draw:style-name="gr24" draw:text-style-name="P34" draw:layer="layout" svg:width="23.876cm" svg:height="11.359cm" svg:x="0.762cm" svg:y="4.318cm">
          <draw:text-box>
            <text:p text:style-name="P32"><text:span text:style-name="T25">“</text:span><text:span text:style-name="T25">Datos que cualquiera puede usar, modificar y compartir para cualquier propósito”</text:span></text:p>
            <text:p text:style-name="P35"><text:span text:style-name="T27"><text:a xlink:href="http://opendefinition.org/" xlink:type="simple">http://opendefinition.org</text:a></text:span></text:p>
            <text:p text:style-name="P36"><text:span text:style-name="T25"/></text:p>
            <text:p text:style-name="P36"><text:span text:style-name="T25">“</text:span><text:span text:style-name="T25">Datos libremente disponibles para cualquiera, que se pueden utilizar y republicar, sin restricciones de patentes, derechos de autor, ni de otro tipo.”</text:span></text:p>
            <text:p text:style-name="P37"><text:span text:style-name="T27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8">
        <draw:frame draw:name="Título 13_2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1.336cm" svg:height="5.925cm" svg:x="1.858cm" svg:y="4.296cm">
          <draw:text-box>
            <text:p text:style-name="P17"><text:span text:style-name="T12">Reproducibilida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8">Solución a la crisis de reproducibilidad</text:span></text:p>
          </draw:text-box>
        </draw:frame>
        <draw:frame presentation:style-name="pr10" draw:text-style-name="P25" draw:layer="layout" svg:width="23.114cm" svg:height="11.799cm" svg:x="1.27cm" svg:y="4.457cm" presentation:class="outline" presentation:user-transformed="true">
          <draw:text-box>
            <text:list text:style-name="L3">
              <text:list-item>
                <text:p><text:span text:style-name="T28">¿Hay una crisis de reproducibilidad?</text:span></text:p>
              </text:list-item>
              <text:list-item>
                <text:p><text:span text:style-name="T28">Si los resultados no se pueden reproducir, no podemos estar </text:span><text:span text:style-name="T28">seguros de ellos</text:span></text:p>
              </text:list-item>
              <text:list-item>
                <text:p><text:span text:style-name="T28">Posible solución: proporcionar mecanismos de ayuda a la </text:span><text:span text:style-name="T28">reproducibilidad de forma integral, como parte de la propia </text:span><text:span text:style-name="T28">investigación</text:span></text:p>
              </text:list-item>
              <text:list-item>
                <text:p><text:span text:style-name="T28">Posible solución: reproducción como parte de la revisión por </text:span><text:span text:style-name="T28">par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8">Ayudas a la reproducibilidad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8">Cuadernos de campo / laboratorio abiertos</text:span></text:p>
              </text:list-item>
              <text:list-item>
                <text:p><text:span text:style-name="T28">Procesos de investigación abiertos (atención a grupos </text:span><text:span text:style-name="T28">reproductores)</text:span></text:p>
              </text:list-item>
              <text:list-item>
                <text:p><text:span text:style-name="T28">Reproducción como parte de la investigación</text:span></text:p>
              </text:list-item>
              <text:list-item>
                <text:p><text:span text:style-name="T28">Prácticas de prueba de autorreproducción</text:span></text:p>
              </text:list-item>
              <text:list-item>
                <text:p><text:span text:style-name="T28">Publicación de todo lo necesari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8">
        <draw:frame draw:name="Título 13_32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1.336cm" svg:height="5.925cm" svg:x="1.858cm" svg:y="4.296cm">
          <draw:text-box>
            <text:p text:style-name="P17"><text:span text:style-name="T12">Evaluación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8">Revisión abierta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8">Intercambios detallados y públicos entre autores y revisores</text:span></text:p>
              </text:list-item>
              <text:list-item>
                <text:p><text:span text:style-name="T28">Terceras partes podrían destacar problemas o errores</text:span></text:p>
              </text:list-item>
              <text:list-item>
                <text:p><text:span text:style-name="T28">Revisión como un proceso continuo, empieza antes del </text:span><text:span text:style-name="T28">envío para publicación, no termina ni después de la </text:span><text:span text:style-name="T28">publicación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presentation:style-name="pr9" draw:text-style-name="P25" draw:layer="layout" svg:width="21.082cm" svg:height="3.473cm" svg:x="2.032cm" svg:y="-0.154cm" presentation:class="title" presentation:user-transformed="true">
          <draw:text-box>
            <text:p><text:span text:style-name="T28">Nuevas métricas y evaluación cualitativa</text:span></text:p>
          </draw:text-box>
        </draw:frame>
        <draw:frame draw:style-name="gr7" draw:text-style-name="P26" draw:layer="layout" svg:width="18.621cm" svg:height="12.98cm" svg:x="-0.021cm" svg:y="3.531cm">
          <draw:image xlink:href="Pictures/10000001000004E00000036662BEFE44.png" xlink:type="simple" xlink:show="embed" xlink:actuate="onLoad" draw:mime-type="image/png">
            <text:p/>
          </draw:image>
        </draw:frame>
        <draw:frame presentation:style-name="pr11" draw:text-style-name="P39" draw:layer="layout" svg:width="24.13cm" svg:height="2.77cm" svg:x="0.414cm" svg:y="13.896cm" presentation:class="outline" presentation:user-transformed="true">
          <draw:text-box>
            <text:list text:style-name="L3">
              <text:list-header>
                <text:p text:style-name="P38"><text:span text:style-name="T29"><text:a xlink:href="https://sfdora.org/" xlink:type="simple">https://sfdora.org/</text:a></text:span></text:p>
                <text:p text:style-name="P38"><text:span text:style-name="T29"><text:a xlink:href="https://researchsupport.admin.ox.ac.uk/information/principles" xlink:type="simple">https://researchsupport.admin.ox.ac.uk/information/principles</text:a></text:span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8">
        <draw:frame draw:name="Título 13_6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2">Infraestructura y herramient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8">Tecnología para la ciencia abierta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30">Repositorios abiertos: publicación, </text:span><text:span text:style-name="T30">catalogación, preservación...</text:span></text:p>
              </text:list-item>
              <text:list-item>
                <text:p><text:span text:style-name="T30">Plataformas de colaboración (open </text:span><text:span text:style-name="T30">workflow)</text:span></text:p>
              </text:list-item>
              <text:list-item>
                <text:p><text:span text:style-name="T30">Servicios de apoyo a la ciencia abierta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8">Ejemplos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30">Zenodo (publicación, datos...)</text:span></text:p>
              </text:list-item>
              <text:list-item>
                <text:p><text:span text:style-name="T30">Binder (Jupyter Lab como servicio)</text:span></text:p>
              </text:list-item>
              <text:list-item>
                <text:p><text:span text:style-name="T30">ORCID (identificador de investigador)</text:span></text:p>
              </text:list-item>
            </text:list>
            <text:p text:style-name="P38"><text:span text:style-name="T31"><text:a xlink:href="https://zenodo.org/" xlink:type="simple">https://zenodo.org/</text:a></text:span></text:p>
            <text:p text:style-name="P38"><text:span text:style-name="T31"><text:a xlink:href="https://mybinder.org/" xlink:type="simple">https://mybinder.org</text:a></text:span></text:p>
            <text:p text:style-name="P38"><text:span text:style-name="T31"><text:a xlink:href="https://orcid.org/" xlink:type="simple">https://orcid.org</text:a></text:span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_33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2">Software libr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16">¿Dónde está el software libre?</text:span></text:p>
          </draw:text-box>
        </draw:frame>
        <draw:frame draw:style-name="gr7" draw:text-style-name="P26" draw:layer="layout" svg:width="25.225cm" svg:height="13.906cm" svg:x="0.254cm" svg:y="2.647cm">
          <draw:image xlink:href="Pictures/1000000100000ED80000082F46A801E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presentation:style-name="pr12" draw:text-style-name="P40" draw:layer="layout" svg:width="22.859cm" svg:height="2.656cm" svg:x="1.27cm" svg:y="0.254cm" presentation:class="title">
          <draw:text-box>
            <text:p text:style-name="P17"><text:span text:style-name="T16">¿Dónde está el software libre?</text:span></text:p>
          </draw:text-box>
        </draw:frame>
        <draw:frame presentation:style-name="pr10" draw:text-style-name="P25" draw:layer="layout" svg:width="23.114cm" svg:height="11.291cm" svg:x="1.27cm" svg:y="4.457cm" presentation:class="outline" presentation:user-transformed="true">
          <draw:text-box>
            <text:p><text:span text:style-name="T32">Ciencia Abierta</text:span></text:p>
            <text:p><text:span text:style-name="T32"><text:s text:c="6"/></text:span><text:span text:style-name="T32">Reproducibilidad</text:span></text:p>
            <text:p><text:span text:style-name="T32"><text:s text:c="12"/></text:span><text:span text:style-name="T32">Software libr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8">
        <draw:frame draw:name="Título 13_1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25" draw:text-style-name="P18" draw:layer="layout" svg:width="23.622cm" svg:height="11.599cm" svg:x="0.762cm" svg:y="4.318cm">
          <draw:text-box>
            <text:p text:style-name="P17"><text:span text:style-name="T12">Software libre</text:span></text:p>
            <text:p text:style-name="P17"><text:span text:style-name="T12">como modelo para la ciencia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presentation:style-name="pr13" draw:text-style-name="P40" draw:layer="layout" svg:width="22.859cm" svg:height="3.151cm" svg:x="1.27cm" svg:y="0.007cm" presentation:class="title" presentation:user-transformed="true">
          <draw:text-box>
            <text:p text:style-name="P17"><text:span text:style-name="T16">En realidad es un modelo</text:span><text:span text:style-name="T16"><text:line-break/></text:span><text:span text:style-name="T16">(¿el mejor modelo?)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list text:style-name="L3">
              <text:list-item>
                <text:p><text:span text:style-name="T30">Modelo de publicación abierta</text:span></text:p>
              </text:list-item>
              <text:list-item>
                <text:p text:style-name="P41"><text:span text:style-name="T30">Modelo de desarrollo en colaboración</text:span></text:p>
              </text:list-item>
              <text:list-item>
                <text:p><text:span text:style-name="T30">Modelo de herramientas y servicios</text:span></text:p>
              </text:list-item>
              <text:list-item>
                <text:p><text:span text:style-name="T30">Modelo de revisión por pares</text:span></text:p>
              </text:list-item>
              <text:list-item>
                <text:p><text:span text:style-name="T30">Modelo de reproducibilidad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presentation:style-name="pr14" draw:text-style-name="P40" draw:layer="layout" svg:width="22.859cm" svg:height="2.656cm" svg:x="1.27cm" svg:y="0.254cm" presentation:class="title" presentation:user-transformed="true">
          <draw:text-box>
            <text:p text:style-name="P17"><text:span text:style-name="T16">Publicación abierta</text:span></text:p>
          </draw:text-box>
        </draw:frame>
        <draw:frame presentation:style-name="pr10" draw:text-style-name="P25" draw:layer="layout" svg:width="24.13cm" svg:height="11.291cm" svg:x="0.254cm" svg:y="4.457cm" presentation:class="outline" presentation:user-transformed="true">
          <draw:text-box>
            <text:p><text:span text:style-name="T30">Las libertades del software libre:</text:span></text:p>
            <text:list text:style-name="L3">
              <text:list-item>
                <text:p><text:span text:style-name="T30">uso</text:span></text:p>
              </text:list-item>
              <text:list-item>
                <text:p><text:span text:style-name="T30">estudio y modificación</text:span></text:p>
              </text:list-item>
              <text:list-item>
                <text:p><text:span text:style-name="T30">redistribución</text:span></text:p>
              </text:list-item>
              <text:list-item>
                <text:p><text:span text:style-name="T30">redistribución de modificaciones</text:span></text:p>
              </text:list-item>
            </text:list>
            <text:p text:style-name="P37"><text:span text:style-name="T33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presentation:style-name="pr15" draw:text-style-name="P40" draw:layer="layout" svg:width="22.859cm" svg:height="2.656cm" svg:x="1.27cm" svg:y="0.254cm" presentation:class="title" presentation:user-transformed="true">
          <draw:text-box>
            <text:p text:style-name="P17"><text:span text:style-name="T16">Publicación abierta (2)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list text:style-name="L3">
              <text:list-item>
                <text:p><text:span text:style-name="T30">Importancia de las licencias</text:span></text:p>
              </text:list-item>
              <text:list-item>
                <text:p><text:span text:style-name="T30">Licencias específicas inspiradas en las de </text:span><text:span text:style-name="T30">software libre</text:span></text:p>
                <text:p><text:span text:style-name="T30">(Creative Commons BY, BY-SA)</text:span></text:p>
              </text:list-item>
              <text:list-item>
                <text:p><text:span text:style-name="T30">Repositorios de publicación</text:span></text:p>
              </text:list-item>
            </text:list>
            <text:p><text:span text:style-name="T30"/></text:p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presentation:style-name="pr16" draw:text-style-name="P40" draw:layer="layout" svg:width="22.859cm" svg:height="2.656cm" svg:x="1.27cm" svg:y="0.254cm" presentation:class="title" presentation:user-transformed="true">
          <draw:text-box>
            <text:p text:style-name="P17"><text:span text:style-name="T16">Desarrollo en colaboración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list text:style-name="L3">
              <text:list-item>
                <text:p><text:span text:style-name="T30">Grupos geográficamente distribuidos </text:span><text:span text:style-name="T30">colaborando en construcción de software</text:span></text:p>
              </text:list-item>
              <text:list-item>
                <text:p><text:span text:style-name="T30">Prácticas de colaboración: medios de </text:span><text:span text:style-name="T30">comunicación, reporte y corrección de </text:span><text:span text:style-name="T30">errores, revisión continua, planes en </text:span><text:span text:style-name="T30">colaboración, etc.</text:span></text:p>
              </text:list-item>
              <text:list-item>
                <text:p><text:span text:style-name="T30">Involucración de usuarios en desarroll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presentation:style-name="pr17" draw:text-style-name="P40" draw:layer="layout" svg:width="22.859cm" svg:height="2.656cm" svg:x="1.27cm" svg:y="0.254cm" presentation:class="title" presentation:user-transformed="true">
          <draw:text-box>
            <text:p text:style-name="P17"><text:span text:style-name="T16">Herramientas y servicios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30">Forjas de desarrollo de software (GitHub, </text:span><text:span text:style-name="T30">GitLab)</text:span></text:p>
            <text:list text:style-name="L3">
              <text:list-item>
                <text:p><text:span text:style-name="T30">Control de versiones, publicación</text:span></text:p>
              </text:list-item>
              <text:list-item>
                <text:p><text:span text:style-name="T30">Gestión y reporte de incidencias</text:span></text:p>
              </text:list-item>
              <text:list-item>
                <text:p><text:span text:style-name="T30">Revisión por pares</text:span></text:p>
              </text:list-item>
              <text:list-item>
                <text:p><text:span text:style-name="T30">Herramientas de comunicación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8">Revisión por pares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list text:style-name="L3">
              <text:list-item>
                <text:p><text:span text:style-name="T30">Revisión antes de publicar</text:span></text:p>
              </text:list-item>
              <text:list-item>
                <text:p><text:span text:style-name="T30">Implicación de la comunidad</text:span></text:p>
              </text:list-item>
              <text:list-item>
                <text:p><text:span text:style-name="T30">Seguimiento público de todo el proceso</text:span></text:p>
              </text:list-item>
              <text:list-item>
                <text:p><text:span text:style-name="T30">Herramientas automáticas comprueban </text:span><text:span text:style-name="T30">reproducibilidad, errores conocidos, </text:span><text:span text:style-name="T30">requisitos mínimos...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8">Reproducibilidad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list text:style-name="L3">
              <text:list-item>
                <text:p><text:span text:style-name="T30">Reproducibilidad como parte integrante del </text:span><text:span text:style-name="T30">modelo de desarrollo</text:span></text:p>
              </text:list-item>
              <text:list-item>
                <text:p><text:span text:style-name="T30">Herramientas para automatizar en parte la </text:span><text:span text:style-name="T30">reproducibilidad</text:span></text:p>
              </text:list-item>
              <text:list-item>
                <text:p><text:span text:style-name="T30">Importancia de la documentación</text:span></text:p>
              </text:list-item>
              <text:list-item>
                <text:p><text:span text:style-name="T30">Importancia de probar la reproducibilidad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1T18">
        <draw:frame draw:name="Título 13_4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25" draw:text-style-name="P18" draw:layer="layout" svg:width="24.384cm" svg:height="11.599cm" svg:x="0.508cm" svg:y="1.758cm">
          <draw:text-box>
            <text:p text:style-name="P17"><text:span text:style-name="T12">Otras relaciones del software libre con la ciencia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8">Software libre para herramientas y servicios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30">Muchas herramientas para ciencia abierta son </text:span><text:span text:style-name="T30">software libre</text:span></text:p>
            <text:list text:style-name="L3">
              <text:list-item>
                <text:p><text:span text:style-name="T30">Facilitan la involucración de los usuarios en </text:span><text:span text:style-name="T30">su mejora</text:span></text:p>
              </text:list-item>
              <text:list-item>
                <text:p><text:span text:style-name="T30">Facilitan la creación de consorcios para su </text:span><text:span text:style-name="T30">mantenimiento y evolución</text:span></text:p>
              </text:list-item>
              <text:list-item>
                <text:p><text:span text:style-name="T30">Facilitan el despliegue local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8">Software como parte de la reproducibilidad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30">El software es básico para la reproducibilidad.</text:span></text:p>
            <text:p><text:span text:style-name="T30">El software libre facilita:</text:span></text:p>
            <text:list text:style-name="L3">
              <text:list-item>
                <text:p><text:span text:style-name="T30">Disposición del software para cualquier </text:span><text:span text:style-name="T30">revisor</text:span></text:p>
              </text:list-item>
              <text:list-item>
                <text:p><text:span text:style-name="T30">Disponibilidad del software durante mucho </text:span><text:span text:style-name="T30">tiempo</text:span></text:p>
              </text:list-item>
              <text:list-item>
                <text:p><text:span text:style-name="T30">Inspección del software para mitigar error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1T18">
        <draw:frame draw:name="Título 13_7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26" draw:text-style-name="P18" draw:layer="layout" svg:width="24.384cm" svg:height="4.846cm" svg:x="0.508cm" svg:y="5.06cm">
          <draw:text-box>
            <text:p text:style-name="P17"><text:span text:style-name="T12">Polític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8">
        <draw:frame draw:name="Título 13_26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7" draw:text-style-name="P30" draw:layer="layout" svg:width="24.638cm" svg:height="1.778cm" svg:x="1.016cm" svg:y="14.986cm">
          <draw:text-box>
            <text:p><text:span text:style-name="T34"><text:a xlink:href="https://en.unesco.org/science-sustainable-future/open-science" xlink:type="simple">https://en.unesco.org/science-sustainable-future/open-science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Unesco</text:span></text:p>
          </draw:text-box>
        </draw:frame>
        <draw:frame draw:style-name="gr7" draw:text-style-name="P26" draw:layer="layout" svg:width="19.558cm" svg:height="12.265cm" svg:x="5.842cm" svg:y="2.54cm">
          <draw:image xlink:href="Pictures/100000010000058800000378A6A1C93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8">
        <draw:frame draw:name="Título 13_9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Unión Europea</text:span></text:p>
          </draw:text-box>
        </draw:frame>
        <draw:frame draw:style-name="gr7" draw:text-style-name="P26" draw:layer="layout" svg:width="21.923cm" svg:height="12.629cm" svg:x="3.2cm" svg:y="3.414cm">
          <draw:image xlink:href="Pictures/100000010000058C0000033280FCF69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8">
        <draw:frame draw:name="Título 13_8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8" draw:text-style-name="P30" draw:layer="layout" svg:width="23.749cm" svg:height="13.032cm" svg:x="0.472cm" svg:y="3.654cm">
          <draw:text-box>
            <text:p><text:span text:style-name="T23">Publicaciones científicas financiadas con fondos públicos se publicarán en revistas o plataformas de acceso abierto</text:span></text:p>
            <text:list text:style-name="L3">
              <text:list-header>
                <text:p><text:span text:style-name="T23"/></text:p>
                <text:p><text:span text:style-name="T23"/></text:p>
                <text:p><text:span text:style-name="T23"/></text:p>
              </text:list-header>
            </text:list>
            <text:p><text:span text:style-name="T23"/></text:p>
            <text:p><text:span text:style-name="T23"/></text:p>
            <text:p text:style-name="P38"><text:span text:style-name="T35"><text:a xlink:href="https://www.coalition-s.org/" xlink:type="simple">https://www.coalition-s.org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Plan S</text:span></text:p>
          </draw:text-box>
        </draw:frame>
        <draw:frame draw:style-name="gr7" draw:text-style-name="P26" draw:layer="layout" svg:width="13.309cm" svg:height="7.178cm" svg:x="4.725cm" svg:y="8.062cm">
          <draw:image xlink:href="Pictures/100000010000051D000002C20DC92EE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1T18">
        <draw:frame draw:name="Título 13_ 1" presentation:style-name="pr4" draw:text-style-name="P13" draw:layer="layout" svg:width="22.859cm" svg:height="6.35cm" svg:x="1.27cm" svg:y="4.826cm" presentation:class="title">
          <draw:text-box>
            <text:p text:style-name="P2"><text:span text:style-name="T8"><text:s/></text:span></text:p>
          </draw:text-box>
        </draw:frame>
        <draw:frame draw:style-name="gr26" draw:text-style-name="P18" draw:layer="layout" svg:width="24.384cm" svg:height="5.925cm" svg:x="0.508cm" svg:y="5.06cm">
          <draw:text-box>
            <text:p text:style-name="P17"><text:span text:style-name="T12">Software libre</text:span></text:p>
            <text:p text:style-name="P17"><text:span text:style-name="T12">y publiciones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8">
        <draw:frame draw:name="Título 13_ 2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29" draw:text-style-name="P30" draw:layer="layout" svg:width="23.749cm" svg:height="13.76cm" svg:x="0.472cm" svg:y="3.654cm">
          <draw:text-box>
            <text:p><text:span text:style-name="T23">El software libre puede referenciarse:</text:span></text:p>
            <text:list text:style-name="L1">
              <text:list-item>
                <text:p><text:span text:style-name="T23">Citation File Format (CFF)</text:span></text:p>
              </text:list-item>
              <text:list-item>
                <text:p><text:span text:style-name="T23">Zenodo (DOI)</text:span></text:p>
              </text:list-item>
              <text:list-item>
                <text:p><text:span text:style-name="T23">Software Heritage (SWHID)</text:span></text:p>
              </text:list-item>
            </text:list>
            <text:p><text:span text:style-name="T23"/></text:p>
            <text:p><text:span text:style-name="T23"/></text:p>
            <text:p text:style-name="P38"><text:span text:style-name="T23"><text:a xlink:href="https://citation-file-format.github.io/" xlink:type="simple">https://citation-file-format.github.io/</text:a></text:span></text:p>
            <text:p text:style-name="P38"><text:span text:style-name="T23"><text:a xlink:href="https://docs.softwareheritage.org/devel/swh-model/persistent-identifiers.html" xlink:type="simple">https://docs.softwareheritage.org/devel/swh-model/persistent-identifiers.html</text:a></text:span></text:p>
            <text:p text:style-name="P38"><text:span text:style-name="T23"/></text:p>
            <text:p text:style-name="P38"/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Referencia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4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8">
        <draw:frame draw:name="Título 13_ 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30" draw:text-style-name="P30" draw:layer="layout" svg:width="23.749cm" svg:height="14.93cm" svg:x="0.572cm" svg:y="3.654cm">
          <draw:text-box>
            <text:p><text:span text:style-name="T23"/></text:p>
            <text:list text:style-name="L1">
              <text:list-item>
                <text:p><text:span text:style-name="T23">The Journal of Open Source Software</text:span></text:p>
              </text:list-item>
              <text:list-item>
                <text:p><text:span text:style-name="T23">Papers with code</text:span></text:p>
              </text:list-item>
              <text:list-item>
                <text:p><text:span text:style-name="T23">SoftwareX</text:span></text:p>
              </text:list-item>
            </text:list>
            <text:p><text:span text:style-name="T23"/></text:p>
            <text:p text:style-name="P38"><text:span text:style-name="T36"><text:a xlink:href="https://joss.theoj.org/" xlink:type="simple">https://joss.theoj.org/</text:a></text:span></text:p>
            <text:p text:style-name="P38"><text:span text:style-name="T36"><text:a xlink:href="https://paperswithcode.com/" xlink:type="simple">https://paperswithcode.com/</text:a></text:span></text:p>
            <text:p text:style-name="P38"><text:span text:style-name="T36"><text:a xlink:href="https://www.sciencedirect.com/journal/softwarex" xlink:type="simple">https://www.sciencedirect.com/journal/softwarex</text:a></text:span></text:p>
            <text:p text:style-name="P38"><text:span text:style-name="T23"/></text:p>
            <text:p text:style-name="P38"><text:span text:style-name="T23"/></text:p>
            <text:p><text:span text:style-name="T23"/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Revistas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4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8">
        <draw:frame draw:name="Título 13_18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draw:frame draw:style-name="gr31" draw:text-style-name="P42" draw:layer="layout" svg:width="22.422cm" svg:height="1.609cm" svg:x="0.692cm" svg:y="4.233cm">
          <draw:text-box>
            <text:p><text:span text:style-name="T37"><text:s/></text:span></text:p>
          </draw:text-box>
        </draw:frame>
        <draw:frame draw:style-name="gr32" draw:text-style-name="P43" draw:layer="layout" svg:width="23.876cm" svg:height="11.515cm" svg:x="0.557cm" svg:y="4.233cm">
          <draw:text-box>
            <text:p text:style-name="P33"><text:span text:style-name="T38">El software libre</text:span></text:p>
            <text:p text:style-name="P33"><text:span text:style-name="T38">ha sido y es</text:span></text:p>
            <text:p text:style-name="P33"><text:span text:style-name="T38">Fundamental</text:span></text:p>
            <text:p text:style-name="P33"><text:span text:style-name="T38">para la ciencia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>
          <draw:text-box>
            <text:p><text:span text:style-name="T28">Créditos</text:span></text:p>
          </draw:text-box>
        </draw:frame>
        <draw:frame presentation:style-name="pr10" draw:text-style-name="P25" draw:layer="layout" svg:width="24.13cm" svg:height="11.675cm" svg:x="0.762cm" svg:y="4.572cm" presentation:class="outline" presentation:user-transformed="true">
          <draw:text-box>
            <text:list text:style-name="L3">
              <text:list-item>
                <text:p><text:span text:style-name="T29">“</text:span><text:span text:style-name="T29">Open Science Taxonomy”,</text:span></text:p>
                <text:p><text:span text:style-name="T29">Petr Knoth and Nancy Pontika</text:span></text:p>
                <text:p><text:span text:style-name="T39"><text:a xlink:href="https://en.wikipedia.org/wiki/Open_science#/media/File:Os_taxonomy.png" xlink:type="simple">https://en.wikipedia.org/wiki/Open_science#/media/File:Os_taxonomy.png</text:a></text:span></text:p>
                <text:p><text:span text:style-name="T39"/></text:p>
              </text:list-item>
            </text:list>
          </draw:text-box>
        </draw:frame>
        <draw:frame draw:style-name="gr7" draw:text-style-name="P26" draw:layer="layout" svg:width="5.78cm" svg:height="3.187cm" svg:x="16.838cm" svg:y="3.963cm">
          <draw:image xlink:href="Pictures/1000000100000ED80000082F46A801E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8">
        <draw:frame draw:name="Marcador de contenido 6" presentation:style-name="pr6" draw:text-style-name="P44" draw:layer="layout" svg:width="23.114cm" svg:height="8.576cm" svg:x="1.524cm" svg:y="6.858cm" presentation:class="outline" presentation:user-transformed="true">
          <draw:text-box>
            <text:p text:style-name="P38"><text:span text:style-name="T40">©2019-2025 OfiLibre URJC</text:span></text:p>
            <text:p text:style-name="P38"><text:span text:style-name="T40">Algunos derechos reservados.</text:span></text:p>
            <text:p text:style-name="P38"><text:span text:style-name="T40">Este documento se distribuye bajo la licencia “Reconocimiento-CompartirIgual </text:span><text:span text:style-name="T40">4.0 Internacional” de Creative Commons, disponible en</text:span></text:p>
            <text:p><text:span text:style-name="T41"><text:a xlink:href="https://creativecommons.org/licenses/by-sa/4.0/deed.es" xlink:type="simple">https://creativecommons.org/licenses/by-sa/4.0/deed.es</text:a></text:span></text:p>
            <text:p text:style-name="P38"><text:span text:style-name="T40"/></text:p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8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 style:font-family-generic="roman" style:font-pitch="variable"/>
    <style:font-face style:name="Arial Black1" svg:font-family="'Arial Black'"/>
    <style:font-face style:name="Arial1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ok" xlink:href="Pictures/100000000000078000000387F062883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121cm" fo:padding-top="0.127cm" fo:padding-bottom="0.127cm" fo:padding-left="0.254cm" fo:padding-right="0.254cm" fo:wrap-option="wrap" loext:decorative="false"/>
      <style:paragraph-properties style:writing-mode="lr-tb"/>
    </style:style>
    <style:style style:name="Mgr9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444cm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4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7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MP24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32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33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</text:span><text:span text:style-name="MT22">i</text:span><text:span text:style-name="MT22">f</text:span><text:span text:style-name="MT22">t</text:span><text:span text:style-name="MT22">h</text:span><text:span text:style-name="MT22"> </text:span><text:span text:style-name="MT22">l</text:span><text:span text:style-name="MT22">e</text:span><text:span text:style-name="MT22">v</text:span><text:span text:style-name="MT22">e</text:span><text:span text:style-name="MT22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</text:span><text:span text:style-name="MT22">i</text:span><text:span text:style-name="MT22">f</text:span><text:span text:style-name="MT22">t</text:span><text:span text:style-name="MT22">h</text:span><text:span text:style-name="MT22"> </text:span><text:span text:style-name="MT22">l</text:span><text:span text:style-name="MT22">e</text:span><text:span text:style-name="MT22">v</text:span><text:span text:style-name="MT22">e</text:span><text:span text:style-name="MT22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29">5/29/25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7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5-05-29">5/29/25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8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2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3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3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ángulo 9_19" draw:style-name="Mgr7" draw:text-style-name="MP18" draw:layer="backgroundobjects" svg:width="25.4cm" svg:height="2.381cm" svg:x="0cm" svg:y="16.669cm">
        <text:p/>
        <draw:enhanced-geometry svg:viewBox="0 0 21600 21600" draw:type="non-primitive" draw:enhanced-path="M 0 0 L 21600 0 21600 21600 0 21600 Z N"/>
      </draw:custom-shape>
      <draw:frame presentation:style-name="Mpr11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8" draw:text-style-name="MP23" draw:layer="backgroundobjects" svg:width="12.704cm" svg:height="2.375cm" svg:x="12.7cm" svg:y="16.661cm">
        <draw:text-box>
          <text:p text:style-name="MP3"><text:span text:style-name="MT30">Oficina de Conocimiento y Cultura Libres</text:span></text:p>
          <text:p text:style-name="MP3"><text:span text:style-name="MT30">http://ofilibre.urjc.es</text:span></text:p>
        </draw:text-box>
      </draw:frame>
      <draw:frame draw:name="Subtítulo 2_13" draw:style-name="Mgr9" draw:text-style-name="MP24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15" draw:text-style-name="MP22" draw:layer="backgroundobjects" svg:width="3.556cm" svg:height="0.886cm" svg:x="9.144cm" svg:y="16.769cm">
        <draw:text-box>
          <text:p text:style-name="MP25"><text:span text:style-name="MT31"><text:date style:data-style-name="D4" text:date-value="2025-05-29">05/29/2025</text:date></text:span></text:p>
        </draw:text-box>
      </draw:frame>
      <draw:frame presentation:style-name="Mpr115" draw:text-style-name="MP22" draw:layer="backgroundobjects" svg:width="3.048cm" svg:height="0.86cm" svg:x="9.398cm" svg:y="17.682cm">
        <draw:text-box>
          <text:p text:style-name="MP25"><text:span text:style-name="MT32"><text:page-number>&lt;number&gt;</text:page-number></text:span><text:span text:style-name="MT32">/</text:span><text:span text:style-name="MT32"><text:page-count>51</text:page-count></text:span></text:p>
        </draw:text-box>
      </draw:frame>
      <draw:frame draw:style-name="Mgr10" draw:text-style-name="MP26" draw:layer="backgroundobjects" svg:width="8.697cm" svg:height="2.294cm" svg:x="0.291cm" svg:y="16.669cm">
        <draw:image xlink:href="Pictures/1000000100000333000000C8C39BB24A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6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7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7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8" draw:layer="backgroundobjects" svg:width="22.859cm" svg:height="6.35cm" svg:x="1.27cm" svg:y="4.826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8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presentation:style-name="Mpr119" draw:text-style-name="MP22" draw:layer="backgroundobjects" svg:width="3.556cm" svg:height="0.886cm" svg:x="9.144cm" svg:y="16.894cm">
        <draw:text-box>
          <text:p text:style-name="MP25"><text:span text:style-name="MT31"><text:date style:data-style-name="D4" text:date-value="2025-05-29">05/29/2025</text:date></text:span></text:p>
        </draw:text-box>
      </draw:frame>
      <draw:frame presentation:style-name="Mpr119" draw:text-style-name="MP22" draw:layer="backgroundobjects" svg:width="3.302cm" svg:height="0.86cm" svg:x="9.398cm" svg:y="17.936cm">
        <draw:text-box>
          <text:p text:style-name="MP25"><text:span text:style-name="MT32"><text:page-number>&lt;number&gt;</text:page-number></text:span><text:span text:style-name="MT32">/</text:span><text:span text:style-name="MT32"><text:page-count>51</text:page-count></text:span></text:p>
        </draw:text-box>
      </draw:frame>
      <draw:frame draw:name="CuadroTexto 8_19" draw:style-name="Mgr11" draw:text-style-name="MP23" draw:layer="backgroundobjects" svg:width="12.116cm" svg:height="1.698cm" svg:x="12.954cm" svg:y="16.78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draw:frame draw:style-name="Mgr10" draw:text-style-name="MP26" draw:layer="backgroundobjects" svg:width="8.697cm" svg:height="2.124cm" svg:x="0.291cm" svg:y="16.839cm">
        <draw:image xlink:href="Pictures/1000000100000333000000C8C39BB24A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20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21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21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>PowerPoint Presentation</dc:title>
    <meta:initial-creator>Manuel Gertrudix Barrio</meta:initial-creator>
    <meta:creation-date>2019-01-21T12:01:12Z</meta:creation-date>
    <dc:date>2025-05-29T15:58:22.056699902</dc:date>
    <meta:editing-cycles>45</meta:editing-cycles>
    <meta:editing-duration>PT16H34M38S</meta:editing-duration>
    <dc:creator>Jesus Gonzalez-Barahona</dc:creator>
    <meta:document-statistic meta:object-count="482"/>
    <meta:template xlink:type="simple" xlink:actuate="onRequest" xlink:title="" xlink:href="../Downloads/presentaciones/Ofilibre-presentacion.odp/Esencial"/>
  </office:meta>
</office:document-meta>
</file>